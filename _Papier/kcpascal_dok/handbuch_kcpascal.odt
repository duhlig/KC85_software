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000000035B2E2C9B2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 Narrow" svg:font-family="'Liberation Sans Narrow'" style:font-family-generic="swiss"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le1" style:family="table">
      <style:table-properties style:width="16.902cm" table:align="margins"/>
    </style:style>
    <style:style style:name="Tabelle1.A" style:family="table-column">
      <style:table-column-properties style:column-width="16.902cm" style:rel-column-width="65535*"/>
    </style:style>
    <style:style style:name="Tabelle1.A1" style:family="table-cell">
      <style:table-cell-properties fo:padding="0.097cm" fo:border="0.5pt solid #000000"/>
    </style:style>
    <style:style style:name="Tabelle27" style:family="table">
      <style:table-properties style:width="16.902cm" table:align="margins"/>
    </style:style>
    <style:style style:name="Tabelle27.A" style:family="table-column">
      <style:table-column-properties style:column-width="3.81cm" style:rel-column-width="14774*"/>
    </style:style>
    <style:style style:name="Tabelle27.B" style:family="table-column">
      <style:table-column-properties style:column-width="13.092cm" style:rel-column-width="50761*"/>
    </style:style>
    <style:style style:name="Tabelle2" style:family="table">
      <style:table-properties style:width="16.902cm" table:align="margins"/>
    </style:style>
    <style:style style:name="Tabelle2.A" style:family="table-column">
      <style:table-column-properties style:column-width="2.388cm" style:rel-column-width="9260*"/>
    </style:style>
    <style:style style:name="Tabelle2.B" style:family="table-column">
      <style:table-column-properties style:column-width="4.576cm" style:rel-column-width="17741*"/>
    </style:style>
    <style:style style:name="Tabelle2.C" style:family="table-column">
      <style:table-column-properties style:column-width="9.938cm" style:rel-column-width="38534*"/>
    </style:style>
    <style:style style:name="Tabelle2.A1" style:family="table-cell">
      <style:table-cell-properties fo:padding="0.097cm" fo:border-left="0.5pt solid #000000" fo:border-right="none" fo:border-top="0.5pt solid #000000" fo:border-bottom="0.5pt solid #000000"/>
    </style:style>
    <style:style style:name="Tabelle2.C1" style:family="table-cell">
      <style:table-cell-properties fo:padding="0.097cm" fo:border="0.5pt solid #000000"/>
    </style:style>
    <style:style style:name="Tabelle2.A2" style:family="table-cell">
      <style:table-cell-properties fo:padding="0.097cm" fo:border-left="0.5pt solid #000000" fo:border-right="none" fo:border-top="none" fo:border-bottom="0.5pt solid #000000"/>
    </style:style>
    <style:style style:name="Tabelle2.C2" style:family="table-cell">
      <style:table-cell-properties fo:padding="0.097cm" fo:border-left="0.5pt solid #000000" fo:border-right="0.5pt solid #000000" fo:border-top="none" fo:border-bottom="0.5pt solid #000000"/>
    </style:style>
    <style:style style:name="Tabelle3" style:family="table">
      <style:table-properties style:width="16.902cm" table:align="margins"/>
    </style:style>
    <style:style style:name="Tabelle3.A" style:family="table-column">
      <style:table-column-properties style:column-width="3.969cm" style:rel-column-width="15390*"/>
    </style:style>
    <style:style style:name="Tabelle3.B" style:family="table-column">
      <style:table-column-properties style:column-width="12.933cm" style:rel-column-width="50145*"/>
    </style:style>
    <style:style style:name="Tabelle3.A1" style:family="table-cell">
      <style:table-cell-properties fo:padding="0.097cm" fo:border="none"/>
    </style:style>
    <style:style style:name="Tabelle4" style:family="table">
      <style:table-properties style:width="16.914cm" fo:margin-left="0cm" fo:margin-right="-0.012cm" table:align="margins"/>
    </style:style>
    <style:style style:name="Tabelle4.A" style:family="table-column">
      <style:table-column-properties style:column-width="1.998cm" style:rel-column-width="7745*"/>
    </style:style>
    <style:style style:name="Tabelle4.B" style:family="table-column">
      <style:table-column-properties style:column-width="2.683cm" style:rel-column-width="10395*"/>
    </style:style>
    <style:style style:name="Tabelle4.C" style:family="table-column">
      <style:table-column-properties style:column-width="1.972cm" style:rel-column-width="7644*"/>
    </style:style>
    <style:style style:name="Tabelle4.D" style:family="table-column">
      <style:table-column-properties style:column-width="10.259cm" style:rel-column-width="39751*"/>
    </style:style>
    <style:style style:name="Tabelle6" style:family="table">
      <style:table-properties style:width="16.902cm" table:align="margins"/>
    </style:style>
    <style:style style:name="Tabelle6.A" style:family="table-column">
      <style:table-column-properties style:column-width="3.39cm" style:rel-column-width="13147*"/>
    </style:style>
    <style:style style:name="Tabelle6.B" style:family="table-column">
      <style:table-column-properties style:column-width="13.511cm" style:rel-column-width="52388*"/>
    </style:style>
    <style:style style:name="Tabelle5" style:family="table">
      <style:table-properties style:width="16.902cm" table:align="margins"/>
    </style:style>
    <style:style style:name="Tabelle5.A" style:family="table-column">
      <style:table-column-properties style:column-width="16.902cm" style:rel-column-width="65535*"/>
    </style:style>
    <style:style style:name="Tabelle7" style:family="table">
      <style:table-properties style:width="6.181cm" fo:margin-left="0.407cm" table:align="left"/>
    </style:style>
    <style:style style:name="Tabelle7.A" style:family="table-column">
      <style:table-column-properties style:column-width="2.805cm"/>
    </style:style>
    <style:style style:name="Tabelle7.B" style:family="table-column">
      <style:table-column-properties style:column-width="3.376cm"/>
    </style:style>
    <style:style style:name="Tabelle8" style:family="table">
      <style:table-properties style:width="6.297cm" fo:margin-left="0.355cm" table:align="left"/>
    </style:style>
    <style:style style:name="Tabelle8.A" style:family="table-column">
      <style:table-column-properties style:column-width="2.805cm"/>
    </style:style>
    <style:style style:name="Tabelle8.B" style:family="table-column">
      <style:table-column-properties style:column-width="3.493cm"/>
    </style:style>
    <style:style style:name="Tabelle9" style:family="table">
      <style:table-properties style:width="8.493cm" fo:margin-left="0.434cm" table:align="left"/>
    </style:style>
    <style:style style:name="Tabelle9.A" style:family="table-column">
      <style:table-column-properties style:column-width="4.789cm"/>
    </style:style>
    <style:style style:name="Tabelle9.B" style:family="table-column">
      <style:table-column-properties style:column-width="3.704cm"/>
    </style:style>
    <style:style style:name="Tabelle10" style:family="table">
      <style:table-properties style:width="5.212cm" fo:margin-left="0.434cm" table:align="left"/>
    </style:style>
    <style:style style:name="Tabelle10.A" style:family="table-column">
      <style:table-column-properties style:column-width="3.307cm"/>
    </style:style>
    <style:style style:name="Tabelle10.B" style:family="table-column">
      <style:table-column-properties style:column-width="1.905cm"/>
    </style:style>
    <style:style style:name="Tabelle11" style:family="table">
      <style:table-properties style:width="6.509cm" fo:margin-left="0.434cm" table:align="left"/>
    </style:style>
    <style:style style:name="Tabelle11.A" style:family="table-column">
      <style:table-column-properties style:column-width="3.81cm"/>
    </style:style>
    <style:style style:name="Tabelle11.B" style:family="table-column">
      <style:table-column-properties style:column-width="2.699cm"/>
    </style:style>
    <style:style style:name="Tabelle12" style:family="table">
      <style:table-properties style:width="6.694cm" fo:margin-left="0.407cm" table:align="left"/>
    </style:style>
    <style:style style:name="Tabelle12.A" style:family="table-column">
      <style:table-column-properties style:column-width="3.889cm"/>
    </style:style>
    <style:style style:name="Tabelle12.B" style:family="table-column">
      <style:table-column-properties style:column-width="2.805cm"/>
    </style:style>
    <style:style style:name="Tabelle13" style:family="table">
      <style:table-properties style:width="6.694cm" fo:margin-left="0.434cm" table:align="left"/>
    </style:style>
    <style:style style:name="Tabelle13.A" style:family="table-column">
      <style:table-column-properties style:column-width="3.889cm"/>
    </style:style>
    <style:style style:name="Tabelle13.B" style:family="table-column">
      <style:table-column-properties style:column-width="2.805cm"/>
    </style:style>
    <style:style style:name="Tabelle14" style:family="table">
      <style:table-properties style:width="6.694cm" fo:margin-left="0.434cm" table:align="left"/>
    </style:style>
    <style:style style:name="Tabelle14.A" style:family="table-column">
      <style:table-column-properties style:column-width="3.889cm"/>
    </style:style>
    <style:style style:name="Tabelle14.B" style:family="table-column">
      <style:table-column-properties style:column-width="2.805cm"/>
    </style:style>
    <style:style style:name="Tabelle15" style:family="table">
      <style:table-properties style:width="7.911cm" fo:margin-left="0.54cm" table:align="left"/>
    </style:style>
    <style:style style:name="Tabelle15.A" style:family="table-column">
      <style:table-column-properties style:column-width="3.81cm"/>
    </style:style>
    <style:style style:name="Tabelle15.B" style:family="table-column">
      <style:table-column-properties style:column-width="4.101cm"/>
    </style:style>
    <style:style style:name="Tabelle16" style:family="table">
      <style:table-properties style:width="16.902cm" table:align="margins"/>
    </style:style>
    <style:style style:name="Tabelle16.A" style:family="table-column">
      <style:table-column-properties style:column-width="9.936cm" style:rel-column-width="38526*"/>
    </style:style>
    <style:style style:name="Tabelle16.B" style:family="table-column">
      <style:table-column-properties style:column-width="6.966cm" style:rel-column-width="27009*"/>
    </style:style>
    <style:style style:name="Tabelle17" style:family="table">
      <style:table-properties style:width="16.902cm" table:align="margins"/>
    </style:style>
    <style:style style:name="Tabelle17.A" style:family="table-column">
      <style:table-column-properties style:column-width="16.902cm" style:rel-column-width="65535*"/>
    </style:style>
    <style:style style:name="Tabelle18" style:family="table">
      <style:table-properties style:width="16.902cm" table:align="margins"/>
    </style:style>
    <style:style style:name="Tabelle18.A" style:family="table-column">
      <style:table-column-properties style:column-width="16.902cm" style:rel-column-width="65535*"/>
    </style:style>
    <style:style style:name="Tabelle19" style:family="table">
      <style:table-properties style:width="16.902cm" table:align="margins"/>
    </style:style>
    <style:style style:name="Tabelle19.A" style:family="table-column">
      <style:table-column-properties style:column-width="2.392cm" style:rel-column-width="9274*"/>
    </style:style>
    <style:style style:name="Tabelle19.B" style:family="table-column">
      <style:table-column-properties style:column-width="14.51cm" style:rel-column-width="56261*"/>
    </style:style>
    <style:style style:name="Tabelle20" style:family="table">
      <style:table-properties style:width="16.902cm" table:align="margins"/>
    </style:style>
    <style:style style:name="Tabelle20.A" style:family="table-column">
      <style:table-column-properties style:column-width="1.683cm" style:rel-column-width="6522*"/>
    </style:style>
    <style:style style:name="Tabelle20.B" style:family="table-column">
      <style:table-column-properties style:column-width="15.219cm" style:rel-column-width="59013*"/>
    </style:style>
    <style:style style:name="Tabelle21" style:family="table">
      <style:table-properties style:width="16.902cm" table:align="margins"/>
    </style:style>
    <style:style style:name="Tabelle21.A" style:family="table-column">
      <style:table-column-properties style:column-width="1.683cm" style:rel-column-width="6522*"/>
    </style:style>
    <style:style style:name="Tabelle21.B" style:family="table-column">
      <style:table-column-properties style:column-width="15.219cm" style:rel-column-width="59013*"/>
    </style:style>
    <style:style style:name="Tabelle22" style:family="table">
      <style:table-properties style:width="16.902cm" table:align="margins"/>
    </style:style>
    <style:style style:name="Tabelle22.A" style:family="table-column">
      <style:table-column-properties style:column-width="0.998cm" style:rel-column-width="3872*"/>
    </style:style>
    <style:style style:name="Tabelle22.B" style:family="table-column">
      <style:table-column-properties style:column-width="15.903cm" style:rel-column-width="61663*"/>
    </style:style>
    <style:style style:name="Tabelle23" style:family="table">
      <style:table-properties style:width="16.902cm" table:align="margins"/>
    </style:style>
    <style:style style:name="Tabelle23.A" style:family="table-column">
      <style:table-column-properties style:column-width="0.998cm" style:rel-column-width="3872*"/>
    </style:style>
    <style:style style:name="Tabelle23.B" style:family="table-column">
      <style:table-column-properties style:column-width="15.903cm" style:rel-column-width="61663*"/>
    </style:style>
    <style:style style:name="Tabelle24" style:family="table">
      <style:table-properties style:width="16.902cm" table:align="margins"/>
    </style:style>
    <style:style style:name="Tabelle24.A" style:family="table-column">
      <style:table-column-properties style:column-width="2.182cm" style:rel-column-width="8459*"/>
    </style:style>
    <style:style style:name="Tabelle24.B" style:family="table-column">
      <style:table-column-properties style:column-width="2.642cm" style:rel-column-width="10246*"/>
    </style:style>
    <style:style style:name="Tabelle24.C" style:family="table-column">
      <style:table-column-properties style:column-width="2.413cm" style:rel-column-width="9356*"/>
    </style:style>
    <style:style style:name="Tabelle24.G" style:family="table-column">
      <style:table-column-properties style:column-width="2.425cm" style:rel-column-width="9406*"/>
    </style:style>
    <style:style style:name="Tabelle25" style:family="table">
      <style:table-properties style:width="12.002cm" table:align="left"/>
    </style:style>
    <style:style style:name="Tabelle25.A" style:family="table-column">
      <style:table-column-properties style:column-width="2cm"/>
    </style:style>
    <style:style style:name="Tabelle26" style:family="table">
      <style:table-properties style:width="16.902cm" table:align="margins"/>
    </style:style>
    <style:style style:name="Tabelle26.A" style:family="table-column">
      <style:table-column-properties style:column-width="3.286cm" style:rel-column-width="12740*"/>
    </style:style>
    <style:style style:name="Tabelle26.B" style:family="table-column">
      <style:table-column-properties style:column-width="13.615cm" style:rel-column-width="52795*"/>
    </style:style>
    <style:style style:name="P1" style:family="paragraph" style:parent-style-name="Bibliography_20_Heading">
      <style:paragraph-properties fo:break-before="page"/>
    </style:style>
    <style:style style:name="P2" style:family="paragraph" style:parent-style-name="User_20_Index_20_Heading">
      <style:paragraph-properties fo:break-before="page"/>
    </style:style>
    <style:style style:name="P3" style:family="paragraph" style:parent-style-name="Standard">
      <style:paragraph-properties fo:break-before="page"/>
    </style:style>
    <style:style style:name="P4" style:family="paragraph" style:parent-style-name="Text_20_body">
      <style:paragraph-properties fo:break-before="page"/>
    </style:style>
    <style:style style:name="P5" style:family="paragraph" style:parent-style-name="Table_20_Contents">
      <style:text-properties officeooo:rsid="0005e289" officeooo:paragraph-rsid="0005e289"/>
    </style:style>
    <style:style style:name="P6" style:family="paragraph" style:parent-style-name="Table_20_Contents">
      <style:text-properties officeooo:rsid="0005e289" officeooo:paragraph-rsid="00a003fd"/>
    </style:style>
    <style:style style:name="P7" style:family="paragraph" style:parent-style-name="Text_20_body">
      <style:text-properties officeooo:paragraph-rsid="001e3ebc"/>
    </style:style>
    <style:style style:name="P8" style:family="paragraph" style:parent-style-name="Standard">
      <style:text-properties officeooo:paragraph-rsid="002eac21"/>
    </style:style>
    <style:style style:name="P9" style:family="paragraph" style:parent-style-name="Standard">
      <style:text-properties officeooo:paragraph-rsid="00319847"/>
    </style:style>
    <style:style style:name="P10" style:family="paragraph" style:parent-style-name="Standard">
      <style:text-properties officeooo:paragraph-rsid="00328381"/>
    </style:style>
    <style:style style:name="P11" style:family="paragraph" style:parent-style-name="Text_20_body">
      <style:text-properties officeooo:paragraph-rsid="0033ccdd"/>
    </style:style>
    <style:style style:name="P12" style:family="paragraph" style:parent-style-name="Standard">
      <style:text-properties officeooo:paragraph-rsid="00375e52"/>
    </style:style>
    <style:style style:name="P13" style:family="paragraph" style:parent-style-name="Text_20_body">
      <style:text-properties officeooo:paragraph-rsid="00381365"/>
    </style:style>
    <style:style style:name="P14" style:family="paragraph" style:parent-style-name="Text_20_body">
      <style:text-properties officeooo:paragraph-rsid="0038e973"/>
    </style:style>
    <style:style style:name="P15" style:family="paragraph" style:parent-style-name="Standard">
      <style:text-properties officeooo:paragraph-rsid="0045a115"/>
    </style:style>
    <style:style style:name="P16" style:family="paragraph" style:parent-style-name="Table_20_Heading">
      <style:text-properties officeooo:paragraph-rsid="0045a115"/>
    </style:style>
    <style:style style:name="P17" style:family="paragraph" style:parent-style-name="Text_20_body">
      <style:text-properties officeooo:paragraph-rsid="0045a115"/>
    </style:style>
    <style:style style:name="P18" style:family="paragraph" style:parent-style-name="Standard">
      <style:text-properties officeooo:paragraph-rsid="004a5127"/>
    </style:style>
    <style:style style:name="P19" style:family="paragraph" style:parent-style-name="Text_20_body">
      <style:text-properties officeooo:paragraph-rsid="004a5127"/>
    </style:style>
    <style:style style:name="P20" style:family="paragraph" style:parent-style-name="Standard">
      <style:text-properties officeooo:paragraph-rsid="00519c20"/>
    </style:style>
    <style:style style:name="P21" style:family="paragraph" style:parent-style-name="Text_20_body">
      <style:text-properties officeooo:paragraph-rsid="0041ac66"/>
    </style:style>
    <style:style style:name="P22" style:family="paragraph" style:parent-style-name="Text_20_body">
      <style:text-properties officeooo:paragraph-rsid="0043686c"/>
    </style:style>
    <style:style style:name="P23" style:family="paragraph" style:parent-style-name="Text_20_body">
      <style:text-properties officeooo:paragraph-rsid="00449465"/>
    </style:style>
    <style:style style:name="P24" style:family="paragraph" style:parent-style-name="Text_20_body">
      <style:text-properties officeooo:paragraph-rsid="0049d464"/>
    </style:style>
    <style:style style:name="P25" style:family="paragraph" style:parent-style-name="Text_20_body">
      <style:text-properties officeooo:paragraph-rsid="0052854f"/>
    </style:style>
    <style:style style:name="P26" style:family="paragraph" style:parent-style-name="Standard">
      <style:text-properties officeooo:paragraph-rsid="00572f87"/>
    </style:style>
    <style:style style:name="P27" style:family="paragraph" style:parent-style-name="Standard">
      <style:text-properties officeooo:paragraph-rsid="00599a2c"/>
    </style:style>
    <style:style style:name="P28" style:family="paragraph" style:parent-style-name="Standard">
      <style:text-properties officeooo:paragraph-rsid="005f118a"/>
    </style:style>
    <style:style style:name="P29" style:family="paragraph" style:parent-style-name="Text_20_body">
      <style:text-properties officeooo:paragraph-rsid="00605853"/>
    </style:style>
    <style:style style:name="P30" style:family="paragraph" style:parent-style-name="Text_20_body">
      <style:text-properties officeooo:paragraph-rsid="006cabc6"/>
    </style:style>
    <style:style style:name="P31" style:family="paragraph" style:parent-style-name="Text_20_body">
      <style:text-properties officeooo:paragraph-rsid="00767c1a"/>
    </style:style>
    <style:style style:name="P32" style:family="paragraph" style:parent-style-name="Text_20_body">
      <style:text-properties officeooo:paragraph-rsid="00719366"/>
    </style:style>
    <style:style style:name="P33" style:family="paragraph" style:parent-style-name="Text_20_body">
      <style:text-properties officeooo:paragraph-rsid="007f2444"/>
    </style:style>
    <style:style style:name="P34" style:family="paragraph" style:parent-style-name="Preformatted_20_Text">
      <style:text-properties officeooo:paragraph-rsid="008535e3"/>
    </style:style>
    <style:style style:name="P35" style:family="paragraph" style:parent-style-name="Text_20_body">
      <style:text-properties officeooo:paragraph-rsid="008535e3"/>
    </style:style>
    <style:style style:name="P36" style:family="paragraph" style:parent-style-name="Text_20_body">
      <style:text-properties officeooo:paragraph-rsid="007da71c"/>
    </style:style>
    <style:style style:name="P37" style:family="paragraph" style:parent-style-name="Bibliography_20_1">
      <style:paragraph-properties>
        <style:tab-stops/>
      </style:paragraph-properties>
    </style:style>
    <style:style style:name="P38" style:family="paragraph" style:parent-style-name="Standard">
      <style:paragraph-properties fo:text-align="center" style:justify-single-word="false"/>
      <style:text-properties officeooo:paragraph-rsid="0005e289"/>
    </style:style>
    <style:style style:name="P39" style:family="paragraph" style:parent-style-name="Standard">
      <style:paragraph-properties fo:text-align="center" style:justify-single-word="false"/>
      <style:text-properties fo:font-size="14pt" officeooo:paragraph-rsid="0005e289" style:font-size-asian="14pt" style:font-size-complex="14pt"/>
    </style:style>
    <style:style style:name="P40" style:family="paragraph" style:parent-style-name="Text_20_body">
      <style:text-properties officeooo:rsid="009a2474" officeooo:paragraph-rsid="009a2474"/>
    </style:style>
    <style:style style:name="P41" style:family="paragraph" style:parent-style-name="Text_20_body">
      <style:text-properties officeooo:rsid="009cd26d" officeooo:paragraph-rsid="009cd26d"/>
    </style:style>
    <style:style style:name="P42" style:family="paragraph" style:parent-style-name="Table_20_Contents">
      <style:text-properties officeooo:rsid="00a003fd" officeooo:paragraph-rsid="00a003fd"/>
    </style:style>
    <style:style style:name="P43" style:family="paragraph" style:parent-style-name="Text_20_body">
      <style:text-properties officeooo:rsid="00a19315" officeooo:paragraph-rsid="00a19315"/>
    </style:style>
    <style:style style:name="P44" style:family="paragraph" style:parent-style-name="Text_20_body">
      <style:text-properties officeooo:rsid="00a35165" officeooo:paragraph-rsid="00a35165"/>
    </style:style>
    <style:style style:name="P45" style:family="paragraph" style:parent-style-name="Table_20_Contents">
      <style:text-properties fo:color="#808080" loext:opacity="100%"/>
    </style:style>
    <style:style style:name="P46" style:family="paragraph" style:parent-style-name="Text_20_body">
      <style:text-properties officeooo:paragraph-rsid="00a89235"/>
    </style:style>
    <style:style style:name="P47" style:family="paragraph" style:parent-style-name="Text_20_body">
      <style:text-properties officeooo:paragraph-rsid="00abea25"/>
    </style:style>
    <style:style style:name="P48" style:family="paragraph" style:parent-style-name="Text_20_body">
      <style:text-properties officeooo:paragraph-rsid="00af6e97"/>
    </style:style>
    <style:style style:name="P49" style:family="paragraph" style:parent-style-name="Preformatted_20_Text">
      <style:text-properties officeooo:rsid="00b070a8" officeooo:paragraph-rsid="00b070a8"/>
    </style:style>
    <style:style style:name="P50" style:family="paragraph" style:parent-style-name="Contents_20_1">
      <style:paragraph-properties>
        <style:tab-stops>
          <style:tab-stop style:position="16.9cm" style:type="right" style:leader-style="dotted" style:leader-text="."/>
        </style:tab-stops>
      </style:paragraph-properties>
    </style:style>
    <style:style style:name="P51" style:family="paragraph" style:parent-style-name="Contents_20_2">
      <style:paragraph-properties>
        <style:tab-stops>
          <style:tab-stop style:position="16.401cm" style:type="right" style:leader-style="dotted" style:leader-text="."/>
        </style:tab-stops>
      </style:paragraph-properties>
    </style:style>
    <style:style style:name="P52" style:family="paragraph" style:parent-style-name="Table_20_Contents">
      <style:text-properties officeooo:rsid="00b18ba0" officeooo:paragraph-rsid="00b18ba0"/>
    </style:style>
    <style:style style:name="P53" style:family="paragraph" style:parent-style-name="Text_20_body">
      <style:text-properties officeooo:rsid="00ad7385" officeooo:paragraph-rsid="00ad7385"/>
    </style:style>
    <style:style style:name="P54" style:family="paragraph" style:parent-style-name="Table_20_Contents">
      <style:text-properties officeooo:rsid="00b8407d" officeooo:paragraph-rsid="00b8407d"/>
    </style:style>
    <style:style style:name="P55" style:family="paragraph" style:parent-style-name="Text_20_body">
      <style:text-properties fo:font-style="italic" officeooo:rsid="00b8407d" officeooo:paragraph-rsid="00b8407d" style:font-style-asian="italic" style:font-style-complex="italic"/>
    </style:style>
    <style:style style:name="P56" style:family="paragraph" style:parent-style-name="Table_20_Contents">
      <style:text-properties officeooo:rsid="00bb6258" officeooo:paragraph-rsid="00bb6258"/>
    </style:style>
    <style:style style:name="P57" style:family="paragraph" style:parent-style-name="Heading_20_1">
      <style:paragraph-properties fo:break-before="page"/>
      <style:text-properties officeooo:rsid="0005e289" officeooo:paragraph-rsid="0005e289"/>
    </style:style>
    <style:style style:name="P58" style:family="paragraph" style:parent-style-name="Heading_20_1">
      <style:paragraph-properties fo:break-before="page"/>
    </style:style>
    <style:style style:name="P59" style:family="paragraph" style:parent-style-name="Heading_20_1">
      <style:text-properties officeooo:rsid="00070e1a"/>
    </style:style>
    <style:style style:name="P60" style:family="paragraph" style:parent-style-name="Heading_20_2">
      <style:text-properties officeooo:paragraph-rsid="006cabc6"/>
    </style:style>
    <style:style style:name="P61" style:family="paragraph" style:parent-style-name="Heading_20_2">
      <style:paragraph-properties fo:break-before="page"/>
    </style:style>
    <style:style style:name="P62" style:family="paragraph" style:parent-style-name="Heading_20_2">
      <style:text-properties officeooo:rsid="007da71c" officeooo:paragraph-rsid="007da71c"/>
    </style:style>
    <style:style style:name="P63" style:family="paragraph" style:parent-style-name="Heading_20_2">
      <style:text-properties officeooo:paragraph-rsid="008535e3"/>
    </style:style>
    <style:style style:name="P64" style:family="paragraph" style:parent-style-name="Heading_20_2">
      <style:text-properties officeooo:paragraph-rsid="007da71c"/>
    </style:style>
    <style:style style:name="P65" style:family="paragraph" style:parent-style-name="Heading_20_2">
      <style:text-properties officeooo:rsid="00381365" officeooo:paragraph-rsid="00381365"/>
    </style:style>
    <style:style style:name="P66" style:family="paragraph" style:parent-style-name="Heading_20_3">
      <style:text-properties officeooo:paragraph-rsid="0045a115"/>
    </style:style>
    <style:style style:name="P67" style:family="paragraph" style:parent-style-name="Heading_20_4">
      <style:text-properties officeooo:paragraph-rsid="0055a841"/>
    </style:style>
    <style:style style:name="P68" style:family="paragraph" style:parent-style-name="List_20_Contents" style:list-style-name="L2"/>
    <style:style style:name="P69" style:family="paragraph" style:parent-style-name="Text_20_body" style:list-style-name="L1"/>
    <style:style style:name="P70"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Mono" fo:font-size="12pt" fo:font-style="normal" fo:text-shadow="none" style:text-underline-style="none" fo:font-weight="bold" style:letter-kerning="true" style:font-name-asian="Noto Sans CJK SC" style:font-size-asian="12pt" style:font-style-asian="normal" style:font-weight-asian="bold" style:font-name-complex="Noto Sans Devanagari1" style:font-size-complex="12pt" style:font-style-complex="normal" style:font-weight-complex="bold" style:text-emphasize="none" style:font-relief="none" style:text-overline-style="none" style:text-overline-color="font-color"/>
    </style:style>
    <style:style style:name="P71"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Mono" fo:font-size="12pt" fo:font-style="normal" fo:text-shadow="none" style:text-underline-style="none" fo:font-weight="bold" style:letter-kerning="true" style:font-name-asian="Noto Sans CJK SC" style:font-size-asian="12pt" style:font-style-asian="normal" style:font-weight-asian="bold" style:font-name-complex="Noto Sans Devanagari1" style:font-size-complex="12pt" style:font-style-complex="normal" style:font-weight-complex="bold" style:text-emphasize="none" style:font-relief="none" style:text-overline-style="none" style:text-overline-color="font-color"/>
    </style:style>
    <style:style style:name="P72"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Narrow" fo:font-size="12pt"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P73"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Narrow" fo:font-size="12pt"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P7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75" style:family="paragraph">
      <loext:graphic-properties draw:fill="none" draw:fill-color="#729fcf"/>
      <style:paragraph-properties fo:margin-left="0cm" fo:margin-right="0cm" fo:margin-top="0cm" fo:margin-bottom="0cm" fo:line-height="100%" fo:text-align="end"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P77"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P78"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2pt" fo:font-style="italic" fo:text-shadow="none" style:text-underline-style="none" fo:font-weight="normal" style:letter-kerning="true" style:font-name-asian="Noto Sans CJK SC" style:font-size-asian="12pt" style:font-style-asian="italic" style:font-weight-asian="normal" style:font-name-complex="Noto Sans Devanagari1" style:font-size-complex="12pt" style:font-style-complex="italic" style:font-weight-complex="normal" style:text-emphasize="none" style:font-relief="none" style:text-overline-style="none" style:text-overline-color="font-color"/>
    </style:style>
    <style:style style:name="P79"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font-style="italic" fo:text-shadow="none" style:text-underline-style="none" fo:font-weight="normal" style:letter-kerning="true" style:font-name-asian="Noto Sans CJK SC" style:font-size-asian="12pt" style:font-style-asian="italic" style:font-weight-asian="normal" style:font-name-complex="Noto Sans Devanagari1" style:font-size-complex="12pt" style:font-style-complex="italic" style:font-weight-complex="normal" style:text-emphasize="none" style:font-relief="none" style:text-overline-style="none" style:text-overline-color="font-color"/>
    </style:style>
    <style:style style:name="P80" style:family="paragraph">
      <loext:graphic-properties draw:fill="none" draw:fill-color="#729fcf"/>
      <style:paragraph-properties fo:margin-left="0cm" fo:margin-right="0cm" fo:margin-top="0cm" fo:margin-bottom="0cm" fo:line-height="100%" fo:text-align="justify" fo:text-indent="0cm" style:writing-mode="lr-tb"/>
      <style:text-properties fo:font-variant="normal" fo:text-transform="none" style:use-window-font-color="true" loext:opacity="0%" style:text-outline="false" style:text-line-through-style="none" style:text-line-through-type="none" style:font-name="Liberation Sans Narrow" fo:font-size="12pt"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P81"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Mono" fo:font-size="12pt" fo:font-style="italic" fo:text-shadow="none" style:text-underline-style="none" fo:font-weight="normal" style:letter-kerning="true" style:font-name-asian="Noto Sans CJK SC" style:font-size-asian="12pt" style:font-style-asian="italic" style:font-weight-asian="normal" style:font-name-complex="Noto Sans Devanagari1" style:font-size-complex="12pt" style:font-style-complex="italic" style:font-weight-complex="normal" style:text-emphasize="none" style:font-relief="none" style:text-overline-style="none" style:text-overline-color="font-color"/>
    </style:style>
    <style:style style:name="P82"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Mono" fo:font-size="12pt" fo:font-style="italic" fo:text-shadow="none" style:text-underline-style="none" fo:font-weight="normal" style:letter-kerning="true" style:font-name-asian="Noto Sans CJK SC" style:font-size-asian="12pt" style:font-style-asian="italic" style:font-weight-asian="normal" style:font-name-complex="Noto Sans Devanagari1" style:font-size-complex="12pt" style:font-style-complex="italic" style:font-weight-complex="normal" style:text-emphasize="none" style:font-relief="none" style:text-overline-style="none" style:text-overline-color="font-color"/>
    </style:style>
    <style:style style:name="T1" style:family="text">
      <style:text-properties officeooo:rsid="0005e289"/>
    </style:style>
    <style:style style:name="T2" style:family="text">
      <style:text-properties officeooo:rsid="000a2752"/>
    </style:style>
    <style:style style:name="T3" style:family="text">
      <style:text-properties officeooo:rsid="000b4655"/>
    </style:style>
    <style:style style:name="T4" style:family="text">
      <style:text-properties officeooo:rsid="000c7291"/>
    </style:style>
    <style:style style:name="T5" style:family="text">
      <style:text-properties style:font-name="Liberation Mono"/>
    </style:style>
    <style:style style:name="T6" style:family="text">
      <style:text-properties style:font-name="Liberation Mono" fo:font-style="normal" style:font-style-asian="normal" style:font-style-complex="normal"/>
    </style:style>
    <style:style style:name="T7" style:family="text">
      <style:text-properties officeooo:rsid="001499f7"/>
    </style:style>
    <style:style style:name="T8" style:family="text">
      <style:text-properties officeooo:rsid="001a694a"/>
    </style:style>
    <style:style style:name="T9" style:family="text">
      <style:text-properties style:font-name="Liberation Serif" officeooo:rsid="001a694a" style:font-name-asian="Liberation Serif" style:font-name-complex="Liberation Serif"/>
    </style:style>
    <style:style style:name="T10" style:family="text">
      <style:text-properties style:font-name="Liberation Serif" officeooo:rsid="00237921" style:font-name-asian="Liberation Serif" style:font-name-complex="Liberation Serif"/>
    </style:style>
    <style:style style:name="T11" style:family="text">
      <style:text-properties style:font-name="Liberation Serif" officeooo:rsid="00328381" style:font-name-asian="Liberation Serif" style:font-name-complex="Liberation Serif"/>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officeooo:rsid="001e3ebc"/>
    </style:style>
    <style:style style:name="T15" style:family="text">
      <style:text-properties officeooo:rsid="001f528c"/>
    </style:style>
    <style:style style:name="T16" style:family="text">
      <style:text-properties officeooo:rsid="00224dc4"/>
    </style:style>
    <style:style style:name="T17" style:family="text">
      <style:text-properties officeooo:rsid="00227121"/>
    </style:style>
    <style:style style:name="T18" style:family="text">
      <style:text-properties officeooo:rsid="00237921"/>
    </style:style>
    <style:style style:name="T19" style:family="text">
      <style:text-properties officeooo:rsid="002c4010"/>
    </style:style>
    <style:style style:name="T20" style:family="text">
      <style:text-properties officeooo:rsid="002d6124"/>
    </style:style>
    <style:style style:name="T21" style:family="text">
      <style:text-properties officeooo:rsid="00317b44"/>
    </style:style>
    <style:style style:name="T22" style:family="text">
      <style:text-properties officeooo:rsid="00319847"/>
    </style:style>
    <style:style style:name="T23" style:family="text">
      <style:text-properties style:text-position="super 58%"/>
    </style:style>
    <style:style style:name="T24" style:family="text">
      <style:text-properties fo:background-color="#ffff00" loext:char-shading-value="0"/>
    </style:style>
    <style:style style:name="T25" style:family="text">
      <style:text-properties officeooo:rsid="00375e52"/>
    </style:style>
    <style:style style:name="T26" style:family="text">
      <style:text-properties officeooo:rsid="0038e973"/>
    </style:style>
    <style:style style:name="T27" style:family="text">
      <style:text-properties officeooo:rsid="00449465"/>
    </style:style>
    <style:style style:name="T28" style:family="text">
      <style:text-properties officeooo:rsid="0045a115"/>
    </style:style>
    <style:style style:name="T29" style:family="text">
      <style:text-properties officeooo:rsid="0047ddf2"/>
    </style:style>
    <style:style style:name="T30" style:family="text">
      <style:text-properties officeooo:rsid="0049d464"/>
    </style:style>
    <style:style style:name="T31" style:family="text">
      <style:text-properties officeooo:rsid="0052854f"/>
    </style:style>
    <style:style style:name="T32" style:family="text">
      <style:text-properties officeooo:rsid="0055a841"/>
    </style:style>
    <style:style style:name="T33" style:family="text">
      <style:text-properties officeooo:rsid="00572f87"/>
    </style:style>
    <style:style style:name="T34" style:family="text">
      <style:text-properties officeooo:rsid="00599a2c"/>
    </style:style>
    <style:style style:name="T35" style:family="text">
      <style:text-properties officeooo:rsid="005ac9c0"/>
    </style:style>
    <style:style style:name="T36" style:family="text">
      <style:text-properties officeooo:rsid="005c38a9"/>
    </style:style>
    <style:style style:name="T37" style:family="text">
      <style:text-properties officeooo:rsid="0069db53"/>
    </style:style>
    <style:style style:name="T38" style:family="text">
      <style:text-properties officeooo:rsid="006d2dea"/>
    </style:style>
    <style:style style:name="T39" style:family="text">
      <style:text-properties officeooo:rsid="006dddb3"/>
    </style:style>
    <style:style style:name="T40" style:family="text">
      <style:text-properties officeooo:rsid="006e229e"/>
    </style:style>
    <style:style style:name="T41" style:family="text">
      <style:text-properties officeooo:rsid="00700f5b"/>
    </style:style>
    <style:style style:name="T42" style:family="text">
      <style:text-properties officeooo:rsid="00732c21"/>
    </style:style>
    <style:style style:name="T43" style:family="text">
      <style:text-properties officeooo:rsid="0073f30b"/>
    </style:style>
    <style:style style:name="T44" style:family="text">
      <style:text-properties officeooo:rsid="0074b31a"/>
    </style:style>
    <style:style style:name="T45" style:family="text">
      <style:text-properties officeooo:rsid="00769cd0"/>
    </style:style>
    <style:style style:name="T46" style:family="text">
      <style:text-properties officeooo:rsid="00782a20"/>
    </style:style>
    <style:style style:name="T47" style:family="text">
      <style:text-properties officeooo:rsid="007cca2d"/>
    </style:style>
    <style:style style:name="T48" style:family="text">
      <style:text-properties officeooo:rsid="00893079"/>
    </style:style>
    <style:style style:name="T49" style:family="text">
      <style:text-properties officeooo:rsid="008af75b"/>
    </style:style>
    <style:style style:name="T50" style:family="text">
      <style:text-properties officeooo:rsid="009f76ed"/>
    </style:style>
    <style:style style:name="T51" style:family="text">
      <style:text-properties officeooo:rsid="00a19315"/>
    </style:style>
    <style:style style:name="T52" style:family="text">
      <style:text-properties officeooo:rsid="00a35165"/>
    </style:style>
    <style:style style:name="T53" style:family="text">
      <style:text-properties officeooo:rsid="00a4c30a"/>
    </style:style>
    <style:style style:name="T54" style:family="text">
      <style:text-properties officeooo:rsid="00a6b596"/>
    </style:style>
    <style:style style:name="T55" style:family="text">
      <style:text-properties fo:color="#808080" loext:opacity="100%"/>
    </style:style>
    <style:style style:name="T56" style:family="text">
      <style:text-properties officeooo:rsid="00a89235"/>
    </style:style>
    <style:style style:name="T57" style:family="text">
      <style:text-properties officeooo:rsid="00a95ea2"/>
    </style:style>
    <style:style style:name="T58" style:family="text">
      <style:text-properties officeooo:rsid="00ab343b"/>
    </style:style>
    <style:style style:name="T59" style:family="text">
      <style:text-properties officeooo:rsid="00abea25"/>
    </style:style>
    <style:style style:name="T60" style:family="text">
      <style:text-properties officeooo:rsid="00af6e97"/>
    </style:style>
    <style:style style:name="T61" style:family="text">
      <style:text-properties officeooo:rsid="00b070a8"/>
    </style:style>
    <style:style style:name="T62" style:family="text">
      <style:text-properties officeooo:rsid="00ad7385"/>
    </style:style>
    <style:style style:name="T63" style:family="text">
      <style:text-properties officeooo:rsid="00b18ba0"/>
    </style:style>
    <style:style style:name="T64" style:family="text">
      <style:text-properties officeooo:rsid="00b1a4d7"/>
    </style:style>
    <style:style style:name="T65" style:family="text">
      <style:text-properties officeooo:rsid="00b1d62c"/>
    </style:style>
    <style:style style:name="T66" style:family="text">
      <style:text-properties officeooo:rsid="00b349f9"/>
    </style:style>
    <style:style style:name="T67" style:family="text">
      <style:text-properties officeooo:rsid="00b4e36f"/>
    </style:style>
    <style:style style:name="T68" style:family="text">
      <style:text-properties officeooo:rsid="00bb6258"/>
    </style:style>
    <style:style style:name="T69" style:family="text">
      <style:text-properties fo:font-variant="normal" fo:text-transform="none" style:use-window-font-color="true" loext:opacity="0%" style:text-outline="false" style:text-line-through-style="none" style:text-line-through-type="none" style:font-name="Liberation Mono" fo:font-size="12pt" fo:font-style="normal" fo:text-shadow="none" style:text-underline-style="none" fo:font-weight="bold" style:letter-kerning="true" style:font-name-asian="Noto Sans CJK SC" style:font-size-asian="12pt" style:font-style-asian="normal" style:font-weight-asian="bold" style:font-name-complex="Noto Sans Devanagari1" style:font-size-complex="12pt" style:font-style-complex="normal" style:font-weight-complex="bold" style:text-emphasize="none" style:font-relief="none" style:text-overline-style="none" style:text-overline-color="font-color"/>
    </style:style>
    <style:style style:name="T70" style:family="text">
      <style:text-properties fo:font-variant="normal" fo:text-transform="none" style:use-window-font-color="true" loext:opacity="0%" style:text-outline="false" style:text-line-through-style="none" style:text-line-through-type="none" style:font-name="Liberation Sans Narrow" fo:font-size="12pt"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T71"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T72" style:family="text">
      <style:text-properties fo:font-variant="normal" fo:text-transform="none" style:use-window-font-color="true" loext:opacity="0%" style:text-outline="false" style:text-line-through-style="none" style:text-line-through-type="none" style:font-name="Liberation Sans1" fo:font-size="12pt" fo:font-style="italic" fo:text-shadow="none" style:text-underline-style="none" fo:font-weight="normal" style:letter-kerning="true" style:font-name-asian="Noto Sans CJK SC" style:font-size-asian="12pt" style:font-style-asian="italic" style:font-weight-asian="normal" style:font-name-complex="Noto Sans Devanagari1" style:font-size-complex="12pt" style:font-style-complex="italic"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tyle:writing-mode="lr-tb"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914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2.74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206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5" style:family="graphic">
      <style:graphic-properties draw:stroke="solid" svg:stroke-width="0cm" svg:stroke-color="#000000" draw:marker-start="" draw:marker-start-width="0.199cm" draw:marker-start-center="false" draw:marker-end="Linienspitzen_20_21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 style:family="graphic">
      <style:graphic-properties draw:stroke="solid" svg:stroke-width="0cm" svg:stroke-color="#000000" draw:marker-start="" draw:marker-start-width="0.199cm" draw:marker-start-center="false" draw:marker-end="Linienspitzen_20_22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 style:family="graphic">
      <style:graphic-properties draw:stroke="solid" svg:stroke-width="0cm" svg:stroke-color="#000000" draw:marker-start="" draw:marker-start-width="0.199cm" draw:marker-start-center="false" draw:marker-end="Linienspitzen_20_22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56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0"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2.7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1" style:family="graphic">
      <style:graphic-properties draw:stroke="solid" svg:stroke-width="0cm" svg:stroke-color="#000000" draw:marker-start="" draw:marker-start-width="0.199cm" draw:marker-start-center="false" draw:marker-end="Linienspitzen_20_2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 style:family="graphic">
      <style:graphic-properties draw:stroke="solid" svg:stroke-width="0cm" svg:stroke-color="#000000" draw:marker-start="" draw:marker-start-width="0.199cm" draw:marker-start-center="false" draw:marker-end="Linienspitzen_20_22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 style:family="graphic">
      <style:graphic-properties draw:stroke="solid" svg:stroke-width="0cm" svg:stroke-color="#000000" draw:marker-start="" draw:marker-start-width="0.199cm" draw:marker-start-center="false" draw:marker-end="Linienspitzen_20_2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 style:family="graphic">
      <style:graphic-properties draw:stroke="solid" svg:stroke-width="0cm" svg:stroke-color="#000000" draw:marker-start="" draw:marker-start-width="0.199cm" draw:marker-start-center="false" draw:marker-end="Linienspitzen_20_22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 style:family="graphic">
      <style:graphic-properties draw:stroke="solid" svg:stroke-width="0cm" svg:stroke-color="#000000" draw:marker-start="" draw:marker-start-width="0.199cm" draw:marker-start-center="false" draw:marker-end="Linienspitzen_20_22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2.9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7" style:family="graphic">
      <style:graphic-properties draw:stroke="solid" svg:stroke-width="0cm" svg:stroke-color="#000000" draw:marker-start="" draw:marker-start-width="0.199cm" draw:marker-start-center="false" draw:marker-end="Linienspitzen_20_22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 style:family="graphic">
      <style:graphic-properties draw:stroke="solid" svg:stroke-width="0cm" svg:stroke-color="#000000" draw:marker-start="" draw:marker-start-width="0.199cm" draw:marker-start-center="false" draw:marker-end="Linienspitzen_20_22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 style:family="graphic">
      <style:graphic-properties draw:stroke="solid" svg:stroke-width="0cm" svg:stroke-color="#000000" draw:marker-start="" draw:marker-start-width="0.199cm" draw:marker-start-center="false" draw:marker-end="Linienspitzen_20_23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 style:family="graphic">
      <style:graphic-properties draw:stroke="solid" svg:stroke-width="0cm" svg:stroke-color="#000000" draw:marker-start="" draw:marker-start-width="0.199cm" draw:marker-start-center="false" draw:marker-end="Linienspitzen_20_23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 style:family="graphic">
      <style:graphic-properties draw:stroke="solid" svg:stroke-width="0cm" svg:stroke-color="#000000" draw:marker-start="" draw:marker-start-width="0.199cm" draw:marker-start-center="false" draw:marker-end="Linienspitzen_20_23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 style:family="graphic">
      <style:graphic-properties draw:stroke="solid" svg:stroke-width="0cm" svg:stroke-color="#000000" draw:marker-start="" draw:marker-start-width="0.199cm" draw:marker-start-center="false" draw:marker-end="Linienspitzen_20_23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 style:family="graphic">
      <style:graphic-properties draw:stroke="solid" svg:stroke-width="0cm" svg:stroke-color="#000000" draw:marker-start="" draw:marker-start-width="0.199cm" draw:marker-start-center="false" draw:marker-end="Linienspitzen_20_23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 style:family="graphic">
      <style:graphic-properties draw:stroke="solid" svg:stroke-width="0cm" svg:stroke-color="#000000" draw:marker-start="" draw:marker-start-width="0.199cm" draw:marker-start-center="false" draw:marker-end="Linienspitzen_20_23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 style:family="graphic">
      <style:graphic-properties draw:stroke="solid" svg:stroke-width="0cm" svg:stroke-color="#000000" draw:marker-start="" draw:marker-start-width="0.199cm" draw:marker-start-center="false" draw:marker-end="Linienspitzen_20_23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 style:family="graphic">
      <style:graphic-properties draw:stroke="solid" svg:stroke-width="0cm" svg:stroke-color="#000000" draw:marker-start="" draw:marker-start-width="0.199cm" draw:marker-start-center="false" draw:marker-end="Linienspitzen_20_23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1.44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8" style:family="graphic">
      <style:graphic-properties draw:stroke="solid" svg:stroke-width="0cm" svg:stroke-color="#000000" draw:marker-start="" draw:marker-start-width="0.199cm" draw:marker-start-center="false" draw:marker-end="Linienspitzen_20_23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9" style:family="graphic">
      <style:graphic-properties draw:stroke="solid" svg:stroke-width="0cm" svg:stroke-color="#000000" draw:marker-start="" draw:marker-start-width="0.199cm" draw:marker-start-center="false" draw:marker-end="Linienspitzen_20_24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 style:family="graphic">
      <style:graphic-properties draw:stroke="solid" svg:stroke-width="0cm" svg:stroke-color="#000000" draw:marker-start="" draw:marker-start-width="0.199cm" draw:marker-start-center="false" draw:marker-end="Linienspitzen_20_24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 style:family="graphic">
      <style:graphic-properties draw:stroke="solid" svg:stroke-width="0cm" svg:stroke-color="#000000" draw:marker-start="" draw:marker-start-width="0.199cm" draw:marker-start-center="false" draw:marker-end="Linienspitzen_20_24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 style:family="graphic">
      <style:graphic-properties draw:stroke="solid" svg:stroke-width="0cm" svg:stroke-color="#000000" draw:marker-start="" draw:marker-start-width="0.199cm" draw:marker-start-center="false" draw:marker-end="Linienspitzen_20_24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 style:family="graphic">
      <style:graphic-properties draw:stroke="solid" svg:stroke-width="0cm" svg:stroke-color="#000000" draw:marker-start="" draw:marker-start-width="0.199cm" draw:marker-start-center="false" draw:marker-end="Linienspitzen_20_24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56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1.74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6" style:family="graphic">
      <style:graphic-properties draw:stroke="solid" svg:stroke-width="0cm" svg:stroke-color="#000000" draw:marker-start="" draw:marker-start-width="0.199cm" draw:marker-start-center="false" draw:marker-end="Linienspitzen_20_24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7"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1.092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8" style:family="graphic">
      <style:graphic-properties draw:stroke="solid" svg:stroke-width="0cm" svg:stroke-color="#000000" draw:marker-start="" draw:marker-start-width="0.199cm" draw:marker-start-center="false" draw:marker-end="Linienspitzen_20_24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9" style:family="graphic">
      <style:graphic-properties draw:stroke="solid" svg:stroke-width="0cm" svg:stroke-color="#000000" draw:marker-start="" draw:marker-start-width="0.199cm" draw:marker-start-center="false" draw:marker-end="Linienspitzen_20_24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0" style:family="graphic">
      <style:graphic-properties draw:stroke="solid" svg:stroke-width="0cm" svg:stroke-color="#000000" draw:marker-start="" draw:marker-start-width="0.199cm" draw:marker-start-center="false" draw:marker-end="Linienspitzen_20_25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1" style:family="graphic">
      <style:graphic-properties draw:stroke="solid" svg:stroke-width="0cm" svg:stroke-color="#000000" draw:marker-start="" draw:marker-start-width="0.199cm" draw:marker-start-center="false" draw:marker-end="Linienspitzen_20_25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2" style:family="graphic">
      <style:graphic-properties draw:stroke="solid" svg:stroke-width="0cm" svg:stroke-color="#000000" draw:marker-start="" draw:marker-start-width="0.199cm" draw:marker-start-center="false" draw:marker-end="Linienspitzen_20_25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1.4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44" style:family="graphic">
      <style:graphic-properties draw:stroke="solid" svg:stroke-width="0cm" svg:stroke-color="#000000" draw:marker-start="" draw:marker-start-width="0.199cm" draw:marker-start-center="false" draw:marker-end="Linienspitzen_20_2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5" style:family="graphic">
      <style:graphic-properties draw:stroke="solid" svg:stroke-width="0cm" svg:stroke-color="#000000" draw:marker-start="" draw:marker-start-width="0.199cm" draw:marker-start-center="false" draw:marker-end="Linienspitzen_20_25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6" style:family="graphic">
      <style:graphic-properties draw:stroke="solid" svg:stroke-width="0cm" svg:stroke-color="#000000" draw:marker-start="" draw:marker-start-width="0.199cm" draw:marker-start-center="false" draw:marker-end="Linienspitzen_20_2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7" style:family="graphic">
      <style:graphic-properties draw:stroke="solid" svg:stroke-width="0cm" svg:stroke-color="#000000" draw:marker-start="" draw:marker-start-width="0.199cm" draw:marker-start-center="false" draw:marker-end="Linienspitzen_20_25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8" style:family="graphic">
      <style:graphic-properties draw:stroke="solid" svg:stroke-width="0cm" svg:stroke-color="#000000" draw:marker-start="" draw:marker-start-width="0.199cm" draw:marker-start-center="false" draw:marker-end="Linienspitzen_20_25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9" style:family="graphic">
      <style:graphic-properties draw:stroke="solid" svg:stroke-width="0cm" svg:stroke-color="#000000" draw:marker-start="" draw:marker-start-width="0.199cm" draw:marker-start-center="false" draw:marker-end="Linienspitzen_20_25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0" style:family="graphic">
      <style:graphic-properties draw:stroke="solid" svg:stroke-width="0cm" svg:stroke-color="#000000" draw:marker-start="" draw:marker-start-width="0.199cm" draw:marker-start-center="false" draw:marker-end="Linienspitzen_20_25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1" style:family="graphic">
      <style:graphic-properties draw:stroke="solid" svg:stroke-width="0cm" svg:stroke-color="#000000" draw:marker-start="" draw:marker-start-width="0.199cm" draw:marker-start-center="false" draw:marker-end="Linienspitzen_20_2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2" style:family="graphic">
      <style:graphic-properties draw:stroke="solid" svg:stroke-width="0cm" svg:stroke-color="#000000" draw:marker-start="" draw:marker-start-width="0.199cm" draw:marker-start-center="false" draw:marker-end="Linienspitzen_20_26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3" style:family="graphic">
      <style:graphic-properties draw:stroke="solid" svg:stroke-width="0cm" svg:stroke-color="#000000" draw:marker-start="" draw:marker-start-width="0.199cm" draw:marker-start-center="false" draw:marker-end="Linienspitzen_20_26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4"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1.094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5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1.7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56" style:family="graphic">
      <style:graphic-properties draw:stroke="solid" svg:stroke-width="0cm" svg:stroke-color="#000000" draw:marker-start="" draw:marker-start-width="0.199cm" draw:marker-start-center="false" draw:marker-end="Linienspitzen_20_2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7" style:family="graphic">
      <style:graphic-properties draw:stroke="solid" svg:stroke-width="0cm" svg:stroke-color="#000000" draw:marker-start="" draw:marker-start-width="0.199cm" draw:marker-start-center="false" draw:marker-end="Linienspitzen_20_26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8" style:family="graphic">
      <style:graphic-properties draw:stroke="solid" svg:stroke-width="0cm" svg:stroke-color="#000000" draw:marker-start="" draw:marker-start-width="0.199cm" draw:marker-start-center="false" draw:marker-end="Linienspitzen_20_2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9" style:family="graphic">
      <style:graphic-properties draw:stroke="solid" svg:stroke-width="0cm" svg:stroke-color="#000000" draw:marker-start="" draw:marker-start-width="0.199cm" draw:marker-start-center="false" draw:marker-end="Linienspitzen_20_26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0"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1.62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61" style:family="graphic">
      <style:graphic-properties draw:stroke="solid" svg:stroke-width="0cm" svg:stroke-color="#000000" draw:marker-start="" draw:marker-start-width="0.199cm" draw:marker-start-center="false" draw:marker-end="Linienspitzen_20_27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2" style:family="graphic">
      <style:graphic-properties draw:stroke="solid" svg:stroke-width="0cm" svg:stroke-color="#000000" draw:marker-start="" draw:marker-start-width="0.199cm" draw:marker-start-center="false" draw:marker-end="Linienspitzen_20_27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3" style:family="graphic">
      <style:graphic-properties draw:stroke="solid" svg:stroke-width="0cm" svg:stroke-color="#000000" draw:marker-start="" draw:marker-start-width="0.199cm" draw:marker-start-center="false" draw:marker-end="Linienspitzen_20_27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4" style:family="graphic">
      <style:graphic-properties draw:stroke="solid" svg:stroke-width="0cm" svg:stroke-color="#000000" draw:marker-start="" draw:marker-start-width="0.199cm" draw:marker-start-center="false" draw:marker-end="Linienspitzen_20_27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5" style:family="graphic">
      <style:graphic-properties draw:stroke="solid" svg:stroke-width="0cm" svg:stroke-color="#000000" draw:marker-start="" draw:marker-start-width="0.199cm" draw:marker-start-center="false" draw:marker-end="Linienspitzen_20_27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6" style:family="graphic">
      <style:graphic-properties draw:stroke="solid" svg:stroke-width="0cm" svg:stroke-color="#000000" draw:marker-start="" draw:marker-start-width="0.199cm" draw:marker-start-center="false" draw:marker-end="Linienspitzen_20_27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7" style:family="graphic">
      <style:graphic-properties draw:stroke="solid" svg:stroke-width="0cm" svg:stroke-color="#000000" draw:marker-start="" draw:marker-start-width="0.199cm" draw:marker-start-center="false" draw:marker-end="Linienspitzen_20_27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8" style:family="graphic">
      <style:graphic-properties draw:stroke="solid" svg:stroke-width="0cm" svg:stroke-color="#000000" draw:marker-start="" draw:marker-start-width="0.199cm" draw:marker-start-center="false" draw:marker-end="Linienspitzen_20_27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9" style:family="graphic">
      <style:graphic-properties draw:stroke="solid" svg:stroke-width="0cm" svg:stroke-color="#000000" draw:marker-start="" draw:marker-start-width="0.199cm" draw:marker-start-center="false" draw:marker-end="Linienspitzen_20_27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0" style:family="graphic">
      <style:graphic-properties draw:stroke="solid" svg:stroke-width="0cm" svg:stroke-color="#000000" draw:marker-start="" draw:marker-start-width="0.199cm" draw:marker-start-center="false" draw:marker-end="Linienspitzen_20_27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1"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1.61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72" style:family="graphic">
      <style:graphic-properties draw:stroke="solid" svg:stroke-width="0cm" svg:stroke-color="#000000" draw:marker-start="" draw:marker-start-width="0.199cm" draw:marker-start-center="false" draw:marker-end="Linienspitzen_20_28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3" style:family="graphic">
      <style:graphic-properties draw:stroke="solid" svg:stroke-width="0cm" svg:stroke-color="#000000" draw:marker-start="" draw:marker-start-width="0.199cm" draw:marker-start-center="false" draw:marker-end="Linienspitzen_20_28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4" style:family="graphic">
      <style:graphic-properties draw:stroke="solid" svg:stroke-width="0cm" svg:stroke-color="#000000" draw:marker-start="" draw:marker-start-width="0.199cm" draw:marker-start-center="false" draw:marker-end="Linienspitzen_20_28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5" style:family="graphic">
      <style:graphic-properties draw:stroke="solid" svg:stroke-width="0cm" svg:stroke-color="#000000" draw:marker-start="" draw:marker-start-width="0.199cm" draw:marker-start-center="false" draw:marker-end="Linienspitzen_20_28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6" style:family="graphic">
      <style:graphic-properties draw:stroke="solid" svg:stroke-width="0cm" svg:stroke-color="#000000" draw:marker-start="" draw:marker-start-width="0.199cm" draw:marker-start-center="false" draw:marker-end="Linienspitzen_20_28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7" style:family="graphic">
      <style:graphic-properties draw:stroke="solid" svg:stroke-width="0cm" svg:stroke-color="#000000" draw:marker-start="" draw:marker-start-width="0.199cm" draw:marker-start-center="false" draw:marker-end="Linienspitzen_20_28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8" style:family="graphic">
      <style:graphic-properties draw:stroke="solid" svg:stroke-width="0cm" svg:stroke-color="#000000" draw:marker-start="" draw:marker-start-width="0.199cm" draw:marker-start-center="false" draw:marker-end="Linienspitzen_20_28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9" style:family="graphic">
      <style:graphic-properties draw:stroke="solid" svg:stroke-width="0cm" svg:stroke-color="#000000" draw:marker-start="" draw:marker-start-width="0.199cm" draw:marker-start-center="false" draw:marker-end="Linienspitzen_20_28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0" style:family="graphic">
      <style:graphic-properties draw:stroke="solid" svg:stroke-width="0cm" svg:stroke-color="#000000" draw:marker-start="" draw:marker-start-width="0.199cm" draw:marker-start-center="false" draw:marker-end="Linienspitzen_20_28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1" style:family="graphic">
      <style:graphic-properties draw:stroke="solid" svg:stroke-width="0cm" svg:stroke-color="#000000" draw:marker-start="" draw:marker-start-width="0.199cm" draw:marker-start-center="false" draw:marker-end="Linienspitzen_20_28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2" style:family="graphic">
      <style:graphic-properties draw:stroke="solid" svg:stroke-width="0cm" svg:stroke-color="#000000" draw:marker-start="" draw:marker-start-width="0.199cm" draw:marker-start-center="false" draw:marker-end="Linienspitzen_20_29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3" style:family="graphic">
      <style:graphic-properties draw:stroke="solid" svg:stroke-width="0cm" svg:stroke-color="#000000" draw:marker-start="" draw:marker-start-width="0.199cm" draw:marker-start-center="false" draw:marker-end="Linienspitzen_20_29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4" style:family="graphic">
      <style:graphic-properties draw:stroke="solid" svg:stroke-width="0cm" svg:stroke-color="#000000" draw:marker-start="" draw:marker-start-width="0.199cm" draw:marker-start-center="false" draw:marker-end="Linienspitzen_20_29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5" style:family="graphic">
      <style:graphic-properties draw:stroke="solid" svg:stroke-width="0cm" svg:stroke-color="#000000" draw:marker-start="" draw:marker-start-width="0.199cm" draw:marker-start-center="false" draw:marker-end="Linienspitzen_20_29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6" style:family="graphic">
      <style:graphic-properties draw:stroke="solid" svg:stroke-width="0cm" svg:stroke-color="#000000" draw:marker-start="" draw:marker-start-width="0.199cm" draw:marker-start-center="false" draw:marker-end="Linienspitzen_20_29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7" style:family="graphic">
      <style:graphic-properties draw:stroke="solid" svg:stroke-width="0cm" svg:stroke-color="#000000" draw:marker-start="" draw:marker-start-width="0.199cm" draw:marker-start-center="false" draw:marker-end="Linienspitzen_20_29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8" style:family="graphic">
      <style:graphic-properties draw:stroke="solid" svg:stroke-width="0cm" svg:stroke-color="#000000" draw:marker-start="" draw:marker-start-width="0.199cm" draw:marker-start-center="false" draw:marker-end="Linienspitzen_20_29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9"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48cm" fo:min-width="2.7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90"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1.79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91" style:family="graphic">
      <style:graphic-properties draw:stroke="solid" svg:stroke-width="0cm" svg:stroke-color="#000000" draw:marker-start="" draw:marker-start-width="0.199cm" draw:marker-start-center="false" draw:marker-end="Linienspitzen_20_4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2" style:family="graphic">
      <style:graphic-properties draw:stroke="solid" svg:stroke-width="0cm" svg:stroke-color="#000000" draw:marker-start="" draw:marker-start-width="0.199cm" draw:marker-start-center="false" draw:marker-end="Linienspitzen_20_4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3" style:family="graphic">
      <style:graphic-properties draw:stroke="solid" svg:stroke-width="0cm" svg:stroke-color="#000000" draw:marker-start="" draw:marker-start-width="0.199cm" draw:marker-start-center="false" draw:marker-end="Linienspitzen_20_4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4" style:family="graphic">
      <style:graphic-properties draw:stroke="solid" svg:stroke-width="0cm" svg:stroke-color="#000000" draw:marker-start="" draw:marker-start-width="0.199cm" draw:marker-start-center="false" draw:marker-end="Linienspitzen_20_4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5" style:family="graphic">
      <style:graphic-properties draw:stroke="solid" svg:stroke-width="0cm" svg:stroke-color="#000000" draw:marker-start="" draw:marker-start-width="0.199cm" draw:marker-start-center="false" draw:marker-end="Linienspitzen_20_5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6" style:family="graphic">
      <style:graphic-properties draw:stroke="solid" svg:stroke-width="0cm" svg:stroke-color="#000000" draw:marker-start="" draw:marker-start-width="0.199cm" draw:marker-start-center="false" draw:marker-end="Linienspitzen_20_5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7" style:family="graphic">
      <style:graphic-properties draw:stroke="solid" svg:stroke-width="0cm" svg:stroke-color="#000000" draw:marker-start="" draw:marker-start-width="0.199cm" draw:marker-start-center="false" draw:marker-end="Linienspitzen_20_5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8" style:family="graphic">
      <style:graphic-properties draw:stroke="solid" svg:stroke-width="0cm" svg:stroke-color="#000000" draw:marker-start="" draw:marker-start-width="0.199cm" draw:marker-start-center="false" draw:marker-end="Linienspitzen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9" style:family="graphic">
      <style:graphic-properties draw:stroke="solid" svg:stroke-width="0cm" svg:stroke-color="#000000" draw:marker-start="" draw:marker-start-width="0.199cm" draw:marker-start-center="false" draw:marker-end="Linienspitzen_20_5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0" style:family="graphic">
      <style:graphic-properties draw:stroke="solid" svg:stroke-width="0cm" svg:stroke-color="#000000" draw:marker-start="" draw:marker-start-width="0.199cm" draw:marker-start-center="false" draw:marker-end="Linienspitzen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1" style:family="graphic">
      <style:graphic-properties draw:stroke="solid" svg:stroke-width="0cm" svg:stroke-color="#000000" draw:marker-start="" draw:marker-start-width="0.199cm" draw:marker-start-center="false" draw:marker-end="Linienspitzen_20_5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5cm" fo:min-width="0.206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03" style:family="graphic">
      <style:graphic-properties draw:stroke="solid" svg:stroke-width="0cm" svg:stroke-color="#000000" draw:marker-start="" draw:marker-start-width="0.199cm" draw:marker-start-center="false" draw:marker-end="Linienspitzen_20_2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4" style:family="graphic">
      <style:graphic-properties draw:stroke="solid" svg:stroke-width="0cm" svg:stroke-color="#000000" draw:marker-start="" draw:marker-start-width="0.199cm" draw:marker-start-center="false" draw:marker-end="Linienspitzen_20_3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5" style:family="graphic">
      <style:graphic-properties draw:stroke="solid" svg:stroke-width="0cm" svg:stroke-color="#000000" draw:marker-start="" draw:marker-start-width="0.199cm" draw:marker-start-center="false" draw:marker-end="Linienspitzen_20_3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6" style:family="graphic">
      <style:graphic-properties draw:stroke="solid" svg:stroke-width="0cm" svg:stroke-color="#000000" draw:marker-start="" draw:marker-start-width="0.199cm" draw:marker-start-center="false" draw:marker-end="Linienspitzen_20_3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7" style:family="graphic">
      <style:graphic-properties draw:stroke="solid" svg:stroke-width="0cm" svg:stroke-color="#000000" draw:marker-start="" draw:marker-start-width="0.199cm" draw:marker-start-center="false" draw:marker-end="Linienspitzen_20_3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8" style:family="graphic">
      <style:graphic-properties draw:stroke="solid" svg:stroke-width="0cm" svg:stroke-color="#000000" draw:marker-start="" draw:marker-start-width="0.199cm" draw:marker-start-center="false" draw:marker-end="Linienspitzen_20_34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9" style:family="graphic">
      <style:graphic-properties draw:stroke="solid" svg:stroke-width="0cm" svg:stroke-color="#000000" draw:marker-start="" draw:marker-start-width="0.199cm" draw:marker-start-center="false" draw:marker-end="Linienspitzen_20_34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0" style:family="graphic">
      <style:graphic-properties draw:stroke="solid" svg:stroke-width="0cm" svg:stroke-color="#000000" draw:marker-start="" draw:marker-start-width="0.199cm" draw:marker-start-center="false" draw:marker-end="Linienspitzen_20_34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1" style:family="graphic">
      <style:graphic-properties draw:stroke="solid" svg:stroke-width="0cm" svg:stroke-color="#000000" draw:marker-start="" draw:marker-start-width="0.199cm" draw:marker-start-center="false" draw:marker-end="Linienspitzen_20_34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5cm" fo:min-width="1.79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1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48cm" fo:min-width="1.74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14" style:family="graphic">
      <style:graphic-properties draw:stroke="solid" svg:stroke-width="0cm" svg:stroke-color="#000000" draw:marker-start="" draw:marker-start-width="0.199cm" draw:marker-start-center="false" draw:marker-end="Linienspitzen_20_33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48cm" fo:min-width="1.4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16" style:family="graphic">
      <style:graphic-properties draw:stroke="solid" svg:stroke-width="0cm" svg:stroke-color="#000000" draw:marker-start="" draw:marker-start-width="0.199cm" draw:marker-start-center="false" draw:marker-end="Linienspitzen_20_33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7" style:family="graphic">
      <style:graphic-properties draw:stroke="solid" svg:stroke-width="0cm" svg:stroke-color="#000000" draw:marker-start="" draw:marker-start-width="0.199cm" draw:marker-start-center="false" draw:marker-end="Linienspitzen_20_33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8" style:family="graphic">
      <style:graphic-properties draw:stroke="solid" svg:stroke-width="0cm" svg:stroke-color="#000000" draw:marker-start="" draw:marker-start-width="0.199cm" draw:marker-start-center="false" draw:marker-end="Linienspitzen_20_33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9" style:family="graphic">
      <style:graphic-properties draw:stroke="solid" svg:stroke-width="0cm" svg:stroke-color="#000000" draw:marker-start="" draw:marker-start-width="0.199cm" draw:marker-start-center="false" draw:marker-end="Linienspitzen_20_33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0" style:family="graphic">
      <style:graphic-properties draw:stroke="solid" svg:stroke-width="0cm" svg:stroke-color="#000000" draw:marker-start="" draw:marker-start-width="0.199cm" draw:marker-start-center="false" draw:marker-end="Linienspitzen_20_34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1" style:family="graphic">
      <style:graphic-properties draw:stroke="solid" svg:stroke-width="0cm" svg:stroke-color="#000000" draw:marker-start="" draw:marker-start-width="0.199cm" draw:marker-start-center="false" draw:marker-end="Linienspitzen_20_34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5cm" fo:min-width="1.446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2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20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24" style:family="graphic">
      <style:graphic-properties draw:stroke="solid" svg:stroke-width="0cm" svg:stroke-color="#000000" draw:marker-start="" draw:marker-start-width="0.199cm" draw:marker-start-center="false" draw:marker-end="Linienspitzen_20_30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5" style:family="graphic">
      <style:graphic-properties draw:stroke="solid" svg:stroke-width="0cm" svg:stroke-color="#000000" draw:marker-start="" draw:marker-start-width="0.199cm" draw:marker-start-center="false" draw:marker-end="Linienspitzen_20_30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6" style:family="graphic">
      <style:graphic-properties draw:stroke="solid" svg:stroke-width="0cm" svg:stroke-color="#000000" draw:marker-start="" draw:marker-start-width="0.199cm" draw:marker-start-center="false" draw:marker-end="Linienspitzen_20_30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7" style:family="graphic">
      <style:graphic-properties draw:stroke="solid" svg:stroke-width="0cm" svg:stroke-color="#000000" draw:marker-start="" draw:marker-start-width="0.199cm" draw:marker-start-center="false" draw:marker-end="Linienspitzen_20_30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8" style:family="graphic">
      <style:graphic-properties draw:stroke="solid" svg:stroke-width="0cm" svg:stroke-color="#000000" draw:marker-start="" draw:marker-start-width="0.199cm" draw:marker-start-center="false" draw:marker-end="Linienspitzen_20_30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9" style:family="graphic">
      <style:graphic-properties draw:stroke="solid" svg:stroke-width="0cm" svg:stroke-color="#000000" draw:marker-start="" draw:marker-start-width="0.199cm" draw:marker-start-center="false" draw:marker-end="Linienspitzen_20_30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0"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1.446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31" style:family="graphic">
      <style:graphic-properties draw:stroke="solid" svg:stroke-width="0cm" svg:stroke-color="#000000" draw:marker-start="" draw:marker-start-width="0.199cm" draw:marker-start-center="false" draw:marker-end="Linienspitzen_20_30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2" style:family="graphic">
      <style:graphic-properties draw:stroke="solid" svg:stroke-width="0cm" svg:stroke-color="#000000" draw:marker-start="" draw:marker-start-width="0.199cm" draw:marker-start-center="false" draw:marker-end="Linienspitzen_20_30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3" style:family="graphic">
      <style:graphic-properties draw:stroke="solid" svg:stroke-width="0cm" svg:stroke-color="#000000" draw:marker-start="" draw:marker-start-width="0.199cm" draw:marker-start-center="false" draw:marker-end="Linienspitzen_20_30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4" style:family="graphic">
      <style:graphic-properties draw:stroke="solid" svg:stroke-width="0cm" svg:stroke-color="#000000" draw:marker-start="" draw:marker-start-width="0.199cm" draw:marker-start-center="false" draw:marker-end="Linienspitzen_20_30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5" style:family="graphic">
      <style:graphic-properties draw:stroke="solid" svg:stroke-width="0cm" svg:stroke-color="#000000" draw:marker-start="" draw:marker-start-width="0.199cm" draw:marker-start-center="false" draw:marker-end="Linienspitzen_20_3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6" style:family="graphic">
      <style:graphic-properties draw:stroke="solid" svg:stroke-width="0cm" svg:stroke-color="#000000" draw:marker-start="" draw:marker-start-width="0.199cm" draw:marker-start-center="false" draw:marker-end="Linienspitzen_20_31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7" style:family="graphic">
      <style:graphic-properties draw:stroke="solid" svg:stroke-width="0cm" svg:stroke-color="#000000" draw:marker-start="" draw:marker-start-width="0.199cm" draw:marker-start-center="false" draw:marker-end="Linienspitzen_20_3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8" style:family="graphic">
      <style:graphic-properties draw:stroke="solid" svg:stroke-width="0cm" svg:stroke-color="#000000" draw:marker-start="" draw:marker-start-width="0.199cm" draw:marker-start-center="false" draw:marker-end="Linienspitzen_20_3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9" style:family="graphic">
      <style:graphic-properties draw:stroke="solid" svg:stroke-width="0cm" svg:stroke-color="#000000" draw:marker-start="" draw:marker-start-width="0.199cm" draw:marker-start-center="false" draw:marker-end="Linienspitzen_20_3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0" style:family="graphic">
      <style:graphic-properties draw:stroke="solid" svg:stroke-width="0cm" svg:stroke-color="#000000" draw:marker-start="" draw:marker-start-width="0.199cm" draw:marker-start-center="false" draw:marker-end="Linienspitzen_20_31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1" style:family="graphic">
      <style:graphic-properties draw:stroke="solid" svg:stroke-width="0cm" svg:stroke-color="#000000" draw:marker-start="" draw:marker-start-width="0.199cm" draw:marker-start-center="false" draw:marker-end="Linienspitzen_20_31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2" style:family="graphic">
      <style:graphic-properties draw:stroke="solid" svg:stroke-width="0cm" svg:stroke-color="#000000" draw:marker-start="" draw:marker-start-width="0.199cm" draw:marker-start-center="false" draw:marker-end="Linienspitzen_20_31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3" style:family="graphic">
      <style:graphic-properties draw:stroke="solid" svg:stroke-width="0cm" svg:stroke-color="#000000" draw:marker-start="" draw:marker-start-width="0.199cm" draw:marker-start-center="false" draw:marker-end="Linienspitzen_20_31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4"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2.32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4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2.24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46" style:family="graphic">
      <style:graphic-properties draw:stroke="solid" svg:stroke-width="0cm" svg:stroke-color="#000000" draw:marker-start="" draw:marker-start-width="0.199cm" draw:marker-start-center="false" draw:marker-end="Linienspitzen_20_32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7" style:family="graphic">
      <style:graphic-properties draw:stroke="solid" svg:stroke-width="0cm" svg:stroke-color="#000000" draw:marker-start="" draw:marker-start-width="0.199cm" draw:marker-start-center="false" draw:marker-end="Linienspitzen_20_32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8" style:family="graphic">
      <style:graphic-properties draw:stroke="solid" svg:stroke-width="0cm" svg:stroke-color="#000000" draw:marker-start="" draw:marker-start-width="0.199cm" draw:marker-start-center="false" draw:marker-end="Linienspitzen_20_3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9" style:family="graphic">
      <style:graphic-properties draw:stroke="solid" svg:stroke-width="0cm" svg:stroke-color="#000000" draw:marker-start="" draw:marker-start-width="0.199cm" draw:marker-start-center="false" draw:marker-end="Linienspitzen_20_32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0" style:family="graphic">
      <style:graphic-properties draw:stroke="solid" svg:stroke-width="0cm" svg:stroke-color="#000000" draw:marker-start="" draw:marker-start-width="0.199cm" draw:marker-start-center="false" draw:marker-end="Linienspitzen_20_3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1" style:family="graphic">
      <style:graphic-properties draw:stroke="solid" svg:stroke-width="0cm" svg:stroke-color="#000000" draw:marker-start="" draw:marker-start-width="0.199cm" draw:marker-start-center="false" draw:marker-end="Linienspitzen_20_3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2" style:family="graphic">
      <style:graphic-properties draw:stroke="solid" svg:stroke-width="0cm" svg:stroke-color="#000000" draw:marker-start="" draw:marker-start-width="0.199cm" draw:marker-start-center="false" draw:marker-end="Linienspitzen_20_32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3" style:family="graphic">
      <style:graphic-properties draw:stroke="solid" svg:stroke-width="0cm" svg:stroke-color="#000000" draw:marker-start="" draw:marker-start-width="0.199cm" draw:marker-start-center="false" draw:marker-end="Linienspitzen_20_32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4" style:family="graphic">
      <style:graphic-properties draw:stroke="solid" svg:stroke-width="0cm" svg:stroke-color="#000000" draw:marker-start="" draw:marker-start-width="0.199cm" draw:marker-start-center="false" draw:marker-end="Linienspitzen_20_32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5" style:family="graphic">
      <style:graphic-properties draw:stroke="solid" svg:stroke-width="0cm" svg:stroke-color="#000000" draw:marker-start="" draw:marker-start-width="0.199cm" draw:marker-start-center="false" draw:marker-end="Linienspitzen_20_33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6" style:family="graphic">
      <style:graphic-properties draw:stroke="solid" svg:stroke-width="0cm" svg:stroke-color="#000000" draw:marker-start="" draw:marker-start-width="0.199cm" draw:marker-start-center="false" draw:marker-end="Linienspitzen_20_33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7" style:family="graphic">
      <style:graphic-properties draw:stroke="solid" svg:stroke-width="0cm" svg:stroke-color="#000000" draw:marker-start="" draw:marker-start-width="0.199cm" draw:marker-start-center="false" draw:marker-end="Linienspitzen_20_33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8" style:family="graphic">
      <style:graphic-properties draw:stroke="solid" svg:stroke-width="0cm" svg:stroke-color="#000000" draw:marker-start="" draw:marker-start-width="0.199cm" draw:marker-start-center="false" draw:marker-end="Linienspitzen_20_33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9"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1.99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60" style:family="graphic">
      <style:graphic-properties draw:stroke="solid" svg:stroke-width="0cm" svg:stroke-color="#000000" draw:marker-start="" draw:marker-start-width="0.199cm" draw:marker-start-center="false" draw:marker-end="Linienspitzen_20_20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1" style:family="graphic">
      <style:graphic-properties draw:stroke="solid" svg:stroke-width="0cm" svg:stroke-color="#000000" draw:marker-start="" draw:marker-start-width="0.199cm" draw:marker-start-center="false" draw:marker-end="Linienspitzen_20_20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2" style:family="graphic">
      <style:graphic-properties draw:stroke="solid" svg:stroke-width="0cm" svg:stroke-color="#000000" draw:marker-start="" draw:marker-start-width="0.199cm" draw:marker-start-center="false" draw:marker-end="Linienspitzen_20_20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3" style:family="graphic">
      <style:graphic-properties draw:stroke="solid" svg:stroke-width="0cm" svg:stroke-color="#000000" draw:marker-start="" draw:marker-start-width="0.199cm" draw:marker-start-center="false" draw:marker-end="Linienspitzen_20_20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4" style:family="graphic">
      <style:graphic-properties draw:stroke="solid" svg:stroke-width="0cm" svg:stroke-color="#000000" draw:marker-start="" draw:marker-start-width="0.199cm" draw:marker-start-center="false" draw:marker-end="Linienspitzen_20_2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5" style:family="graphic">
      <style:graphic-properties draw:stroke="solid" svg:stroke-width="0cm" svg:stroke-color="#000000" draw:marker-start="" draw:marker-start-width="0.199cm" draw:marker-start-center="false" draw:marker-end="Linienspitzen_20_21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6" style:family="graphic">
      <style:graphic-properties draw:stroke="solid" svg:stroke-width="0cm" svg:stroke-color="#000000" draw:marker-start="" draw:marker-start-width="0.199cm" draw:marker-start-center="false" draw:marker-end="Linienspitzen_20_2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7" style:family="graphic">
      <style:graphic-properties draw:stroke="solid" svg:stroke-width="0cm" svg:stroke-color="#000000" draw:marker-start="" draw:marker-start-width="0.199cm" draw:marker-start-center="false" draw:marker-end="Linienspitzen_20_2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8" style:family="graphic">
      <style:graphic-properties draw:stroke="solid" svg:stroke-width="0cm" svg:stroke-color="#000000" draw:marker-start="" draw:marker-start-width="0.199cm" draw:marker-start-center="false" draw:marker-end="Linienspitzen_20_2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9" style:family="graphic">
      <style:graphic-properties draw:stroke="solid" svg:stroke-width="0cm" svg:stroke-color="#000000" draw:marker-start="" draw:marker-start-width="0.199cm" draw:marker-start-center="false" draw:marker-end="Linienspitzen_20_2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0" style:family="graphic">
      <style:graphic-properties draw:stroke="solid" svg:stroke-width="0cm" svg:stroke-color="#000000" draw:marker-start="" draw:marker-start-width="0.199cm" draw:marker-start-center="false" draw:marker-end="Linienspitzen_20_21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1" style:family="graphic">
      <style:graphic-properties draw:stroke="solid" svg:stroke-width="0cm" svg:stroke-color="#000000" draw:marker-start="" draw:marker-start-width="0.199cm" draw:marker-start-center="false" draw:marker-end="Linienspitzen_20_21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2" style:family="graphic">
      <style:graphic-properties draw:stroke="solid" svg:stroke-width="0cm" svg:stroke-color="#000000" draw:marker-start="" draw:marker-start-width="0.199cm" draw:marker-start-center="false" draw:marker-end="Linienspitzen_20_21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48cm" fo:min-width="2.9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74"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2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7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564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76"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77" style:family="graphic">
      <style:graphic-properties draw:stroke="solid" svg:stroke-width="0cm" svg:stroke-color="#000000" draw:marker-start="" draw:marker-start-width="0.199cm" draw:marker-start-center="false" draw:marker-end="Linienspitzen_20_18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8" style:family="graphic">
      <style:graphic-properties draw:stroke="solid" svg:stroke-width="0cm" svg:stroke-color="#000000" draw:marker-start="" draw:marker-start-width="0.199cm" draw:marker-start-center="false" draw:marker-end="Linienspitzen_20_18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9" style:family="graphic">
      <style:graphic-properties draw:stroke="solid" svg:stroke-width="0cm" svg:stroke-color="#000000" draw:marker-start="" draw:marker-start-width="0.199cm" draw:marker-start-center="false" draw:marker-end="Linienspitzen_20_19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0" style:family="graphic">
      <style:graphic-properties draw:stroke="solid" svg:stroke-width="0cm" svg:stroke-color="#000000" draw:marker-start="" draw:marker-start-width="0.199cm" draw:marker-start-center="false" draw:marker-end="Linienspitzen_20_19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1" style:family="graphic">
      <style:graphic-properties draw:stroke="solid" svg:stroke-width="0cm" svg:stroke-color="#000000" draw:marker-start="" draw:marker-start-width="0.199cm" draw:marker-start-center="false" draw:marker-end="Linienspitzen_20_19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2" style:family="graphic">
      <style:graphic-properties draw:stroke="solid" svg:stroke-width="0cm" svg:stroke-color="#000000" draw:marker-start="" draw:marker-start-width="0.199cm" draw:marker-start-center="false" draw:marker-end="Linienspitzen_20_19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3" style:family="graphic">
      <style:graphic-properties draw:stroke="solid" svg:stroke-width="0cm" svg:stroke-color="#000000" draw:marker-start="" draw:marker-start-width="0.199cm" draw:marker-start-center="false" draw:marker-end="Linienspitzen_20_19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4" style:family="graphic">
      <style:graphic-properties draw:stroke="solid" svg:stroke-width="0cm" svg:stroke-color="#000000" draw:marker-start="" draw:marker-start-width="0.199cm" draw:marker-start-center="false" draw:marker-end="Linienspitzen_20_19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5" style:family="graphic">
      <style:graphic-properties draw:stroke="solid" svg:stroke-width="0cm" svg:stroke-color="#000000" draw:marker-start="" draw:marker-start-width="0.199cm" draw:marker-start-center="false" draw:marker-end="Linienspitzen_20_19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6" style:family="graphic">
      <style:graphic-properties draw:stroke="solid" svg:stroke-width="0cm" svg:stroke-color="#000000" draw:marker-start="" draw:marker-start-width="0.199cm" draw:marker-start-center="false" draw:marker-end="Linienspitzen_20_19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7" style:family="graphic">
      <style:graphic-properties draw:stroke="solid" svg:stroke-width="0cm" svg:stroke-color="#000000" draw:marker-start="" draw:marker-start-width="0.199cm" draw:marker-start-center="false" draw:marker-end="Linienspitzen_20_19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8" style:family="graphic">
      <style:graphic-properties draw:stroke="solid" svg:stroke-width="0cm" svg:stroke-color="#000000" draw:marker-start="" draw:marker-start-width="0.199cm" draw:marker-start-center="false" draw:marker-end="Linienspitzen_20_19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9" style:family="graphic">
      <style:graphic-properties draw:stroke="solid" svg:stroke-width="0cm" svg:stroke-color="#000000" draw:marker-start="" draw:marker-start-width="0.199cm" draw:marker-start-center="false" draw:marker-end="Linienspitzen_20_20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0" style:family="graphic">
      <style:graphic-properties draw:stroke="solid" svg:stroke-width="0cm" svg:stroke-color="#000000" draw:marker-start="" draw:marker-start-width="0.199cm" draw:marker-start-center="false" draw:marker-end="Linienspitzen_20_20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1" style:family="graphic">
      <style:graphic-properties draw:stroke="solid" svg:stroke-width="0cm" svg:stroke-color="#000000" draw:marker-start="" draw:marker-start-width="0.199cm" draw:marker-start-center="false" draw:marker-end="Linienspitzen_20_20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2" style:family="graphic">
      <style:graphic-properties draw:stroke="solid" svg:stroke-width="0cm" svg:stroke-color="#000000" draw:marker-start="" draw:marker-start-width="0.199cm" draw:marker-start-center="false" draw:marker-end="Linienspitzen_20_20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3" style:family="graphic">
      <style:graphic-properties draw:stroke="solid" svg:stroke-width="0cm" svg:stroke-color="#000000" draw:marker-start="" draw:marker-start-width="0.199cm" draw:marker-start-center="false" draw:marker-end="Linienspitzen_20_20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4"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62cm" fo:min-width="0.2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9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64cm" fo:min-width="0.2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96"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64cm" fo:min-width="2.00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97"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64cm" fo:min-width="0.21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98"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64cm" fo:min-width="0.91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99" style:family="graphic">
      <style:graphic-properties draw:stroke="solid" svg:stroke-width="0cm" svg:stroke-color="#000000" draw:marker-start="" draw:marker-start-width="0.199cm" draw:marker-start-center="false" draw:marker-end="Linienspitzen_20_17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0" style:family="graphic">
      <style:graphic-properties draw:stroke="solid" svg:stroke-width="0cm" svg:stroke-color="#000000" draw:marker-start="" draw:marker-start-width="0.199cm" draw:marker-start-center="false" draw:marker-end="Linienspitzen_20_17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1" style:family="graphic">
      <style:graphic-properties draw:stroke="solid" svg:stroke-width="0cm" svg:stroke-color="#000000" draw:marker-start="" draw:marker-start-width="0.199cm" draw:marker-start-center="false" draw:marker-end="Linienspitzen_20_17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2" style:family="graphic">
      <style:graphic-properties draw:stroke="solid" svg:stroke-width="0cm" svg:stroke-color="#000000" draw:marker-start="" draw:marker-start-width="0.199cm" draw:marker-start-center="false" draw:marker-end="Linienspitzen_20_17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3" style:family="graphic">
      <style:graphic-properties draw:stroke="solid" svg:stroke-width="0cm" svg:stroke-color="#000000" draw:marker-start="" draw:marker-start-width="0.199cm" draw:marker-start-center="false" draw:marker-end="Linienspitzen_20_18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4" style:family="graphic">
      <style:graphic-properties draw:stroke="solid" svg:stroke-width="0cm" svg:stroke-color="#000000" draw:marker-start="" draw:marker-start-width="0.199cm" draw:marker-start-center="false" draw:marker-end="Linienspitzen_20_18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5" style:family="graphic">
      <style:graphic-properties draw:stroke="solid" svg:stroke-width="0cm" svg:stroke-color="#000000" draw:marker-start="" draw:marker-start-width="0.199cm" draw:marker-start-center="false" draw:marker-end="Linienspitzen_20_18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6" style:family="graphic">
      <style:graphic-properties draw:stroke="solid" svg:stroke-width="0cm" svg:stroke-color="#000000" draw:marker-start="" draw:marker-start-width="0.199cm" draw:marker-start-center="false" draw:marker-end="Linienspitzen_20_18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7" style:family="graphic">
      <style:graphic-properties draw:stroke="solid" svg:stroke-width="0cm" svg:stroke-color="#000000" draw:marker-start="" draw:marker-start-width="0.199cm" draw:marker-start-center="false" draw:marker-end="Linienspitzen_20_18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8" style:family="graphic">
      <style:graphic-properties draw:stroke="solid" svg:stroke-width="0cm" svg:stroke-color="#000000" draw:marker-start="" draw:marker-start-width="0.199cm" draw:marker-start-center="false" draw:marker-end="Linienspitzen_20_18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9" style:family="graphic">
      <style:graphic-properties draw:stroke="solid" svg:stroke-width="0cm" svg:stroke-color="#000000" draw:marker-start="" draw:marker-start-width="0.199cm" draw:marker-start-center="false" draw:marker-end="Linienspitzen_20_18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0" style:family="graphic">
      <style:graphic-properties draw:stroke="solid" svg:stroke-width="0cm" svg:stroke-color="#000000" draw:marker-start="" draw:marker-start-width="0.199cm" draw:marker-start-center="false" draw:marker-end="Linienspitzen_20_18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1"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2.002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1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20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13" style:family="graphic">
      <style:graphic-properties draw:stroke="solid" svg:stroke-width="0cm" svg:stroke-color="#000000" draw:marker-start="" draw:marker-start-width="0.199cm" draw:marker-start-center="false" draw:marker-end="Linienspitzen_20_16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4" style:family="graphic">
      <style:graphic-properties draw:stroke="solid" svg:stroke-width="0cm" svg:stroke-color="#000000" draw:marker-start="" draw:marker-start-width="0.199cm" draw:marker-start-center="false" draw:marker-end="Linienspitzen_20_1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5" style:family="graphic">
      <style:graphic-properties draw:stroke="solid" svg:stroke-width="0cm" svg:stroke-color="#000000" draw:marker-start="" draw:marker-start-width="0.199cm" draw:marker-start-center="false" draw:marker-end="Linienspitzen_20_16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6" style:family="graphic">
      <style:graphic-properties draw:stroke="solid" svg:stroke-width="0cm" svg:stroke-color="#000000" draw:marker-start="" draw:marker-start-width="0.199cm" draw:marker-start-center="false" draw:marker-end="Linienspitzen_20_16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7" style:family="graphic">
      <style:graphic-properties draw:stroke="solid" svg:stroke-width="0cm" svg:stroke-color="#000000" draw:marker-start="" draw:marker-start-width="0.199cm" draw:marker-start-center="false" draw:marker-end="Linienspitzen_20_16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8" style:family="graphic">
      <style:graphic-properties draw:stroke="solid" svg:stroke-width="0cm" svg:stroke-color="#000000" draw:marker-start="" draw:marker-start-width="0.199cm" draw:marker-start-center="false" draw:marker-end="Linienspitzen_20_1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9" style:family="graphic">
      <style:graphic-properties draw:stroke="solid" svg:stroke-width="0cm" svg:stroke-color="#000000" draw:marker-start="" draw:marker-start-width="0.199cm" draw:marker-start-center="false" draw:marker-end="Linienspitzen_20_17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0" style:family="graphic">
      <style:graphic-properties draw:stroke="solid" svg:stroke-width="0cm" svg:stroke-color="#000000" draw:marker-start="" draw:marker-start-width="0.199cm" draw:marker-start-center="false" draw:marker-end="Linienspitzen_20_17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1" style:family="graphic">
      <style:graphic-properties draw:stroke="solid" svg:stroke-width="0cm" svg:stroke-color="#000000" draw:marker-start="" draw:marker-start-width="0.199cm" draw:marker-start-center="false" draw:marker-end="Linienspitzen_20_17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2" style:family="graphic">
      <style:graphic-properties draw:stroke="solid" svg:stroke-width="0cm" svg:stroke-color="#000000" draw:marker-start="" draw:marker-start-width="0.199cm" draw:marker-start-center="false" draw:marker-end="Linienspitzen_20_17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3" style:family="graphic">
      <style:graphic-properties draw:stroke="solid" svg:stroke-width="0cm" svg:stroke-color="#000000" draw:marker-start="" draw:marker-start-width="0.199cm" draw:marker-start-center="false" draw:marker-end="Linienspitzen_20_17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4" style:family="graphic">
      <style:graphic-properties draw:stroke="solid" svg:stroke-width="0cm" svg:stroke-color="#000000" draw:marker-start="" draw:marker-start-width="0.199cm" draw:marker-start-center="false" draw:marker-end="Linienspitzen_20_17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1cm" fo:min-width="2.9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26"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1cm" fo:min-width="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27"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1cm" fo:min-width="2.002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28"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0.206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29"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0.20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30"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5cm" fo:min-width="0.20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31"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0.914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3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2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33" style:family="graphic">
      <style:graphic-properties draw:stroke="solid" svg:stroke-width="0cm" svg:stroke-color="#000000" draw:marker-start="" draw:marker-start-width="0.199cm" draw:marker-start-center="false" draw:marker-end="Linienspitzen_20_13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4" style:family="graphic">
      <style:graphic-properties draw:stroke="solid" svg:stroke-width="0cm" svg:stroke-color="#000000" draw:marker-start="" draw:marker-start-width="0.199cm" draw:marker-start-center="false" draw:marker-end="Linienspitzen_20_13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5" style:family="graphic">
      <style:graphic-properties draw:stroke="solid" svg:stroke-width="0cm" svg:stroke-color="#000000" draw:marker-start="" draw:marker-start-width="0.199cm" draw:marker-start-center="false" draw:marker-end="Linienspitzen_20_13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6" style:family="graphic">
      <style:graphic-properties draw:stroke="solid" svg:stroke-width="0cm" svg:stroke-color="#000000" draw:marker-start="" draw:marker-start-width="0.199cm" draw:marker-start-center="false" draw:marker-end="Linienspitzen_20_13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7" style:family="graphic">
      <style:graphic-properties draw:stroke="solid" svg:stroke-width="0cm" svg:stroke-color="#000000" draw:marker-start="" draw:marker-start-width="0.199cm" draw:marker-start-center="false" draw:marker-end="Linienspitzen_20_13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8" style:family="graphic">
      <style:graphic-properties draw:stroke="solid" svg:stroke-width="0cm" svg:stroke-color="#000000" draw:marker-start="" draw:marker-start-width="0.199cm" draw:marker-start-center="false" draw:marker-end="Linienspitzen_20_14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9" style:family="graphic">
      <style:graphic-properties draw:stroke="solid" svg:stroke-width="0cm" svg:stroke-color="#000000" draw:marker-start="" draw:marker-start-width="0.199cm" draw:marker-start-center="false" draw:marker-end="Linienspitzen_20_14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0" style:family="graphic">
      <style:graphic-properties draw:stroke="solid" svg:stroke-width="0cm" svg:stroke-color="#000000" draw:marker-start="" draw:marker-start-width="0.199cm" draw:marker-start-center="false" draw:marker-end="Linienspitzen_20_14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1" style:family="graphic">
      <style:graphic-properties draw:stroke="solid" svg:stroke-width="0cm" svg:stroke-color="#000000" draw:marker-start="" draw:marker-start-width="0.199cm" draw:marker-start-center="false" draw:marker-end="Linienspitzen_20_14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2" style:family="graphic">
      <style:graphic-properties draw:stroke="solid" svg:stroke-width="0cm" svg:stroke-color="#000000" draw:marker-start="" draw:marker-start-width="0.199cm" draw:marker-start-center="false" draw:marker-end="Linienspitzen_20_14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3" style:family="graphic">
      <style:graphic-properties draw:stroke="solid" svg:stroke-width="0cm" svg:stroke-color="#000000" draw:marker-start="" draw:marker-start-width="0.199cm" draw:marker-start-center="false" draw:marker-end="Linienspitzen_20_14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4" style:family="graphic">
      <style:graphic-properties draw:stroke="solid" svg:stroke-width="0cm" svg:stroke-color="#000000" draw:marker-start="" draw:marker-start-width="0.199cm" draw:marker-start-center="false" draw:marker-end="Linienspitzen_20_14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5" style:family="graphic">
      <style:graphic-properties draw:stroke="solid" svg:stroke-width="0cm" svg:stroke-color="#000000" draw:marker-start="" draw:marker-start-width="0.199cm" draw:marker-start-center="false" draw:marker-end="Linienspitzen_20_14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6" style:family="graphic">
      <style:graphic-properties draw:stroke="solid" svg:stroke-width="0cm" svg:stroke-color="#000000" draw:marker-start="" draw:marker-start-width="0.199cm" draw:marker-start-center="false" draw:marker-end="Linienspitzen_20_14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7" style:family="graphic">
      <style:graphic-properties draw:stroke="solid" svg:stroke-width="0cm" svg:stroke-color="#000000" draw:marker-start="" draw:marker-start-width="0.199cm" draw:marker-start-center="false" draw:marker-end="Linienspitzen_20_14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8" style:family="graphic">
      <style:graphic-properties draw:stroke="solid" svg:stroke-width="0cm" svg:stroke-color="#000000" draw:marker-start="" draw:marker-start-width="0.199cm" draw:marker-start-center="false" draw:marker-end="Linienspitzen_20_15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9" style:family="graphic">
      <style:graphic-properties draw:stroke="solid" svg:stroke-width="0cm" svg:stroke-color="#000000" draw:marker-start="" draw:marker-start-width="0.199cm" draw:marker-start-center="false" draw:marker-end="Linienspitzen_20_15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0" style:family="graphic">
      <style:graphic-properties draw:stroke="solid" svg:stroke-width="0cm" svg:stroke-color="#000000" draw:marker-start="" draw:marker-start-width="0.199cm" draw:marker-start-center="false" draw:marker-end="Linienspitzen_20_15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1" style:family="graphic">
      <style:graphic-properties draw:stroke="solid" svg:stroke-width="0cm" svg:stroke-color="#000000" draw:marker-start="" draw:marker-start-width="0.199cm" draw:marker-start-center="false" draw:marker-end="Linienspitzen_20_1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2" style:family="graphic">
      <style:graphic-properties draw:stroke="solid" svg:stroke-width="0cm" svg:stroke-color="#000000" draw:marker-start="" draw:marker-start-width="0.199cm" draw:marker-start-center="false" draw:marker-end="Linienspitzen_20_15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3" style:family="graphic">
      <style:graphic-properties draw:stroke="solid" svg:stroke-width="0cm" svg:stroke-color="#000000" draw:marker-start="" draw:marker-start-width="0.199cm" draw:marker-start-center="false" draw:marker-end="Linienspitzen_20_1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4" style:family="graphic">
      <style:graphic-properties draw:stroke="solid" svg:stroke-width="0cm" svg:stroke-color="#000000" draw:marker-start="" draw:marker-start-width="0.199cm" draw:marker-start-center="false" draw:marker-end="Linienspitzen_20_15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5" style:family="graphic">
      <style:graphic-properties draw:stroke="solid" svg:stroke-width="0cm" svg:stroke-color="#000000" draw:marker-start="" draw:marker-start-width="0.199cm" draw:marker-start-center="false" draw:marker-end="Linienspitzen_20_15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6" style:family="graphic">
      <style:graphic-properties draw:stroke="solid" svg:stroke-width="0cm" svg:stroke-color="#000000" draw:marker-start="" draw:marker-start-width="0.199cm" draw:marker-start-center="false" draw:marker-end="Linienspitzen_20_15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7" style:family="graphic">
      <style:graphic-properties draw:stroke="solid" svg:stroke-width="0cm" svg:stroke-color="#000000" draw:marker-start="" draw:marker-start-width="0.199cm" draw:marker-start-center="false" draw:marker-end="Linienspitzen_20_15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8" style:family="graphic">
      <style:graphic-properties draw:stroke="solid" svg:stroke-width="0cm" svg:stroke-color="#000000" draw:marker-start="" draw:marker-start-width="0.199cm" draw:marker-start-center="false" draw:marker-end="Linienspitzen_20_1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9"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0.20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60" style:family="graphic">
      <style:graphic-properties draw:stroke="solid" svg:stroke-width="0cm" svg:stroke-color="#000000" draw:marker-start="" draw:marker-start-width="0.199cm" draw:marker-start-center="false" draw:marker-end="Linienspitzen_20_16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1" style:family="graphic">
      <style:graphic-properties draw:stroke="solid" svg:stroke-width="0cm" svg:stroke-color="#000000" draw:marker-start="" draw:marker-start-width="0.199cm" draw:marker-start-center="false" draw:marker-end="Linienspitzen_20_16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2" style:family="graphic">
      <style:graphic-properties draw:stroke="solid" svg:stroke-width="0cm" svg:stroke-color="#000000" draw:marker-start="" draw:marker-start-width="0.199cm" draw:marker-start-center="false" draw:marker-end="Linienspitzen_20_1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1cm" fo:min-width="2.7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64" style:family="graphic">
      <style:graphic-properties draw:stroke="solid" svg:stroke-width="0cm" svg:stroke-color="#000000" draw:marker-start="" draw:marker-start-width="0.199cm" draw:marker-start-center="false" draw:marker-end="Linienspitzen_20_11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5" style:family="graphic">
      <style:graphic-properties draw:stroke="solid" svg:stroke-width="0cm" svg:stroke-color="#000000" draw:marker-start="" draw:marker-start-width="0.199cm" draw:marker-start-center="false" draw:marker-end="Linienspitzen_20_11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6" style:family="graphic">
      <style:graphic-properties draw:stroke="solid" svg:stroke-width="0cm" svg:stroke-color="#000000" draw:marker-start="" draw:marker-start-width="0.199cm" draw:marker-start-center="false" draw:marker-end="Linienspitzen_20_11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7" style:family="graphic">
      <style:graphic-properties draw:stroke="solid" svg:stroke-width="0cm" svg:stroke-color="#000000" draw:marker-start="" draw:marker-start-width="0.199cm" draw:marker-start-center="false" draw:marker-end="Linienspitzen_20_11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8" style:family="graphic">
      <style:graphic-properties draw:stroke="solid" svg:stroke-width="0cm" svg:stroke-color="#000000" draw:marker-start="" draw:marker-start-width="0.199cm" draw:marker-start-center="false" draw:marker-end="Linienspitzen_20_12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9" style:family="graphic">
      <style:graphic-properties draw:stroke="solid" svg:stroke-width="0cm" svg:stroke-color="#000000" draw:marker-start="" draw:marker-start-width="0.199cm" draw:marker-start-center="false" draw:marker-end="Linienspitzen_20_12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0" style:family="graphic">
      <style:graphic-properties draw:stroke="solid" svg:stroke-width="0cm" svg:stroke-color="#000000" draw:marker-start="" draw:marker-start-width="0.199cm" draw:marker-start-center="false" draw:marker-end="Linienspitzen_20_1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1" style:family="graphic">
      <style:graphic-properties draw:stroke="solid" svg:stroke-width="0cm" svg:stroke-color="#000000" draw:marker-start="" draw:marker-start-width="0.199cm" draw:marker-start-center="false" draw:marker-end="Linienspitzen_20_12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2" style:family="graphic">
      <style:graphic-properties draw:stroke="solid" svg:stroke-width="0cm" svg:stroke-color="#000000" draw:marker-start="" draw:marker-start-width="0.199cm" draw:marker-start-center="false" draw:marker-end="Linienspitzen_20_1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3" style:family="graphic">
      <style:graphic-properties draw:stroke="solid" svg:stroke-width="0cm" svg:stroke-color="#000000" draw:marker-start="" draw:marker-start-width="0.199cm" draw:marker-start-center="false" draw:marker-end="Linienspitzen_20_12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4" style:family="graphic">
      <style:graphic-properties draw:stroke="solid" svg:stroke-width="0cm" svg:stroke-color="#000000" draw:marker-start="" draw:marker-start-width="0.199cm" draw:marker-start-center="false" draw:marker-end="Linienspitzen_20_1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1cm" fo:min-width="2.50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76" style:family="graphic">
      <style:graphic-properties draw:stroke="solid" svg:stroke-width="0cm" svg:stroke-color="#000000" draw:marker-start="" draw:marker-start-width="0.199cm" draw:marker-start-center="false" draw:marker-end="Linienspitzen_20_12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7" style:family="graphic">
      <style:graphic-properties draw:stroke="solid" svg:stroke-width="0cm" svg:stroke-color="#000000" draw:marker-start="" draw:marker-start-width="0.199cm" draw:marker-start-center="false" draw:marker-end="Linienspitzen_20_12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8" style:family="graphic">
      <style:graphic-properties draw:stroke="solid" svg:stroke-width="0cm" svg:stroke-color="#000000" draw:marker-start="" draw:marker-start-width="0.199cm" draw:marker-start-center="false" draw:marker-end="Linienspitzen_20_12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9" style:family="graphic">
      <style:graphic-properties draw:stroke="solid" svg:stroke-width="0cm" svg:stroke-color="#000000" draw:marker-start="" draw:marker-start-width="0.199cm" draw:marker-start-center="false" draw:marker-end="Linienspitzen_20_13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0" style:family="graphic">
      <style:graphic-properties draw:stroke="solid" svg:stroke-width="0cm" svg:stroke-color="#000000" draw:marker-start="" draw:marker-start-width="0.199cm" draw:marker-start-center="false" draw:marker-end="Linienspitzen_20_13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1" style:family="graphic">
      <style:graphic-properties draw:stroke="solid" svg:stroke-width="0cm" svg:stroke-color="#000000" draw:marker-start="" draw:marker-start-width="0.199cm" draw:marker-start-center="false" draw:marker-end="Linienspitzen_20_13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2" style:family="graphic">
      <style:graphic-properties draw:stroke="solid" svg:stroke-width="0cm" svg:stroke-color="#000000" draw:marker-start="" draw:marker-start-width="0.199cm" draw:marker-start-center="false" draw:marker-end="Linienspitzen_20_13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3" style:family="graphic">
      <style:graphic-properties draw:stroke="solid" svg:stroke-width="0cm" svg:stroke-color="#000000" draw:marker-start="" draw:marker-start-width="0.199cm" draw:marker-start-center="false" draw:marker-end="Linienspitzen_20_10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4" style:family="graphic">
      <style:graphic-properties draw:stroke="solid" svg:stroke-width="0cm" svg:stroke-color="#000000" draw:marker-start="" draw:marker-start-width="0.199cm" draw:marker-start-center="false" draw:marker-end="Linienspitzen_20_10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5" style:family="graphic">
      <style:graphic-properties draw:stroke="solid" svg:stroke-width="0cm" svg:stroke-color="#000000" draw:marker-start="" draw:marker-start-width="0.199cm" draw:marker-start-center="false" draw:marker-end="Linienspitzen_20_10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6" style:family="graphic">
      <style:graphic-properties draw:stroke="solid" svg:stroke-width="0cm" svg:stroke-color="#000000" draw:marker-start="" draw:marker-start-width="0.199cm" draw:marker-start-center="false" draw:marker-end="Linienspitzen_20_1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7" style:family="graphic">
      <style:graphic-properties draw:stroke="solid" svg:stroke-width="0cm" svg:stroke-color="#000000" draw:marker-start="" draw:marker-start-width="0.199cm" draw:marker-start-center="false" draw:marker-end="Linienspitzen_20_11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8" style:family="graphic">
      <style:graphic-properties draw:stroke="solid" svg:stroke-width="0cm" svg:stroke-color="#000000" draw:marker-start="" draw:marker-start-width="0.199cm" draw:marker-start-center="false" draw:marker-end="Linienspitzen_20_1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9" style:family="graphic">
      <style:graphic-properties draw:stroke="solid" svg:stroke-width="0cm" svg:stroke-color="#000000" draw:marker-start="" draw:marker-start-width="0.199cm" draw:marker-start-center="false" draw:marker-end="Linienspitzen_20_1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90" style:family="graphic">
      <style:graphic-properties draw:stroke="solid" svg:stroke-width="0cm" svg:stroke-color="#000000" draw:marker-start="" draw:marker-start-width="0.199cm" draw:marker-start-center="false" draw:marker-end="Linienspitzen_20_1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91" style:family="graphic">
      <style:graphic-properties draw:stroke="solid" svg:stroke-width="0cm" svg:stroke-color="#000000" draw:marker-start="" draw:marker-start-width="0.199cm" draw:marker-start-center="false" draw:marker-end="Linienspitzen_20_1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9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1cm" fo:min-width="2.75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9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3cm" fo:min-width="2.75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94"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0.2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9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3cm" fo:min-width="2.752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96"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6cm" fo:min-width="0.564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97" style:family="graphic">
      <style:graphic-properties draw:stroke="solid" svg:stroke-width="0cm" svg:stroke-color="#000000" draw:marker-start="" draw:marker-start-width="0.199cm" draw:marker-start-center="false" draw:marker-end="Linienspitzen_20_7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98" style:family="graphic">
      <style:graphic-properties draw:stroke="solid" svg:stroke-width="0cm" svg:stroke-color="#000000" draw:marker-start="" draw:marker-start-width="0.199cm" draw:marker-start-center="false" draw:marker-end="Linienspitzen_20_7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99" style:family="graphic">
      <style:graphic-properties draw:stroke="solid" svg:stroke-width="0cm" svg:stroke-color="#000000" draw:marker-start="" draw:marker-start-width="0.199cm" draw:marker-start-center="false" draw:marker-end="Linienspitzen_20_7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0" style:family="graphic">
      <style:graphic-properties draw:stroke="solid" svg:stroke-width="0cm" svg:stroke-color="#000000" draw:marker-start="" draw:marker-start-width="0.199cm" draw:marker-start-center="false" draw:marker-end="Linienspitzen_20_7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1" style:family="graphic">
      <style:graphic-properties draw:stroke="solid" svg:stroke-width="0cm" svg:stroke-color="#000000" draw:marker-start="" draw:marker-start-width="0.199cm" draw:marker-start-center="false" draw:marker-end="Linienspitzen_20_7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2" style:family="graphic">
      <style:graphic-properties draw:stroke="solid" svg:stroke-width="0cm" svg:stroke-color="#000000" draw:marker-start="" draw:marker-start-width="0.199cm" draw:marker-start-center="false" draw:marker-end="Linienspitzen_20_8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3" style:family="graphic">
      <style:graphic-properties draw:stroke="solid" svg:stroke-width="0cm" svg:stroke-color="#000000" draw:marker-start="" draw:marker-start-width="0.199cm" draw:marker-start-center="false" draw:marker-end="Linienspitzen_20_8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4" style:family="graphic">
      <style:graphic-properties draw:stroke="solid" svg:stroke-width="0cm" svg:stroke-color="#000000" draw:marker-start="" draw:marker-start-width="0.199cm" draw:marker-start-center="false" draw:marker-end="Linienspitzen_20_8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5" style:family="graphic">
      <style:graphic-properties draw:stroke="solid" svg:stroke-width="0cm" svg:stroke-color="#000000" draw:marker-start="" draw:marker-start-width="0.199cm" draw:marker-start-center="false" draw:marker-end="Linienspitzen_20_8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6" style:family="graphic">
      <style:graphic-properties draw:stroke="solid" svg:stroke-width="0cm" svg:stroke-color="#000000" draw:marker-start="" draw:marker-start-width="0.199cm" draw:marker-start-center="false" draw:marker-end="Linienspitzen_20_8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7" style:family="graphic">
      <style:graphic-properties draw:stroke="solid" svg:stroke-width="0cm" svg:stroke-color="#000000" draw:marker-start="" draw:marker-start-width="0.199cm" draw:marker-start-center="false" draw:marker-end="Linienspitzen_20_8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8"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48cm" fo:min-width="2.24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09"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5cm" fo:min-width="0.56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10"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11" style:family="graphic">
      <style:graphic-properties draw:stroke="solid" svg:stroke-width="0cm" svg:stroke-color="#000000" draw:marker-start="" draw:marker-start-width="0.199cm" draw:marker-start-center="false" draw:marker-end="Linienspitzen_20_8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2" style:family="graphic">
      <style:graphic-properties draw:stroke="solid" svg:stroke-width="0cm" svg:stroke-color="#000000" draw:marker-start="" draw:marker-start-width="0.199cm" draw:marker-start-center="false" draw:marker-end="Linienspitzen_20_8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3" style:family="graphic">
      <style:graphic-properties draw:stroke="solid" svg:stroke-width="0cm" svg:stroke-color="#000000" draw:marker-start="" draw:marker-start-width="0.199cm" draw:marker-start-center="false" draw:marker-end="Linienspitzen_20_8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4" style:family="graphic">
      <style:graphic-properties draw:stroke="solid" svg:stroke-width="0cm" svg:stroke-color="#000000" draw:marker-start="" draw:marker-start-width="0.199cm" draw:marker-start-center="false" draw:marker-end="Linienspitzen_20_8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5" style:family="graphic">
      <style:graphic-properties draw:stroke="solid" svg:stroke-width="0cm" svg:stroke-color="#000000" draw:marker-start="" draw:marker-start-width="0.199cm" draw:marker-start-center="false" draw:marker-end="Linienspitzen_20_9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6" style:family="graphic">
      <style:graphic-properties draw:stroke="solid" svg:stroke-width="0cm" svg:stroke-color="#000000" draw:marker-start="" draw:marker-start-width="0.199cm" draw:marker-start-center="false" draw:marker-end="Linienspitzen_20_9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7" style:family="graphic">
      <style:graphic-properties draw:stroke="solid" svg:stroke-width="0cm" svg:stroke-color="#000000" draw:marker-start="" draw:marker-start-width="0.199cm" draw:marker-start-center="false" draw:marker-end="Linienspitzen_20_9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8" style:family="graphic">
      <style:graphic-properties draw:stroke="solid" svg:stroke-width="0cm" svg:stroke-color="#000000" draw:marker-start="" draw:marker-start-width="0.199cm" draw:marker-start-center="false" draw:marker-end="Linienspitzen_20_9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9" style:family="graphic">
      <style:graphic-properties draw:stroke="solid" svg:stroke-width="0cm" svg:stroke-color="#000000" draw:marker-start="" draw:marker-start-width="0.199cm" draw:marker-start-center="false" draw:marker-end="Linienspitzen_20_9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0" style:family="graphic">
      <style:graphic-properties draw:stroke="solid" svg:stroke-width="0cm" svg:stroke-color="#000000" draw:marker-start="" draw:marker-start-width="0.199cm" draw:marker-start-center="false" draw:marker-end="Linienspitzen_20_9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1" style:family="graphic">
      <style:graphic-properties draw:stroke="solid" svg:stroke-width="0cm" svg:stroke-color="#000000" draw:marker-start="" draw:marker-start-width="0.199cm" draw:marker-start-center="false" draw:marker-end="Linienspitzen_20_9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2" style:family="graphic">
      <style:graphic-properties draw:stroke="solid" svg:stroke-width="0cm" svg:stroke-color="#000000" draw:marker-start="" draw:marker-start-width="0.199cm" draw:marker-start-center="false" draw:marker-end="Linienspitzen_20_9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3" style:family="graphic">
      <style:graphic-properties draw:stroke="solid" svg:stroke-width="0cm" svg:stroke-color="#000000" draw:marker-start="" draw:marker-start-width="0.199cm" draw:marker-start-center="false" draw:marker-end="Linienspitzen_20_9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4" style:family="graphic">
      <style:graphic-properties draw:stroke="solid" svg:stroke-width="0cm" svg:stroke-color="#000000" draw:marker-start="" draw:marker-start-width="0.199cm" draw:marker-start-center="false" draw:marker-end="Linienspitzen_20_9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5" style:family="graphic">
      <style:graphic-properties draw:stroke="solid" svg:stroke-width="0cm" svg:stroke-color="#000000" draw:marker-start="" draw:marker-start-width="0.199cm" draw:marker-start-center="false" draw:marker-end="Linienspitzen_20_10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6" style:family="graphic">
      <style:graphic-properties draw:stroke="solid" svg:stroke-width="0cm" svg:stroke-color="#000000" draw:marker-start="" draw:marker-start-width="0.199cm" draw:marker-start-center="false" draw:marker-end="Linienspitzen_20_10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7" style:family="graphic">
      <style:graphic-properties draw:stroke="solid" svg:stroke-width="0cm" svg:stroke-color="#000000" draw:marker-start="" draw:marker-start-width="0.199cm" draw:marker-start-center="false" draw:marker-end="Linienspitzen_20_10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8" style:family="graphic">
      <style:graphic-properties draw:stroke="solid" svg:stroke-width="0cm" svg:stroke-color="#000000" draw:marker-start="" draw:marker-start-width="0.199cm" draw:marker-start-center="false" draw:marker-end="Linienspitzen_20_10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9" style:family="graphic">
      <style:graphic-properties draw:stroke="solid" svg:stroke-width="0cm" svg:stroke-color="#000000" draw:marker-start="" draw:marker-start-width="0.199cm" draw:marker-start-center="false" draw:marker-end="Linienspitzen_20_10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0" style:family="graphic">
      <style:graphic-properties draw:stroke="solid" svg:stroke-width="0cm" svg:stroke-color="#000000" draw:marker-start="" draw:marker-start-width="0.199cm" draw:marker-start-center="false" draw:marker-end="Linienspitzen_20_10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1" style:family="graphic">
      <style:graphic-properties draw:stroke="solid" svg:stroke-width="0cm" svg:stroke-color="#000000" draw:marker-start="" draw:marker-start-width="0.199cm" draw:marker-start-center="false" draw:marker-end="Linienspitzen_20_10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0.91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3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1.79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34" style:family="graphic">
      <style:graphic-properties draw:stroke="solid" svg:stroke-width="0cm" svg:stroke-color="#000000" draw:marker-start="" draw:marker-start-width="0.199cm" draw:marker-start-center="false" draw:marker-end="Linienspitzen_20_5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5" style:family="graphic">
      <style:graphic-properties draw:stroke="solid" svg:stroke-width="0cm" svg:stroke-color="#000000" draw:marker-start="" draw:marker-start-width="0.199cm" draw:marker-start-center="false" draw:marker-end="Linienspitzen_20_5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6" style:family="graphic">
      <style:graphic-properties draw:stroke="solid" svg:stroke-width="0cm" svg:stroke-color="#000000" draw:marker-start="" draw:marker-start-width="0.199cm" draw:marker-start-center="false" draw:marker-end="Linienspitzen_20_5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7" style:family="graphic">
      <style:graphic-properties draw:stroke="solid" svg:stroke-width="0cm" svg:stroke-color="#000000" draw:marker-start="" draw:marker-start-width="0.199cm" draw:marker-start-center="false" draw:marker-end="Linienspitzen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8" style:family="graphic">
      <style:graphic-properties draw:stroke="solid" svg:stroke-width="0cm" svg:stroke-color="#000000" draw:marker-start="" draw:marker-start-width="0.199cm" draw:marker-start-center="false" draw:marker-end="Linienspitzen_20_6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9" style:family="graphic">
      <style:graphic-properties draw:stroke="solid" svg:stroke-width="0cm" svg:stroke-color="#000000" draw:marker-start="" draw:marker-start-width="0.199cm" draw:marker-start-center="false" draw:marker-end="Linienspitzen_20_6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0" style:family="graphic">
      <style:graphic-properties draw:stroke="solid" svg:stroke-width="0cm" svg:stroke-color="#000000" draw:marker-start="" draw:marker-start-width="0.199cm" draw:marker-start-center="false" draw:marker-end="Linienspitzen_20_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1" style:family="graphic">
      <style:graphic-properties draw:stroke="solid" svg:stroke-width="0cm" svg:stroke-color="#000000" draw:marker-start="" draw:marker-start-width="0.199cm" draw:marker-start-center="false" draw:marker-end="Linienspitzen_20_6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2" style:family="graphic">
      <style:graphic-properties draw:stroke="solid" svg:stroke-width="0cm" svg:stroke-color="#000000" draw:marker-start="" draw:marker-start-width="0.199cm" draw:marker-start-center="false" draw:marker-end="Linienspitzen_20_6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3" style:family="graphic">
      <style:graphic-properties draw:stroke="solid" svg:stroke-width="0cm" svg:stroke-color="#000000" draw:marker-start="" draw:marker-start-width="0.199cm" draw:marker-start-center="false" draw:marker-end="Linienspitzen_20_6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4" style:family="graphic">
      <style:graphic-properties draw:stroke="solid" svg:stroke-width="0cm" svg:stroke-color="#000000" draw:marker-start="" draw:marker-start-width="0.199cm" draw:marker-start-center="false" draw:marker-end="Linienspitzen_20_6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5" style:family="graphic">
      <style:graphic-properties draw:stroke="solid" svg:stroke-width="0cm" svg:stroke-color="#000000" draw:marker-start="" draw:marker-start-width="0.199cm" draw:marker-start-center="false" draw:marker-end="Linienspitzen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6" style:family="graphic">
      <style:graphic-properties draw:stroke="solid" svg:stroke-width="0cm" svg:stroke-color="#000000" draw:marker-start="" draw:marker-start-width="0.199cm" draw:marker-start-center="false" draw:marker-end="Linienspitzen_20_7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7" style:family="graphic">
      <style:graphic-properties draw:stroke="solid" svg:stroke-width="0cm" svg:stroke-color="#000000" draw:marker-start="" draw:marker-start-width="0.199cm" draw:marker-start-center="false" draw:marker-end="Linienspitzen_20_7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8" style:family="graphic">
      <style:graphic-properties draw:stroke="solid" svg:stroke-width="0cm" svg:stroke-color="#000000" draw:marker-start="" draw:marker-start-width="0.199cm" draw:marker-start-center="false" draw:marker-end="Linienspitzen_20_7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9" style:family="graphic">
      <style:graphic-properties draw:stroke="solid" svg:stroke-width="0cm" svg:stroke-color="#000000" draw:marker-start="" draw:marker-start-width="0.199cm" draw:marker-start-center="false" draw:marker-end="Linienspitzen_20_7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0" style:family="graphic">
      <style:graphic-properties draw:stroke="solid" svg:stroke-width="0cm" svg:stroke-color="#000000" draw:marker-start="" draw:marker-start-width="0.199cm" draw:marker-start-center="false" draw:marker-end="Linienspitzen_20_7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1"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5cm" fo:min-width="1.62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52" style:family="graphic">
      <style:graphic-properties draw:stroke="solid" svg:stroke-width="0cm" svg:stroke-color="#000000" draw:marker-start="" draw:marker-start-width="0.199cm" draw:marker-start-center="false" draw:marker-end="Linienspitzen_20_4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3" style:family="graphic">
      <style:graphic-properties draw:stroke="solid" svg:stroke-width="0cm" svg:stroke-color="#000000" draw:marker-start="" draw:marker-start-width="0.199cm" draw:marker-start-center="false" draw:marker-end="Linienspitzen_20_4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4" style:family="graphic">
      <style:graphic-properties draw:stroke="solid" svg:stroke-width="0cm" svg:stroke-color="#000000" draw:marker-start="" draw:marker-start-width="0.199cm" draw:marker-start-center="false" draw:marker-end="Linienspitzen_20_4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5" style:family="graphic">
      <style:graphic-properties draw:stroke="solid" svg:stroke-width="0cm" svg:stroke-color="#000000" draw:marker-start="" draw:marker-start-width="0.199cm" draw:marker-start-center="false" draw:marker-end="Linienspitzen_20_4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6" style:family="graphic">
      <style:graphic-properties draw:stroke="solid" svg:stroke-width="0cm" svg:stroke-color="#000000" draw:marker-start="" draw:marker-start-width="0.199cm" draw:marker-start-center="false" draw:marker-end="Linienspitzen_20_4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7" style:family="graphic">
      <style:graphic-properties draw:stroke="solid" svg:stroke-width="0cm" svg:stroke-color="#000000" draw:marker-start="" draw:marker-start-width="0.199cm" draw:marker-start-center="false" draw:marker-end="Linienspitzen_20_4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8"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1.62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59" style:family="graphic">
      <style:graphic-properties draw:stroke="solid" svg:stroke-width="0cm" svg:stroke-color="#000000" draw:marker-start="" draw:marker-start-width="0.199cm" draw:marker-start-center="false" draw:marker-end="Linienspitzen_20_3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0" style:family="graphic">
      <style:graphic-properties draw:stroke="solid" svg:stroke-width="0cm" svg:stroke-color="#000000" draw:marker-start="" draw:marker-start-width="0.199cm" draw:marker-start-center="false" draw:marker-end="Linienspitzen_20_3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1" style:family="graphic">
      <style:graphic-properties draw:stroke="solid" svg:stroke-width="0cm" svg:stroke-color="#000000" draw:marker-start="" draw:marker-start-width="0.199cm" draw:marker-start-center="false" draw:marker-end="Linienspitzen_20_3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2" style:family="graphic">
      <style:graphic-properties draw:stroke="solid" svg:stroke-width="0cm" svg:stroke-color="#000000" draw:marker-start="" draw:marker-start-width="0.199cm" draw:marker-start-center="false" draw:marker-end="Linienspitzen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3" style:family="graphic">
      <style:graphic-properties draw:stroke="solid" svg:stroke-width="0cm" svg:stroke-color="#000000" draw:marker-start="" draw:marker-start-width="0.199cm" draw:marker-start-center="false" draw:marker-end="Linienspitzen_20_1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4" style:family="graphic">
      <style:graphic-properties draw:stroke="solid" svg:stroke-width="0cm" svg:stroke-color="#000000" draw:marker-start="" draw:marker-start-width="0.199cm" draw:marker-start-center="false" draw:marker-end="Linienspitzen_20_1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5" style:family="graphic">
      <style:graphic-properties draw:stroke="solid" svg:stroke-width="0cm" svg:stroke-color="#000000" draw:marker-start="" draw:marker-start-width="0.199cm" draw:marker-start-center="false" draw:marker-end="Linienspitzen_20_2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6" style:family="graphic">
      <style:graphic-properties draw:stroke="solid" svg:stroke-width="0cm" svg:stroke-color="#000000" draw:marker-start="" draw:marker-start-width="0.199cm" draw:marker-start-center="false" draw:marker-end="Linienspitzen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7" style:family="graphic">
      <style:graphic-properties draw:stroke="solid" svg:stroke-width="0cm" svg:stroke-color="#000000" draw:marker-start="" draw:marker-start-width="0.199cm" draw:marker-start-center="false" draw:marker-end="Linienspitzen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8" style:family="graphic">
      <style:graphic-properties draw:stroke="solid" svg:stroke-width="0cm" svg:stroke-color="#000000" draw:marker-start="" draw:marker-start-width="0.199cm" draw:marker-start-center="false" draw:marker-end="Linienspitzen_20_2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9" style:family="graphic">
      <style:graphic-properties draw:stroke="solid" svg:stroke-width="0cm" svg:stroke-color="#000000" draw:marker-start="" draw:marker-start-width="0.199cm" draw:marker-start-center="false" draw:marker-end="Linienspitzen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70" style:family="graphic">
      <style:graphic-properties draw:stroke="solid" svg:stroke-width="0cm" svg:stroke-color="#000000" draw:marker-start="" draw:marker-start-width="0.199cm" draw:marker-start-center="false" draw:marker-end="Linienspitzen_20_2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71" style:family="graphic">
      <style:graphic-properties draw:stroke="solid" svg:stroke-width="0cm" svg:stroke-color="#000000" draw:marker-start="" draw:marker-start-width="0.199cm" draw:marker-start-center="false" draw:marker-end="Linienspitzen_20_2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72" style:family="graphic">
      <style:graphic-properties draw:stroke="solid" svg:stroke-width="0cm" svg:stroke-color="#000000" draw:marker-start="" draw:marker-start-width="0.199cm" draw:marker-start-center="false" draw:marker-end="Linienspitzen_20_3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73" style:family="graphic">
      <style:graphic-properties draw:stroke="solid" svg:stroke-width="0cm" svg:stroke-color="#000000" draw:marker-start="" draw:marker-start-width="0.199cm" draw:marker-start-center="false" draw:marker-end="Linienspitzen_20_3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 draw:name="Bild1" text:anchor-type="char" svg:x="0.201cm" svg:y="0.326cm" svg:width="16.902cm" svg:height="14.178cm" draw:z-index="16"><draw:image xlink:href="Pictures/10000001000004000000035B2E2C9B22.png" xlink:type="simple" xlink:show="embed" xlink:actuate="onLoad" draw:mime-type="image/png"/></draw:frame><text:span text:style-name="Example"/></text:p>
      <text:p text:style-name="Text_20_body"><text:span text:style-name="Example"/></text:p>
      <text:p text:style-name="Text_20_body"><text:span text:style-name="Example"/></text:p>
      <text:p text:style-name="Text_20_body"><text:span text:style-name="Example"/></text:p>
      <text:p text:style-name="Text_20_body"><text:span text:style-name="Example"/></text:p>
      <text:p text:style-name="Text_20_body"><text:span text:style-name="Example"/></text:p>
      <text:p text:style-name="Text_20_body"><text:span text:style-name="Example"/></text:p>
      <text:p text:style-name="Text_20_body"><text:span text:style-name="Example"/></text:p>
      <text:p text:style-name="Text_20_body"><text:span text:style-name="Example"/></text:p>
      <text:p text:style-name="Text_20_body"><text:span text:style-name="Example"/></text:p>
      <text:p text:style-name="Text_20_body"><text:span text:style-name="Example"/></text:p>
      <text:p text:style-name="Title">KC-PASCAL</text:p>
      <text:p text:style-name="Text_20_body"/>
      <text:p text:style-name="Text_20_body"/>
      <text:p text:style-name="Text_20_body"/>
      <text:p text:style-name="Text_20_body"/>
      <text:p text:style-name="Text_20_body"/>
      <text:p text:style-name="Text_20_body"/>
      <text:p text:style-name="Text_20_body"/>
      <table:table table:name="Tabelle1" table:style-name="Tabelle1">
        <table:table-column table:style-name="Tabelle1.A"/>
        <table:table-row>
          <table:table-cell table:style-name="Tabelle1.A1" office:value-type="string">
            <text:p text:style-name="P38"/>
            <text:p text:style-name="P39">Beschreibung KC-PASCAL</text:p>
            <text:p text:style-name="P39"/>
            <text:p text:style-name="P39">(Version <text:span text:style-name="T1">5</text:span>)</text:p>
            <text:p text:style-name="P38"/>
          </table:table-cell>
        </table:table-row>
      </table:table>
      <text:p text:style-name="Text_20_body"/>
      <text:p text:style-name="Text_20_body"/>
      <text:p text:style-name="Text_20_body"/>
      <table:table table:name="Tabelle27" table:style-name="Tabelle27">
        <table:table-column table:style-name="Tabelle27.A"/>
        <table:table-column table:style-name="Tabelle27.B"/>
        <table:table-row>
          <table:table-cell office:value-type="string">
            <text:p text:style-name="P40">Ablageort:</text:p>
          </table:table-cell>
          <table:table-cell office:value-type="string">
            <text:p text:style-name="P40">https://github.com/duhlig/KC85_software/tree/main/_<text:span text:style-name="T50">Papier/</text:span>kcpascal_dok</text:p>
          </table:table-cell>
        </table:table-row>
        <table:table-row>
          <table:table-cell office:value-type="string">
            <text:p text:style-name="P40">Dokumentenversion:</text:p>
          </table:table-cell>
          <table:table-cell office:value-type="string">
            <text:p text:style-name="P40">1.<text:span text:style-name="T68">4</text:span></text:p>
          </table:table-cell>
        </table:table-row>
      </table:table>
      <text:p text:style-name="P2"><text:bookmark-start text:name="__RefHeading___Toc7_1849558913"/>Ä<text:span text:style-name="T1">nderungshistorie</text:span><text:bookmark-end text:name="__RefHeading___Toc7_1849558913"/></text:p>
      <text:p text:style-name="Standard"/>
      <table:table table:name="Tabelle2" table:style-name="Tabelle2">
        <table:table-column table:style-name="Tabelle2.A"/>
        <table:table-column table:style-name="Tabelle2.B"/>
        <table:table-column table:style-name="Tabelle2.C"/>
        <table:table-row>
          <table:table-cell table:style-name="Tabelle2.A1" office:value-type="string">
            <text:p text:style-name="P5">03/2025</text:p>
          </table:table-cell>
          <table:table-cell table:style-name="Tabelle2.A1" office:value-type="string">
            <text:p text:style-name="P5">Dietmar Uhlig</text:p>
          </table:table-cell>
          <table:table-cell table:style-name="Tabelle2.C1" office:value-type="string">
            <text:p text:style-name="P5"><text:span text:style-name="T48">Te</text:span><text:span text:style-name="T49">x</text:span><text:span text:style-name="T48">t aus </text:span><text:span text:style-name="T48"><text:bibliography-mark text:identifier="KCPascal" text:bibliography-type="www" text:author="Mugler, Albrecht" text:title="KC-Pascal (Version 4.4)" text:year="1987" text:url="http://kc85.info/index.php/download-topmenu/viewdownload/5-programmiersprachen/43-kc-pascal.html" loext:target-type="3">[KCPascal]</text:bibliography-mark></text:span><text:span text:style-name="T48">, </text:span>Syntaxdiagramme <text:span text:style-name="T48">aus </text:span><text:span text:style-name="T48"><text:bibliography-mark text:identifier="Hisoft" text:bibliography-type="www" text:publisher="Hisoft" text:title="Memotech Hisoft Pascal User Guide" text:year="1984" text:url="https://www.cpcwiki.eu/imgs/6/64/Hisoft_Pascal_4T_Manual_%28English%29.pdf" loext:target-type="3">[Hisoft]</text:bibliography-mark></text:span></text:p>
          </table:table-cell>
        </table:table-row>
        <table:table-row>
          <table:table-cell table:style-name="Tabelle2.A2" office:value-type="string">
            <text:p text:style-name="P42">05/2025</text:p>
          </table:table-cell>
          <table:table-cell table:style-name="Tabelle2.A2" office:value-type="string">
            <text:p text:style-name="P6">Dietmar Uhlig</text:p>
          </table:table-cell>
          <table:table-cell table:style-name="Tabelle2.C2" office:value-type="string">
            <text:p text:style-name="P42">Fehler in den Bildern zu Anweisung und Block korrigiert</text:p>
          </table:table-cell>
        </table:table-row>
        <table:table-row>
          <table:table-cell table:style-name="Tabelle2.A2" office:value-type="string">
            <text:p text:style-name="P52">12/2025</text:p>
          </table:table-cell>
          <table:table-cell table:style-name="Tabelle2.A2" office:value-type="string">
            <text:p text:style-name="P52">Dietmar Uhlig</text:p>
          </table:table-cell>
          <table:table-cell table:style-name="Tabelle2.C2" office:value-type="string">
            <text:p text:style-name="P52">Abschnitt zu PasEx ergänzt, Anpassungen an Version 5.2</text:p>
          </table:table-cell>
        </table:table-row>
        <table:table-row>
          <table:table-cell table:style-name="Tabelle2.A2" office:value-type="string">
            <text:p text:style-name="P54">04/2026</text:p>
          </table:table-cell>
          <table:table-cell table:style-name="Tabelle2.A2" office:value-type="string">
            <text:p text:style-name="P54">Dietmar Uhlig</text:p>
          </table:table-cell>
          <table:table-cell table:style-name="Tabelle2.C2" office:value-type="string">
            <text:p text:style-name="P54">Hinweis zu Compiler-Option P</text:p>
          </table:table-cell>
        </table:table-row>
        <table:table-row>
          <table:table-cell table:style-name="Tabelle2.A2" office:value-type="string">
            <text:p text:style-name="P56">05/2026</text:p>
          </table:table-cell>
          <table:table-cell table:style-name="Tabelle2.A2" office:value-type="string">
            <text:p text:style-name="P56">Dietmar Uhlig</text:p>
          </table:table-cell>
          <table:table-cell table:style-name="Tabelle2.C2" office:value-type="string">
            <text:p text:style-name="P56">Fehlerkorrektur im Beispiel für WRITE</text:p>
          </table:table-cell>
        </table:table-row>
      </table:table>
      <text:p text:style-name="Standard"/>
      <text:p text:style-name="P3"/>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50"><text:a xlink:type="simple" xlink:href="#__RefHeading___Toc5_1849558913" text:style-name="Index_20_Link" text:visited-style-name="Index_20_Link">1 Einleitung<text:tab/>5</text:a></text:p>
          <text:p text:style-name="P51"><text:a xlink:type="simple" xlink:href="#__RefHeading___Toc9_1849558913" text:style-name="Index_20_Link" text:visited-style-name="Index_20_Link">1.1 Zum Programm<text:tab/>5</text:a></text:p>
          <text:p text:style-name="P51"><text:a xlink:type="simple" xlink:href="#__RefHeading___Toc11_1849558913" text:style-name="Index_20_Link" text:visited-style-name="Index_20_Link">1.2 Was gehört zu KC-PASCAL<text:tab/>5</text:a></text:p>
          <text:p text:style-name="P51"><text:a xlink:type="simple" xlink:href="#__RefHeading___Toc13_1849558913" text:style-name="Index_20_Link" text:visited-style-name="Index_20_Link">1.3 Die Struktur<text:tab/>6</text:a></text:p>
          <text:p text:style-name="P51"><text:a xlink:type="simple" xlink:href="#__RefHeading___Toc15_1849558913" text:style-name="Index_20_Link" text:visited-style-name="Index_20_Link">1.4 Laden von KC-PASCAL<text:tab/>6</text:a></text:p>
          <text:p text:style-name="P51"><text:a xlink:type="simple" xlink:href="#__RefHeading___Toc8708_133429051" text:style-name="Index_20_Link" text:visited-style-name="Index_20_Link">1.5 PasEx2<text:tab/>7</text:a></text:p>
          <text:p text:style-name="P51"><text:a xlink:type="simple" xlink:href="#__RefHeading___Toc17_1849558913" text:style-name="Index_20_Link" text:visited-style-name="Index_20_Link">1.6 Start von KC-PASCAL<text:tab/>8</text:a></text:p>
          <text:p text:style-name="P51"><text:a xlink:type="simple" xlink:href="#__RefHeading___Toc19_1849558913" text:style-name="Index_20_Link" text:visited-style-name="Index_20_Link">1.7 Besondere Steuertasten<text:tab/>8</text:a></text:p>
          <text:p text:style-name="P51"><text:a xlink:type="simple" xlink:href="#__RefHeading___Toc21_1849558913" text:style-name="Index_20_Link" text:visited-style-name="Index_20_Link">1.8 Die Druckerschnittstelle<text:tab/>8</text:a></text:p>
          <text:p text:style-name="P51"><text:a xlink:type="simple" xlink:href="#__RefHeading___Toc23_1849558913" text:style-name="Index_20_Link" text:visited-style-name="Index_20_Link">1.9 Compilieren und Starten<text:tab/>9</text:a></text:p>
          <text:p text:style-name="P50"><text:a xlink:type="simple" xlink:href="#__RefHeading___Toc25_1849558913" text:style-name="Index_20_Link" text:visited-style-name="Index_20_Link">2 Syntax<text:tab/>11</text:a></text:p>
          <text:p text:style-name="P51"><text:a xlink:type="simple" xlink:href="#__RefHeading___Toc7979_2236345429" text:style-name="Index_20_Link" text:visited-style-name="Index_20_Link">2.1 Bezeichner (identifier)<text:tab/>11</text:a></text:p>
          <text:p text:style-name="P51"><text:a xlink:type="simple" xlink:href="#__RefHeading___Toc27_1849558913" text:style-name="Index_20_Link" text:visited-style-name="Index_20_Link">2.2 Typisierung<text:tab/>11</text:a></text:p>
          <text:p text:style-name="P51"><text:a xlink:type="simple" xlink:href="#__RefHeading___Toc29_1849558913" text:style-name="Index_20_Link" text:visited-style-name="Index_20_Link">2.3 Natürliche Zahl (unsigned integer)<text:tab/>12</text:a></text:p>
          <text:p text:style-name="P51"><text:a xlink:type="simple" xlink:href="#__RefHeading___Toc31_1849558913" text:style-name="Index_20_Link" text:visited-style-name="Index_20_Link">2.4 Vorzeichenlose Zahl (unsigned number)<text:tab/>12</text:a></text:p>
          <text:p text:style-name="P51"><text:a xlink:type="simple" xlink:href="#__RefHeading___Toc33_1849558913" text:style-name="Index_20_Link" text:visited-style-name="Index_20_Link">2.5 Vorzeichenlose Konstante (unsigned constant)<text:tab/>13</text:a></text:p>
          <text:p text:style-name="P51"><text:a xlink:type="simple" xlink:href="#__RefHeading___Toc35_1849558913" text:style-name="Index_20_Link" text:visited-style-name="Index_20_Link">2.6 Konstante (constant)<text:tab/>13</text:a></text:p>
          <text:p text:style-name="P51"><text:a xlink:type="simple" xlink:href="#__RefHeading___Toc37_1849558913" text:style-name="Index_20_Link" text:visited-style-name="Index_20_Link">2.7 Einfacher Typ (simple type)<text:tab/>14</text:a></text:p>
          <text:p text:style-name="P51"><text:a xlink:type="simple" xlink:href="#__RefHeading___Toc39_1849558913" text:style-name="Index_20_Link" text:visited-style-name="Index_20_Link">2.8 Typ (type)<text:tab/>14</text:a></text:p>
          <text:p text:style-name="P51"><text:a xlink:type="simple" xlink:href="#__RefHeading___Toc47_1849558913" text:style-name="Index_20_Link" text:visited-style-name="Index_20_Link">2.9 Feldliste (field list)<text:tab/>16</text:a></text:p>
          <text:p text:style-name="P51"><text:a xlink:type="simple" xlink:href="#__RefHeading___Toc49_1849558913" text:style-name="Index_20_Link" text:visited-style-name="Index_20_Link">2.10 Variable (variable)<text:tab/>16</text:a></text:p>
          <text:p text:style-name="P51"><text:a xlink:type="simple" xlink:href="#__RefHeading___Toc51_1849558913" text:style-name="Index_20_Link" text:visited-style-name="Index_20_Link">2.11 Faktor (factor)<text:tab/>17</text:a></text:p>
          <text:p text:style-name="P51"><text:a xlink:type="simple" xlink:href="#__RefHeading___Toc53_1849558913" text:style-name="Index_20_Link" text:visited-style-name="Index_20_Link">2.12 Term<text:tab/>18</text:a></text:p>
          <text:p text:style-name="P51"><text:a xlink:type="simple" xlink:href="#__RefHeading___Toc55_1849558913" text:style-name="Index_20_Link" text:visited-style-name="Index_20_Link">2.13 Einfacher Ausdruck (simple expression)<text:tab/>18</text:a></text:p>
          <text:p text:style-name="P51"><text:a xlink:type="simple" xlink:href="#__RefHeading___Toc57_1849558913" text:style-name="Index_20_Link" text:visited-style-name="Index_20_Link">2.14 Ausdruck (expression)<text:tab/>18</text:a></text:p>
          <text:p text:style-name="P51"><text:a xlink:type="simple" xlink:href="#__RefHeading___Toc59_1849558913" text:style-name="Index_20_Link" text:visited-style-name="Index_20_Link">2.15 Parameterliste (parameter list)<text:tab/>19</text:a></text:p>
          <text:p text:style-name="P51"><text:a xlink:type="simple" xlink:href="#__RefHeading___Toc61_1849558913" text:style-name="Index_20_Link" text:visited-style-name="Index_20_Link">2.16 Anweisung (statement)<text:tab/>19</text:a></text:p>
          <text:p text:style-name="P51"><text:a xlink:type="simple" xlink:href="#__RefHeading___Toc63_1849558913" text:style-name="Index_20_Link" text:visited-style-name="Index_20_Link">2.17 FOR-Anweisung<text:tab/>19</text:a></text:p>
          <text:p text:style-name="P51"><text:a xlink:type="simple" xlink:href="#__RefHeading___Toc65_1849558913" text:style-name="Index_20_Link" text:visited-style-name="Index_20_Link">2.18 GOTO-Anweisung<text:tab/>21</text:a></text:p>
          <text:p text:style-name="P51"><text:a xlink:type="simple" xlink:href="#__RefHeading___Toc69_1849558913" text:style-name="Index_20_Link" text:visited-style-name="Index_20_Link">2.19 Block<text:tab/>21</text:a></text:p>
          <text:p text:style-name="P51"><text:a xlink:type="simple" xlink:href="#__RefHeading___Toc67_1849558913" text:style-name="Index_20_Link" text:visited-style-name="Index_20_Link">2.20 Vorwärts-Bezüge<text:tab/>22</text:a></text:p>
          <text:p text:style-name="P51"><text:a xlink:type="simple" xlink:href="#__RefHeading___Toc8102_3364067021" text:style-name="Index_20_Link" text:visited-style-name="Index_20_Link">2.21 Programme<text:tab/>22</text:a></text:p>
          <text:p text:style-name="P51"><text:a xlink:type="simple" xlink:href="#__RefHeading___Toc71_1849558913" text:style-name="Index_20_Link" text:visited-style-name="Index_20_Link">2.22 Konstanten<text:tab/>22</text:a></text:p>
          <text:p text:style-name="P51"><text:a xlink:type="simple" xlink:href="#__RefHeading___Toc6613_1452676818" text:style-name="Index_20_Link" text:visited-style-name="Index_20_Link">2.23 Typen<text:tab/>22</text:a></text:p>
          <text:p text:style-name="P50"><text:a xlink:type="simple" xlink:href="#__RefHeading___Toc73_1849558913" text:style-name="Index_20_Link" text:visited-style-name="Index_20_Link">3 Prozeduren und Funktionen<text:tab/>23</text:a></text:p>
          <text:p text:style-name="P51"><text:a xlink:type="simple" xlink:href="#__RefHeading___Toc75_1849558913" text:style-name="Index_20_Link" text:visited-style-name="Index_20_Link">3.1 Ein- und Ausgabe-Prozeduren<text:tab/>23</text:a></text:p>
          <text:p text:style-name="P51"><text:a xlink:type="simple" xlink:href="#__RefHeading___Toc77_1849558913" text:style-name="Index_20_Link" text:visited-style-name="Index_20_Link">3.2 Konvertierungsfunktionen<text:tab/>27</text:a></text:p>
          <text:p text:style-name="P51"><text:a xlink:type="simple" xlink:href="#__RefHeading___Toc79_1849558913" text:style-name="Index_20_Link" text:visited-style-name="Index_20_Link">3.3 Arithmetische Funktionen<text:tab/>28</text:a></text:p>
          <text:p text:style-name="P51"><text:a xlink:type="simple" xlink:href="#__RefHeading___Toc81_1849558913" text:style-name="Index_20_Link" text:visited-style-name="Index_20_Link">3.4 Dynamischer Speicher<text:tab/>29</text:a></text:p>
          <text:p text:style-name="P51"><text:a xlink:type="simple" xlink:href="#__RefHeading___Toc6667_1452676818" text:style-name="Index_20_Link" text:visited-style-name="Index_20_Link">3.5 Systemnahe Routinen<text:tab/>30</text:a></text:p>
          <text:p text:style-name="P51"><text:a xlink:type="simple" xlink:href="#__RefHeading___Toc6683_1452676818" text:style-name="Index_20_Link" text:visited-style-name="Index_20_Link">3.6 Datei-Routinen<text:tab/>31</text:a></text:p>
          <text:p text:style-name="P51"><text:a xlink:type="simple" xlink:href="#__RefHeading___Toc83_1849558913" text:style-name="Index_20_Link" text:visited-style-name="Index_20_Link">3.7 Manipulation von INTEGER-Zahlen<text:tab/>32</text:a></text:p>
          <text:p text:style-name="P51"><text:a xlink:type="simple" xlink:href="#__RefHeading___Toc85_1849558913" text:style-name="Index_20_Link" text:visited-style-name="Index_20_Link">3.8 Graphikprozeduren<text:tab/>33</text:a></text:p>
          <text:p text:style-name="P51"><text:a xlink:type="simple" xlink:href="#__RefHeading___Toc87_1849558913" text:style-name="Index_20_Link" text:visited-style-name="Index_20_Link">3.9 Weitere vordefinierte Funktionen<text:tab/>34</text:a></text:p>
          <text:p text:style-name="P50"><text:a xlink:type="simple" xlink:href="#__RefHeading___Toc89_1849558913" text:style-name="Index_20_Link" text:visited-style-name="Index_20_Link"><text:soft-page-break/>4 Kommentare und Compiler-Steuerzeichen<text:tab/>35</text:a></text:p>
          <text:p text:style-name="P51"><text:a xlink:type="simple" xlink:href="#__RefHeading___Toc91_1849558913" text:style-name="Index_20_Link" text:visited-style-name="Index_20_Link">4.1 Kommentare<text:tab/>35</text:a></text:p>
          <text:p text:style-name="P51"><text:a xlink:type="simple" xlink:href="#__RefHeading___Toc93_1849558913" text:style-name="Index_20_Link" text:visited-style-name="Index_20_Link">4.2 Compiler-Steuerzeichen<text:tab/>35</text:a></text:p>
          <text:p text:style-name="P50"><text:a xlink:type="simple" xlink:href="#__RefHeading___Toc95_1849558913" text:style-name="Index_20_Link" text:visited-style-name="Index_20_Link">5 Der eingebaute Editor<text:tab/>38</text:a></text:p>
          <text:p text:style-name="P51"><text:a xlink:type="simple" xlink:href="#__RefHeading___Toc97_1849558913" text:style-name="Index_20_Link" text:visited-style-name="Index_20_Link">5.1 Einführung<text:tab/>38</text:a></text:p>
          <text:p text:style-name="P51"><text:a xlink:type="simple" xlink:href="#__RefHeading___Toc99_1849558913" text:style-name="Index_20_Link" text:visited-style-name="Index_20_Link">5.2 Editierkommandos<text:tab/>39</text:a></text:p>
          <text:p text:style-name="P50"><text:a xlink:type="simple" xlink:href="#__RefHeading___Toc115_1849558913" text:style-name="Index_20_Link" text:visited-style-name="Index_20_Link">6 Fehlermeldungen<text:tab/>45</text:a></text:p>
          <text:p text:style-name="P51"><text:a xlink:type="simple" xlink:href="#__RefHeading___Toc117_1849558913" text:style-name="Index_20_Link" text:visited-style-name="Index_20_Link">6.1 Compiler-Fehlermeldungen<text:tab/>45</text:a></text:p>
          <text:p text:style-name="P51"><text:a xlink:type="simple" xlink:href="#__RefHeading___Toc119_1849558913" text:style-name="Index_20_Link" text:visited-style-name="Index_20_Link">6.2 Runtime-Fehlermeldungen<text:tab/>46</text:a></text:p>
          <text:p text:style-name="P50"><text:a xlink:type="simple" xlink:href="#__RefHeading___Toc121_1849558913" text:style-name="Index_20_Link" text:visited-style-name="Index_20_Link">7 Reservierte Worte und vordefinierte Namen<text:tab/>48</text:a></text:p>
          <text:p text:style-name="P51"><text:a xlink:type="simple" xlink:href="#__RefHeading___Toc123_1849558913" text:style-name="Index_20_Link" text:visited-style-name="Index_20_Link">7.1 Reservierte Worte<text:tab/>48</text:a></text:p>
          <text:p text:style-name="P51"><text:a xlink:type="simple" xlink:href="#__RefHeading___Toc125_1849558913" text:style-name="Index_20_Link" text:visited-style-name="Index_20_Link">7.2 Spezialsymbole<text:tab/>48</text:a></text:p>
          <text:p text:style-name="P51"><text:a xlink:type="simple" xlink:href="#__RefHeading___Toc127_1849558913" text:style-name="Index_20_Link" text:visited-style-name="Index_20_Link">7.3 Vordefinierte Namen<text:tab/>48</text:a></text:p>
          <text:p text:style-name="P50"><text:a xlink:type="simple" xlink:href="#__RefHeading___Toc129_1849558913" text:style-name="Index_20_Link" text:visited-style-name="Index_20_Link">8 Beispiele<text:tab/>49</text:a></text:p>
          <text:p text:style-name="P51"><text:a xlink:type="simple" xlink:href="#__RefHeading___Toc131_1849558913" text:style-name="Index_20_Link" text:visited-style-name="Index_20_Link">8.1 Beispiel einer „DO – WHILE – Konstruktion“<text:tab/>49</text:a></text:p>
          <text:p text:style-name="P51"><text:a xlink:type="simple" xlink:href="#__RefHeading___Toc133_1849558913" text:style-name="Index_20_Link" text:visited-style-name="Index_20_Link">8.2 Beispiel "Demonstration von Funktionen und Prozeduren"<text:tab/>49</text:a></text:p>
          <text:p text:style-name="P51"><text:a xlink:type="simple" xlink:href="#__RefHeading___Toc135_1849558913" text:style-name="Index_20_Link" text:visited-style-name="Index_20_Link">8.3 Beispiel "Erzeugen von Zufallszahlen"<text:tab/>49</text:a></text:p>
          <text:p text:style-name="P51"><text:a xlink:type="simple" xlink:href="#__RefHeading___Toc8710_133429051" text:style-name="Index_20_Link" text:visited-style-name="Index_20_Link">8.4 Beispiel TOUT und TIN<text:tab/>50</text:a></text:p>
        </text:index-body>
      </text:table-of-content>
      <text:p text:style-name="Standard"/>
      <text:h text:style-name="P57" text:outline-level="1"><text:bookmark-start text:name="__RefHeading___Toc5_1849558913"/>Einleitung<text:bookmark-end text:name="__RefHeading___Toc5_1849558913"/></text:h>
      <text:h text:style-name="Heading_20_2" text:outline-level="2"><text:bookmark-start text:name="__RefHeading___Toc9_1849558913"/>Zum Programm<text:bookmark-end text:name="__RefHeading___Toc9_1849558913"/></text:h>
      <text:p text:style-name="Text_20_body">KC-PASCAL ist eine schnelle, leicht bedienbare und leistungsfähige Pascal-Version für die Kleincomputer KC85/1, KC85/2 und KC85/3, sowie für alle CP/M-kompatiblen Systeme auf Computern wie A5120, A5130 und PC1715. <text:span text:style-name="T54">Allerdings wird KC-Pascal ab Version 5.2 nur noch für die CAOS-Betriebsart der Mühlhausener KCs weiterentwickelt. </text:span>Sie können jedes auf einem Kleincomputertyp erstellte Pascal-Quellprogramm auch auf einem anderen Kleincomputer einlesen und compilieren. Dadurch sind Sie in der Lage, lauffähige Maschinenprogramme für alle Kleincomputertypen zu erzeugen (s. <text:span text:style-name="T5">T</text:span>-Kommando).</text:p>
      <text:p text:style-name="Text_20_body">Die Version für CP/M-kompatible Computer soll Ihnen gestatten, auf komfortableren Systemen KC-PASCAL-Programme zu erstellen, zu testen, zu drucken und zu speichern. Dabei werden alle kassettenorientierten Funktionen der Kleincomputer mittels Diskettenspeicher realisiert.</text:p>
      <text:p text:style-name="Text_20_body">Dem vorliegenden Compiler liegt die Version HP4S (HISOFT) zugrunde. Abweichungen von der im "PASCAL User Manual and Report" (Jensen/Wirth) gegebenen Beschreibung sind:</text:p>
      <text:list text:style-name="L1">
        <text:list-item>
          <text:p text:style-name="P69"><text:span text:style-name="Source_20_Text">FILE</text:span>s sind nicht implementiert, aber Variablen können auf Band gespeichert werden.</text:p>
        </text:list-item>
        <text:list-item>
          <text:p text:style-name="P69">Ein <text:span text:style-name="Source_20_Text">RECORD</text:span>-Typ darf keinen <text:span text:style-name="Source_20_Text">VARIANT</text:span>-Teil enthalten</text:p>
        </text:list-item>
        <text:list-item>
          <text:p text:style-name="P69"><text:span text:style-name="Source_20_Text">PROCEDURE</text:span>s und <text:span text:style-name="Source_20_Text">FUNCTION</text:span><text:span text:style-name="T7">s</text:span> sind nicht als Parameter zugelassen.</text:p>
        </text:list-item>
      </text:list>
      <text:p text:style-name="Text_20_body">Gegenüber den Vorgängerversionen PASCAL V4.2 und PASCAL V4.3 wurden neue Funktionen eingebaut (Compiler Option <text:span text:style-name="Source_20_Text">P</text:span>, Editor-Kommandos <text:span text:style-name="Source_20_Text">V</text:span>, <text:span text:style-name="Source_20_Text">X</text:span> und <text:span text:style-name="Source_20_Text">Z</text:span>). Mit dem Kommando '<text:span text:style-name="Source_20_Text">O</text:span>' ist es jetzt möglich, Turbo-Pascal-Quellen im KC weiter zu verarbeiten, Darüber hinaus können Sie jetzt mit 32 KByte oder 48 KByte Arbeitsspeicher entwickelte und mittels Kommando <text:span text:style-name="Source_20_Text">T</text:span> übersetzte Programme auch auf Systemen mit nur 16 Kbyte abarbeiten (ab Version 4.3; es sei denn, das COM-File ist länger). Alle System- und Fehlermeldungen erscheinen in deutscher Sprache.</text:p>
      <text:p text:style-name="Text_20_body">Wesentliche Verbesserungen sind durch die neuen vordefinierten Funktionen und Prozeduren zur Manipulation von <text:span text:style-name="Source_20_Text">INTEGER</text:span>-Zahlen sowie für die graphische Arbeit und durch die vordefinierte Konstante <text:span text:style-name="Source_20_Text">P</text:span><text:span text:style-name="Source_20_Text"><text:span text:style-name="T7">I</text:span></text:span> gegeben (<text:span text:style-name="Source_20_Text">PLOT</text:span>, <text:span text:style-name="Source_20_Text">CLRPLOT</text:span>, <text:span text:style-name="Source_20_Text">SETC</text:span>, <text:span text:style-name="Source_20_Text">GETC</text:span>, <text:span text:style-name="Source_20_Text">GOTOXY</text:span>, <text:span text:style-name="Source_20_Text">KEYPRESSED</text:span>, <text:span text:style-name="Source_20_Text">PI</text:span>, <text:span text:style-name="Source_20_Text">SWAP</text:span>, <text:span text:style-name="Source_20_Text">HI</text:span>, <text:span text:style-name="Source_20_Text">LO</text:span> usw.)</text:p>
      <text:p text:style-name="Text_20_body">Weiterhin wurde der Editor verbessert und der Zufallszahlengenerator durch eine leistungsfähigere Version ersetzt.</text:p>
      <text:h text:style-name="Heading_20_2" text:outline-level="2"><text:bookmark-start text:name="__RefHeading___Toc11_1849558913"/>Was gehört zu KC-PASCAL<text:bookmark-end text:name="__RefHeading___Toc11_1849558913"/></text:h>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text:span text:style-name="T55">PASENTRY.COM</text:span></text:span></text:p>
          </table:table-cell>
          <table:table-cell table:style-name="Tabelle3.A1" office:value-type="string">
            <text:p text:style-name="P45">KC-PASCAL Kaltstart für CP/M-kompatible Systeme (Diskette)</text:p>
          </table:table-cell>
        </table:table-row>
        <table:table-row>
          <table:table-cell table:style-name="Tabelle3.A1" office:value-type="string">
            <text:p text:style-name="Table_20_Contents"><text:span text:style-name="Source_20_Text"><text:span text:style-name="T55">PASREC.COM</text:span></text:span></text:p>
          </table:table-cell>
          <table:table-cell table:style-name="Tabelle3.A1" office:value-type="string">
            <text:p text:style-name="P45">KC-PASCAL Warmstart für CP/M-kompatible Systeme (Diskette)</text:p>
          </table:table-cell>
        </table:table-row>
        <text:soft-page-break/>
        <table:table-row>
          <table:table-cell table:style-name="Tabelle3.A1" office:value-type="string">
            <text:p text:style-name="Table_20_Contents"><text:span text:style-name="Source_20_Text"><text:span text:style-name="T55">PASCAL41.COM</text:span></text:span></text:p>
          </table:table-cell>
          <table:table-cell table:style-name="Tabelle3.A1" office:value-type="string">
            <text:p text:style-name="P45">KC-PASCAL für KC85/1 (Kassette)</text:p>
          </table:table-cell>
        </table:table-row>
        <table:table-row>
          <table:table-cell table:style-name="Tabelle3.A1" office:value-type="string">
            <text:p text:style-name="Table_20_Contents"><text:span text:style-name="Source_20_Text"><text:span text:style-name="T55">PASCAL42.COM</text:span></text:span></text:p>
          </table:table-cell>
          <table:table-cell table:style-name="Tabelle3.A1" office:value-type="string">
            <text:p text:style-name="Table_20_Contents"><text:span text:style-name="T55">KC-PASCAL für KC85/2 und KC85/3 (Kassette) (wie oben, aber mit </text:span><text:span text:style-name="Source_20_Text"><text:span text:style-name="T55">SETC</text:span></text:span><text:span text:style-name="T55">, </text:span><text:span text:style-name="Source_20_Text"><text:span text:style-name="T55">GETC</text:span></text:span><text:span text:style-name="T55">, </text:span><text:span text:style-name="Source_20_Text"><text:span text:style-name="T55">PLOT</text:span></text:span><text:span text:style-name="T55">, </text:span><text:span text:style-name="Source_20_Text"><text:span text:style-name="T55">CLRPLOT</text:span></text:span><text:span text:style-name="T55">)</text:span></text:p>
          </table:table-cell>
        </table:table-row>
        <table:table-row>
          <table:table-cell table:style-name="Tabelle3.A1" office:value-type="string">
            <text:p text:style-name="Table_20_Contents"><text:span text:style-name="Source_20_Text"><text:span text:style-name="T55">PASCAL43.COM</text:span></text:span></text:p>
          </table:table-cell>
          <table:table-cell table:style-name="Tabelle3.A1" office:value-type="string">
            <text:p text:style-name="Table_20_Contents"><text:span text:style-name="T55">KC-PASCAL für KC85/3 (Kassette) (wie oben, aber zusätzlich </text:span><text:span text:style-name="Source_20_Text"><text:span text:style-name="T55">LINEPLOT</text:span></text:span><text:span text:style-name="T55">, </text:span><text:span text:style-name="Source_20_Text"><text:span text:style-name="T55">CIRCLE</text:span></text:span><text:span text:style-name="T55">)</text:span></text:p>
          </table:table-cell>
        </table:table-row>
        <table:table-row>
          <table:table-cell table:style-name="Tabelle3.A1" office:value-type="string">
            <text:p text:style-name="Table_20_Contents"><text:span text:style-name="Source_20_Text">PASCAL</text:span><text:span text:style-name="Source_20_Text"><text:span text:style-name="T54">52</text:span></text:span><text:span text:style-name="Source_20_Text">.</text:span><text:span text:style-name="Source_20_Text"><text:span text:style-name="T54">KCC</text:span></text:span></text:p>
          </table:table-cell>
          <table:table-cell table:style-name="Tabelle3.A1" office:value-type="string">
            <text:p text:style-name="Table_20_Contents">KC-PASCAL für KC85/3, /<text:span text:style-name="T54">4 und /5</text:span> (<text:span text:style-name="T54">enthält</text:span> <text:span text:style-name="Source_20_Text"><text:span text:style-name="T54">PasEx2</text:span></text:span>)</text:p>
          </table:table-cell>
        </table:table-row>
      </table:table>
      <text:h text:style-name="Heading_20_2" text:outline-level="2"><text:bookmark-start text:name="__RefHeading___Toc13_1849558913"/>Die Struktur<text:bookmark-end text:name="__RefHeading___Toc13_1849558913"/></text:h>
      <text:p text:style-name="Text_20_body">KC-PASCAL besteht aus verschiedenen Modulen und Tabellenbereichen. Die Reihenfolge der Programmteile und Bereiche ist nachfolgend dargestellt.</text:p>
      <text:list text:style-name="L2">
        <text:list-item>
          <text:p text:style-name="P68">Laufzeitmodul (Runtimes)</text:p>
        </text:list-item>
        <text:list-item>
          <text:p text:style-name="P68">Puffer für mit '<text:span text:style-name="Source_20_Text">T</text:span>' übersetzte Programme</text:p>
        </text:list-item>
        <text:list-item>
          <text:p text:style-name="P68">Editor</text:p>
        </text:list-item>
        <text:list-item>
          <text:p text:style-name="P68">Compiler</text:p>
        </text:list-item>
        <text:list-item>
          <text:p text:style-name="P68">Quelltext</text:p>
        </text:list-item>
        <text:list-item>
          <text:p text:style-name="P68">mittels '<text:span text:style-name="Source_20_Text">C</text:span>' übersetzte Programme</text:p>
        </text:list-item>
        <text:list-item>
          <text:p text:style-name="P68">Variablenstack</text:p>
        </text:list-item>
      </text:list>
      <text:p text:style-name="List_20_Contents"/>
      <text:p text:style-name="Text_20_body">Der Compiler benötigt einschließlich Editor und Laufzeitmodul etwa 20 KByte Speicherplatz. Das Laufzeitmodul umfasst einschließlich der Systemanpassung und einiger Pufferbereiche ca. 5 KByte.</text:p>
      <text:h text:style-name="Heading_20_2" text:outline-level="2"><text:bookmark-start text:name="__RefHeading___Toc15_1849558913"/>Laden von KC-PASCAL<text:bookmark-end text:name="__RefHeading___Toc15_1849558913"/></text:h>
      <text:p text:style-name="Text_20_body">Bei Verwendung eines KC85/1 ist der Einsatz eines RAM-Erweiterungsmodules 690 003.5 von 16 KByte erforderlich.</text:p>
      <text:p text:style-name="Text_20_body">Ein weiteres RAM-Modul (insgesamt 32 KByte Zusatz-RAM) wird automatisch erkannt und kann zur Vergrößerung des Arbeitsspeichers eingesetzt werden. Der Compiler wird ab Adresse 0300H in den Arbeitsspeicher geladen.</text:p>
      <text:p text:style-name="Text_20_body">Beim KC85/2 oder KC85/3 ist eine Speichererweiterung M022 (16 KByte) im Modulschacht 8 erforderlich. Ein weiteres Modul M022 oder ein 64-KByte-RAM-Modul kann in den Modulschacht C gesteckt werden, womit sich insgesamt 48 Kbyte Speicher nutzen lassen (etwa 1000 PASCAL-Anweisungszeilen). Das zusätzliche RAM-Modul muss vor Verwendung aktiviert werden. Dazu wird im Betriebssystem folgendes Kommando eingegeben:</text:p>
      <text:p text:style-name="Preformatted_20_Text">SWITCH C 83</text:p>
      <text:p text:style-name="Text_20_body">Der Compiler wird von Kassette ab Adresse 02<text:span text:style-name="T54">8</text:span>0H in den Arbeitsspeicher des KC85/2 oder KC85/3 geladen.</text:p>
      <text:p text:style-name="Text_20_body">Die CP/M-kompatible Version wird wie üblich durch Eingabe des Namens aufgerufen (<text:span text:style-name="Source_20_Text">PASENTRY</text:span>, <text:span text:style-name="Source_20_Text">PASREC</text:span>).</text:p>
      <text:h text:style-name="Heading_20_2" text:outline-level="2"><text:bookmark-start text:name="__RefHeading___Toc8708_133429051"/><text:soft-page-break/>PasEx<text:span text:style-name="T63">2</text:span><text:bookmark-end text:name="__RefHeading___Toc8708_133429051"/></text:h>
      <text:p text:style-name="P47"><text:span text:style-name="Source_20_Text">PasEx</text:span><text:span text:style-name="T56"> ist eine Erweiterung, um </text:span><text:span text:style-name="T58">unter</text:span><text:span text:style-name="T56"> CAOS </text:span><text:span text:style-name="T58">bis Version 4.</text:span><text:span text:style-name="T63">5</text:span><text:span text:style-name="T56"> neben der Kassette auch die Diskette oder ab </text:span><text:span text:style-name="Source_20_Text">PasEx</text:span><text:span text:style-name="T56"> Version 2 das Modul M052 (USB-Stick) nutzen zu können. Ab KC-PASCAL Version 5.1 wird </text:span><text:span text:style-name="T57">die Erweiterung</text:span><text:span text:style-name="T56"> bereits zusammen mit PASCAL geladen und initialisiert. </text:span><text:span text:style-name="T58">Ab CAOS Version 4.</text:span><text:span text:style-name="T63">6</text:span><text:span text:style-name="T58"> wird </text:span><text:span text:style-name="Source_20_Text">PasEx</text:span><text:span text:style-name="T58"> nicht mehr benötigt. Bei der Initialisierung erscheint ein Hinweis darauf, das Device-System von CAOS 4.</text:span><text:span text:style-name="T63">6</text:span><text:span text:style-name="T58"> und höher zu verwenden.</text:span></text:p>
      <text:p text:style-name="P47"><text:span text:style-name="Source_20_Text">PasEx</text:span><text:span text:style-name="T59"> benutzt dieselben Routinen wie DevEx </text:span><text:span text:style-name="T61">und lädt alle notwendigen Programmteile und Daten in den IRM ab Adresse 0BA00h</text:span><text:span text:style-name="T59">. Um die SUTAB für USB anzupassen wird im M052-ROM nach „</text:span><text:span text:style-name="Source_20_Text">edas</text:span><text:span text:style-name="T59">“ gesucht und dieses aufgerufen. „</text:span><text:span text:style-name="Source_20_Text">edas</text:span><text:span text:style-name="T59">“ selbst sucht zuerst in den Modulen und bei M052-ROM ab Version 3 auch im RAM nach </text:span><text:span text:style-name="Source_20_Text">EDAS</text:span><text:span text:style-name="T59">. Wenn vorhanden, wird es aufgerufen. Andernfalls bricht die Initialisierung ab. </text:span><text:span text:style-name="Source_20_Text">PasEx2</text:span><text:span text:style-name="T59"> versucht, ein RAM-</text:span><text:span text:style-name="Source_20_Text">EDAS</text:span><text:span text:style-name="T59"> vorzugaukeln. Das funktioniert am besten mit einem aktuellen M052-ROM und ohne EDAS-Modul (M027, M062 oder vergleich</text:span><text:span text:style-name="T66">­</text:span><text:span text:style-name="T59">bare). Dann merkt der Anwender von dieser Krückenlösung nichts.</text:span></text:p>
      <text:p text:style-name="P47"><text:span text:style-name="T59">Falls ein </text:span><text:span text:style-name="Source_20_Text">EDAS</text:span><text:span text:style-name="T59"> im ROM-Modul gefunden wird, startet es automatisch. </text:span><text:span text:style-name="T65">Keine Panik - hier</text:span><text:span text:style-name="T59"> muss man die Speicherabfragen mit Enter quittieren und </text:span><text:span text:style-name="Source_20_Text">EDAS</text:span><text:span text:style-name="T59"> sofort manuell verlassen. </text:span><text:span text:style-name="T65">Man kann mit KC-PASCAL ohne Einschränkungen weiterarbeiten.</text:span></text:p>
      <text:p text:style-name="P47"><text:span text:style-name="T62">Mit dem CAOS-Menüpunkt </text:span><text:span text:style-name="Source_20_Text">PASDEV</text:span><text:span text:style-name="T62"> lässt sich das aktuelle Speichergerät anzeigen und ändern. </text:span><text:span text:style-name="T61">Beispiel:</text:span></text:p>
      <text:p text:style-name="Preformatted_20_Text">%PASDEV</text:p>
      <text:p text:style-name="Preformatted_20_Text">Dev 02 (0=Tape, 1=Floppy, 2=USB)</text:p>
      <text:p text:style-name="Preformatted_20_Text">%PASDEV 1</text:p>
      <text:p text:style-name="Preformatted_20_Text">Dev 01 (0=Tape, 1=Floppy, 2=USB) </text:p>
      <text:p text:style-name="Preformatted_20_Text"/>
      <text:p text:style-name="P47"><text:span text:style-name="T62">Nach einem Reset sollte das M052 mit </text:span><text:span text:style-name="Source_20_Text">SWITCH</text:span><text:span text:style-name="T62"> wieder aktiviert werden. </text:span><text:span text:style-name="T60">Wenn</text:span><text:span text:style-name="T62"> sich dann im KC-PASCAL keine Dateien laden oder speichern lassen, muss vor dem Wiedereintritt in </text:span><text:span text:style-name="T67">PASCAL</text:span><text:span text:style-name="T62"> der USB-Stick initialisiert werden. Das geht am einfachsten, indem man eine kleine Datei speichert:</text:span></text:p>
      <text:p text:style-name="Preformatted_20_Text">%usave 1 2</text:p>
      <text:p text:style-name="Preformatted_20_Text">Name :ABFALL</text:p>
      <text:p text:style-name="P49">02&gt;</text:p>
      <text:p text:style-name="Preformatted_20_Text">%PASENTRY</text:p>
      <text:p text:style-name="Preformatted_20_Text"/>
      <text:p text:style-name="P53">Innerhalb von KC-PASCAL l<text:span text:style-name="T67">a</text:span>ss<text:span text:style-name="T67">en</text:span> sich weder das Speichergerät ändern noch der Inhalt des USB-Sticks oder der Diskette anzeigen. Diese Operationen müssen auf CAOS-Ebene durchgeführt werden.</text:p>
      <text:p text:style-name="P47"><text:span text:style-name="Source_20_Text">PasEx2</text:span><text:span text:style-name="T64"> existiert auch als eigenständiges Programm, um einem </text:span><text:span text:style-name="T67">PASCAL</text:span><text:span text:style-name="T64">-Programm, das Dateioperationen ausführt, den Zugriff auf Diskette oder USB-Stick zu ermöglichen. </text:span><text:span text:style-name="Source_20_Text">PasEx2</text:span><text:span text:style-name="T64"> </text:span><text:span text:style-name="T67">sollte</text:span><text:span text:style-name="T64"> vor dem Pascal-Program</text:span><text:span text:style-name="T65">m</text:span><text:span text:style-name="T64"> geladen werden, </text:span><text:span text:style-name="T67">um eine Überschneidung im RAM zu vermeiden</text:span><text:span text:style-name="T64">. Es liegt im </text:span><text:span text:style-name="T67">Hauptspeicher</text:span><text:span text:style-name="T64"> ab Adresse 6000h und nach der Initialisierung im IRM (s.o.). Der RAM-Bereich ab 6000h ist nach der Initialisierung wieder frei.</text:span></text:p>
      <text:h text:style-name="Heading_20_2" text:outline-level="2"><text:bookmark-start text:name="__RefHeading___Toc17_1849558913"/><text:soft-page-break/>Start von KC-PASCAL<text:bookmark-end text:name="__RefHeading___Toc17_1849558913"/></text:h>
      <text:p text:style-name="P48">Der Start des KC-PASCAL erfolgt über das Kommando <text:span text:style-name="Source_20_Text">PASENTRY</text:span>. War der Compiler bereits gestartet und soll vorhandener Quelltext nicht gelöscht werden (z.B. nach zeitweiliger Rückkehr ins Betriebssystem), kann man mit dem Kommando <text:span text:style-name="Source_20_Text">PASREC</text:span> (auf Betriebssystemebene) in KC-PASCAL zurückkehren.</text:p>
      <text:h text:style-name="Heading_20_2" text:outline-level="2"><text:bookmark-start text:name="__RefHeading___Toc19_1849558913"/>Besondere Steuertasten<text:bookmark-end text:name="__RefHeading___Toc19_1849558913"/></text:h>
      <text:p text:style-name="Text_20_body">Folgende Tasten besitzen eine besondere oder abweichende Bedeutung in KC-PASCAL:</text:p>
      <table:table table:name="Tabelle4" table:style-name="Tabelle4">
        <table:table-column table:style-name="Tabelle4.A"/>
        <table:table-column table:style-name="Tabelle4.B"/>
        <table:table-column table:style-name="Tabelle4.C"/>
        <table:table-column table:style-name="Tabelle4.D"/>
        <table:table-header-rows>
          <table:table-row>
            <table:table-cell office:value-type="string">
              <text:p text:style-name="Table_20_Heading">KC 85/1</text:p>
            </table:table-cell>
            <table:table-cell office:value-type="string">
              <text:p text:style-name="Table_20_Heading">KC 85/2 /3</text:p>
            </table:table-cell>
            <table:table-cell office:value-type="string">
              <text:p text:style-name="Table_20_Heading">CP/M</text:p>
            </table:table-cell>
            <table:table-cell office:value-type="string">
              <text:p text:style-name="Table_20_Heading">Wirkung</text:p>
            </table:table-cell>
          </table:table-row>
        </table:table-header-rows>
        <table:table-row>
          <table:table-cell office:value-type="string">
            <text:p text:style-name="Table_20_Contents"><text:span text:style-name="Source_20_Text">ENTER</text:span></text:p>
          </table:table-cell>
          <table:table-cell office:value-type="string">
            <text:p text:style-name="Table_20_Contents"><text:span text:style-name="Source_20_Text">ENTER</text:span></text:p>
          </table:table-cell>
          <table:table-cell office:value-type="string">
            <text:p text:style-name="Table_20_Contents"><text:span text:style-name="Source_20_Text">ENTER</text:span></text:p>
          </table:table-cell>
          <table:table-cell office:value-type="string">
            <text:p text:style-name="Table_20_Contents">Zeile abschließen</text:p>
          </table:table-cell>
        </table:table-row>
        <table:table-row>
          <table:table-cell office:value-type="string">
            <text:p text:style-name="Table_20_Contents"><text:span text:style-name="Source_20_Text">←</text:span></text:p>
          </table:table-cell>
          <table:table-cell office:value-type="string">
            <text:p text:style-name="Table_20_Contents"><text:span text:style-name="Source_20_Text">←</text:span></text:p>
          </table:table-cell>
          <table:table-cell office:value-type="string">
            <text:p text:style-name="Table_20_Contents"><text:span text:style-name="Source_20_Text">CTL-H</text:span></text:p>
          </table:table-cell>
          <table:table-cell office:value-type="string">
            <text:p text:style-name="Table_20_Contents">löscht letztes eingegebenes Zeichen</text:p>
          </table:table-cell>
        </table:table-row>
        <table:table-row>
          <table:table-cell office:value-type="string">
            <text:p text:style-name="Table_20_Contents"><text:span text:style-name="Source_20_Text">^</text:span></text:p>
          </table:table-cell>
          <table:table-cell office:value-type="string">
            <text:p text:style-name="Table_20_Contents"><text:span text:style-name="Source_20_Text">^</text:span></text:p>
          </table:table-cell>
          <table:table-cell office:value-type="string">
            <text:p text:style-name="Table_20_Contents"><text:span text:style-name="Source_20_Text">CTL-I</text:span></text:p>
          </table:table-cell>
          <table:table-cell office:value-type="string">
            <text:p text:style-name="Table_20_Contents">zur nächsten TAB-Position</text:p>
          </table:table-cell>
        </table:table-row>
        <table:table-row>
          <table:table-cell office:value-type="string">
            <text:p text:style-name="Table_20_Contents"><text:span text:style-name="Source_20_Text">CL LN</text:span></text:p>
          </table:table-cell>
          <table:table-cell office:value-type="string">
            <text:p text:style-name="Table_20_Contents"><text:span text:style-name="Source_20_Text">Shift DEL</text:span></text:p>
          </table:table-cell>
          <table:table-cell office:value-type="string">
            <text:p text:style-name="Table_20_Contents"><text:span text:style-name="Source_20_Text">CTL-Y</text:span></text:p>
          </table:table-cell>
          <table:table-cell office:value-type="string">
            <text:p text:style-name="Table_20_Contents">löscht gesamte Zeile</text:p>
          </table:table-cell>
        </table:table-row>
        <table:table-row>
          <table:table-cell office:value-type="string">
            <text:p text:style-name="Table_20_Contents"><text:span text:style-name="Source_20_Text">CLS</text:span></text:p>
          </table:table-cell>
          <table:table-cell office:value-type="string">
            <text:p text:style-name="Table_20_Contents"><text:span text:style-name="Source_20_Text">Shift HOME</text:span></text:p>
          </table:table-cell>
          <table:table-cell office:value-type="string">
            <text:p text:style-name="Table_20_Contents"><text:span text:style-name="Source_20_Text">CTL-L</text:span></text:p>
          </table:table-cell>
          <table:table-cell office:value-type="string">
            <text:p text:style-name="Table_20_Contents">löscht den Bildschirm</text:p>
          </table:table-cell>
        </table:table-row>
        <table:table-row>
          <table:table-cell office:value-type="string">
            <text:p text:style-name="Table_20_Contents"><text:span text:style-name="Source_20_Text">STOP</text:span></text:p>
          </table:table-cell>
          <table:table-cell office:value-type="string">
            <text:p text:style-name="Table_20_Contents"><text:span text:style-name="Source_20_Text">BREAK</text:span></text:p>
          </table:table-cell>
          <table:table-cell office:value-type="string">
            <text:p text:style-name="Table_20_Contents"><text:span text:style-name="Source_20_Text">CTL-C</text:span></text:p>
          </table:table-cell>
          <table:table-cell office:value-type="string">
            <text:p text:style-name="Table_20_Contents">unterbricht das Listen oder bricht das Programm ab</text:p>
          </table:table-cell>
        </table:table-row>
        <table:table-row>
          <table:table-cell office:value-type="string">
            <text:p text:style-name="Table_20_Contents"><text:span text:style-name="Source_20_Text">CTL-P</text:span></text:p>
          </table:table-cell>
          <table:table-cell office:value-type="string">
            <text:p text:style-name="Table_20_Contents"><text:span text:style-name="Source_20_Text">HOME</text:span></text:p>
          </table:table-cell>
          <table:table-cell office:value-type="string">
            <text:p text:style-name="Table_20_Contents"><text:span text:style-name="Source_20_Text">CTL-P</text:span></text:p>
          </table:table-cell>
          <table:table-cell office:value-type="string">
            <text:p text:style-name="Table_20_Contents">Ausgabe auf Drucker EIN/AUS</text:p>
          </table:table-cell>
        </table:table-row>
        <table:table-row>
          <table:table-cell office:value-type="string">
            <text:p text:style-name="Table_20_Contents"><text:span text:style-name="Source_20_Text">INS</text:span></text:p>
          </table:table-cell>
          <table:table-cell office:value-type="string">
            <text:p text:style-name="Table_20_Contents"><text:span text:style-name="Source_20_Text">Shift SPACE</text:span></text:p>
          </table:table-cell>
          <table:table-cell office:value-type="string">
            <text:p text:style-name="Table_20_Contents"><text:span text:style-name="Source_20_Text">[</text:span></text:p>
          </table:table-cell>
          <table:table-cell office:value-type="string">
            <text:p text:style-name="Table_20_Contents">eckige Klammer auf</text:p>
          </table:table-cell>
        </table:table-row>
        <table:table-row>
          <table:table-cell office:value-type="string">
            <text:p text:style-name="Table_20_Contents"><text:span text:style-name="Source_20_Text">DEL</text:span></text:p>
          </table:table-cell>
          <table:table-cell office:value-type="string">
            <text:p text:style-name="Table_20_Contents"><text:span text:style-name="Source_20_Text">¬</text:span></text:p>
          </table:table-cell>
          <table:table-cell office:value-type="string">
            <text:p text:style-name="Table_20_Contents"><text:span text:style-name="Source_20_Text">]</text:span></text:p>
          </table:table-cell>
          <table:table-cell office:value-type="string">
            <text:p text:style-name="Table_20_Contents">eckige Klammer zu</text:p>
          </table:table-cell>
        </table:table-row>
      </table:table>
      <text:p text:style-name="Standard"/>
      <text:p text:style-name="Text_20_body">Alle Anweisungen müssen in Großschreibung angegeben werden. Beachten Sie bitte, dass beim KC85/2 Kleinbuchstaben zwar eingegeben werden können, aber als Großbuchstaben angezeigt werden. Der Compiler unterscheidet Namen streng nach Groß- und Kleinschreibung. Darüber hinaus werden die Zeichen '[' und ']' bei den Typen KC85/2 und KC85/3 nicht standardgemäß dargestellt.</text:p>
      <text:p text:style-name="Text_20_body">Ein Ladeprogramm für im KC-PASCAL-Format auf Band aufgenommene Daten und Programme ist im Laufzeitmodul des KC-PASCAL enthalten.</text:p>
      <text:h text:style-name="Heading_20_2" text:outline-level="2"><text:bookmark-start text:name="__RefHeading___Toc21_1849558913"/>Die Druckerschnittstelle<text:bookmark-end text:name="__RefHeading___Toc21_1849558913"/></text:h>
      <text:p text:style-name="Text">KC85/1</text:p>
      <text:p text:style-name="Text_20_body">Der Drucker ist vor Aufruf zu aktivieren (s. Handbuch KC85/1). Durch Betätigen von CTL-P wird der Drucker parallel zur Bildschirmausgabe geschalten.</text:p>
      <text:p text:style-name="Text">KC85/2, KC85/3</text:p>
      <text:p text:style-name="Text_20_body">Ein Drucker zur Ausgabe von Programmlistings oder anderen Daten kann über einen USER-Kanal des KC85/2 oder KC85/3 erfolgen. Dafür ist ein Modul M003 erforderlich. Das Treiberprogramm entnehmen Sie bitte dem Heft "Kleincomputer KC85 <text:span text:style-name="T9">–</text:span> Beschreibung zu M003 V24". Dazu sollte man das Modul in Schacht "C" stecken (M022 in Schacht "8"). Das Einschalten des linken Kanals erfolgt über das Kommando (auf Betriebssystemebene):</text:p>
      <text:p text:style-name="Text_20_body"><text:soft-page-break/><text:span text:style-name="Source_20_Text">V24 C 1 2 </text:span><text:span text:style-name="Source_20_Text"><text:span text:style-name="T12">&lt;ENTER&gt;</text:span></text:span></text:p>
      <text:p text:style-name="Text_20_body">Ist das Listing eines PASCAL-Programmes auf den Drucker ausgegeben worden, wird die Taste "<text:span text:style-name="Source_20_Text">HOME</text:span>" betätigt. Nochmaliges Betätigen schaltet den Drucker wieder ab. Die Ausgabe auf de<text:span text:style-name="T8">m</text:span> Bildschirm bleibt erhalten. <text:s/>Beim Compilieren wird der Drucker immer deaktiviert (s. auch Compiler-Option <text:span text:style-name="Source_20_Text">P</text:span>).</text:p>
      <text:p text:style-name="Text">CP/M</text:p>
      <text:p text:style-name="Text_20_body">Der Drucker wird wie üblich mit CTL-P aktiviert.</text:p>
      <text:p text:style-name="Text">KC85/1, KC85/2, KC85/3, CP/M</text:p>
      <text:p text:style-name="Text_20_body">Soll der Drucker innerhalb eines Programms ein- oder ausgeschalten werden, geschieht das mit dem Steuerzeichen 16 (10H) wie folgt:</text:p>
      <text:p text:style-name="Preformatted_20_Text">…</text:p>
      <text:p text:style-name="Preformatted_20_Text">100 WRITE(CHR(16));</text:p>
      <text:p text:style-name="Preformatted_20_Text">110 WRITELN('Jetzt ist der Drucker eingeschaltet!');</text:p>
      <text:p text:style-name="Preformatted_20_Text">120 WRITE(CHR(16));</text:p>
      <text:p text:style-name="Preformatted_20_Text">130 WRITELN('...und jetzt wieder aus!');</text:p>
      <text:p text:style-name="Preformatted_20_Text">…</text:p>
      <text:h text:style-name="Heading_20_2" text:outline-level="2"><text:bookmark-start text:name="__RefHeading___Toc23_1849558913"/>Compilieren und Starten<text:bookmark-end text:name="__RefHeading___Toc23_1849558913"/></text:h>
      <text:p text:style-name="Text_20_body">Der Compiler erzeugt nach dem Aufruf ein Listing der folgenden Form:</text:p>
      <text:p text:style-name="Preformatted_20_Text">aaaa nnnn <text:span text:style-name="T13">Quelltext-Zeile</text:span></text:p>
      <text:p text:style-name="Preformatted_20_Text"><text:span text:style-name="T13"/></text:p>
      <text:p text:style-name="Text_20_body"><text:span text:style-name="Source_20_Text">aaaa</text:span> ist die Adresse, an der der aus dieser Zeile generierte Code beginnt</text:p>
      <text:p text:style-name="Text_20_body"><text:span text:style-name="Source_20_Text">nnnn</text:span> ist die Zeilen-Nr. (führende Nullen werden unterdrückt)</text:p>
      <text:p text:style-name="Text_20_body">Das Listen kann durch BREAK unterbrochen werden, jede andere Taste setzt das Listen fort. Wird während des Compilierens ein Fehler festgestellt, erscheint die Meldung '<text:span text:style-name="Source_20_Text">*FEHLER*</text:span>', gefolgt von einem Pfeil, der unter dem Fehler erzeugenden Zeichen steht, und einer Fehlernummer (siehe Fehlerliste).</text:p>
      <text:p text:style-name="Text_20_body">Das Listen wird gestoppt, '<text:span text:style-name="Source_20_Text">E</text:span>' ermöglicht das Editieren der angezeigten Zeile, '<text:span text:style-name="Source_20_Text">P</text:span>' das Editieren der vorhergehenden Zeile (falls sie existiert), jede andere Taste setzt das Compilieren fort.</text:p>
      <text:p text:style-name="Text_20_body">Treten während des Compilierens sehr viele Fehler auf, sollten Sie unbedingt '<text:span text:style-name="Source_20_Text">E</text:span>' betätigen und mit <text:span text:style-name="Source_20_Text">ENTER</text:span> in den Editor zurückkehren. Sonst kann es vorkommen, dass der Compiler nicht wieder in den Editor "zurückfindet". Erwarten Sie bitte nicht, dass der Compiler alle Ihre Fehler exakt behandelt, sondern überprüfen Sie gegebenenfalls vorher Ihre Anweisungen!</text:p>
      <text:p text:style-name="Text_20_body">Wird während dem Compilieren eine Taste betätigt, folgt eine Unterbrechung. Mit <text:span text:style-name="Source_20_Text">BREAK</text:span> (<text:span text:style-name="Source_20_Text">CTL-C</text:span>) erfolgt der Abbruch, jede andere Taste setzt den Compilerlauf fort.</text:p>
      <text:p text:style-name="Text_20_body">Falls das Programm fehlerhaft endet (z. B. ohne '<text:span text:style-name="Source_20_Text">END.</text:span>'), erscheint die Meldung '<text:span text:style-name="Source_20_Text">Kein Text mehr!</text:span>', die Steuerung wird an den Editor übergeben.</text:p>
      <text:p text:style-name="Text_20_body"><text:soft-page-break/>Wenn die Compilierung erfolgreich abgeschlossen wird, das Programm aber Fehler enthält, wird die Zahl der ermittelten Fehler angezeigt und der Objekt-Code gelöscht. Nach fehlerfreier Compilierung erscheint die Frage '<text:span text:style-name="Source_20_Text">Lauf?</text:span>'. Soll das Programm sofort gestartet werden, muss mit '<text:span text:style-name="Source_20_Text">J</text:span>' geantwortet werden, sonst wird die Steuerung an den Editor übergeben.</text:p>
      <text:p text:style-name="Text_20_body">Die beim Lauf des Objekt-Codes möglichen Runtime-Fehler sind der entsprechenden Liste zu entnehmen.</text:p>
      <text:p text:style-name="Text_20_body">Der Programmlauf kann durch eine beliebige Taste unterbrochen werden. Anschließendes <text:span text:style-name="Source_20_Text">BREAK</text:span> bricht den Lauf ab, jede andere Taste setzt ihn fort.</text:p>
      <text:h text:style-name="P58" text:outline-level="1"><text:bookmark-start text:name="__RefHeading___Toc25_1849558913"/>Syntax<text:bookmark-end text:name="__RefHeading___Toc25_1849558913"/></text:h>
      <text:p text:style-name="P29">Soweit nicht ausdrücklich anders angegeben, entspricht die Implementierung der im "PASCAL User Manual and Report" (Jensen/ Wirth Second Edition) vorgegebenen.</text:p>
      <text:h text:style-name="Heading_20_2" text:outline-level="2"><text:bookmark-start text:name="__RefHeading___Toc7979_2236345429"/>Bezeichner <text:span text:style-name="T37">(identifier)</text:span><text:bookmark-end text:name="__RefHeading___Toc7979_2236345429"/></text:h>
      <text:p text:style-name="Text_20_body"><draw:g text:anchor-type="paragraph" draw:z-index="2" draw:name="Gruppenobjekt 1" draw:style-name="gr1"><draw:custom-shape draw:style-name="gr351" draw:text-style-name="P82" svg:width="3.001cm" svg:height="0.999cm" svg:x="6.974cm" svg:y="0.975cm"><text:p text:style-name="P81"><text:span text:style-name="T72">lett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 draw:text-style-name="P82" svg:width="3.001cm" svg:height="1.001cm" svg:x="6.974cm" svg:y="2.972cm"><text:p text:style-name="P81"><text:span text:style-name="T72">digi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 draw:text-style-name="P82" svg:width="3.001cm" svg:height="1.001cm" svg:x="2.725cm" svg:y="1.973cm"><text:p text:style-name="P81"><text:span text:style-name="T72">lett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2" draw:text-style-name="P74" svg:x1="1.225cm" svg:y1="2.473cm" svg:x2="2.725cm" svg:y2="2.473cm"><text:p/></draw:line><draw:line draw:style-name="gr353" draw:text-style-name="P74" svg:x1="5.724cm" svg:y1="2.473cm" svg:x2="12.724cm" svg:y2="2.473cm"><text:p/></draw:line><draw:line draw:style-name="gr6" draw:text-style-name="P74" svg:x1="10.726cm" svg:y1="2.471cm" svg:x2="10.726cm" svg:y2="1.471cm"><text:p/></draw:line><draw:line draw:style-name="gr354" draw:text-style-name="P74" svg:x1="10.725cm" svg:y1="1.471cm" svg:x2="9.975cm" svg:y2="1.471cm"><text:p/></draw:line><draw:line draw:style-name="gr355" draw:text-style-name="P74" svg:x1="6.225cm" svg:y1="1.471cm" svg:x2="6.225cm" svg:y2="2.471cm"><text:p/></draw:line><draw:line draw:style-name="gr6" draw:text-style-name="P74" svg:x1="6.975cm" svg:y1="1.471cm" svg:x2="6.225cm" svg:y2="1.471cm"><text:p/></draw:line><draw:line draw:style-name="gr6" draw:text-style-name="P74" svg:x1="10.726cm" svg:y1="2.473cm" svg:x2="10.726cm" svg:y2="3.473cm"><text:p/></draw:line><draw:line draw:style-name="gr356" draw:text-style-name="P74" svg:x1="10.725cm" svg:y1="3.473cm" svg:x2="9.975cm" svg:y2="3.473cm"><text:p/></draw:line><draw:line draw:style-name="gr6" draw:text-style-name="P74" svg:x1="6.975cm" svg:y1="3.473cm" svg:x2="6.225cm" svg:y2="3.473cm"><text:p/></draw:line><draw:line draw:style-name="gr357" draw:text-style-name="P74" svg:x1="6.225cm" svg:y1="3.473cm" svg:x2="6.225cm" svg:y2="2.473cm"><text:p/></draw:line></draw:g></text:p>
      <text:p text:style-name="P29"/>
      <text:p text:style-name="P29">Nur die ersten 10 Zeichen sind signifikant. Kleinbuchstaben werden nicht in Großbuchstaben umgewandelt, so dass z. B. die Namen HALLO, HAllo und hallo verschieden sind. Reservierte Worte und vordefinierte Namen dürfen nur in Großbuchstaben eingegeben werden.</text:p>
      <text:h text:style-name="Heading_20_2" text:outline-level="2"><text:bookmark-start text:name="__RefHeading___Toc27_1849558913"/>Typisierung<text:bookmark-end text:name="__RefHeading___Toc27_1849558913"/></text:h>
      <text:p text:style-name="Text_20_body">PASCAL erfordert eine relative strenge, durch den Nutzer festzulegende Typisierung (Definition) der verschiedenen Datenelemente. Es gibt in verschiedenen PASCAL-Implementierungen zwei verschiedene Arten der Typisierung:</text:p>
      <text:p text:style-name="Text_20_body">Strukturäquivalenz und Namensäquivalenz</text:p>
      <text:p text:style-name="Text_20_body">KC-PASCAL benutzt die Namenäquivalenz für <text:span text:style-name="Source_20_Text">RECORD</text:span>s und <text:span text:style-name="Source_20_Text">ARRAY</text:span>s. Beispiel: Zwei Variablen sind wie folgt definiert</text:p>
      <text:p text:style-name="Preformatted_20_Text">VAR A: ARRAY ['A'..'C'] OF INTEGER;</text:p>
      <text:p text:style-name="Preformatted_20_Text"><text:s text:c="4"/>B: ARRAY ['A'..'C'] OF INTEGER;</text:p>
      <text:p text:style-name="Preformatted_20_Text"/>
      <text:p text:style-name="Text_20_body">Man könnte annehmen, dass man nun <text:span text:style-name="Source_20_Text">A:=B;</text:span> schreiben könnte, aber dies würde zu '<text:span text:style-name="Source_20_Text">*FEHLER* 10</text:span>' führen, da durch obige Definition zwei getrennte „TYPErecords“ erzeugt werden. D.h. der Programmierer hat entschieden, dass <text:span text:style-name="Source_20_Text">A</text:span> und <text:span text:style-name="Source_20_Text">B</text:span> nicht demselben Datentyp angehören.</text:p>
      <text:p text:style-name="Text_20_body">Nur ein Datentyp wird erzeugt durch:</text:p>
      <text:p text:style-name="Preformatted_20_Text">VAR A, B: ARRAY ['A'..'C'] OF INTEGER;</text:p>
      <text:p text:style-name="Standard"/>
      <text:p text:style-name="Standard">Jetzt kann zu <text:span text:style-name="Source_20_Text">A B</text:span> zugewiesen werden und umgekehrt. Obwohl dieses Namenäquivalenzprinzip etwas komplizierter erscheint, werden durch die geforderte größere Gewissenhaftigkeit beim Programmieren die Fehler eingeschränkt.</text:p>
      <text:h text:style-name="Heading_20_2" text:outline-level="2"><text:bookmark-start text:name="__RefHeading___Toc29_1849558913"/><text:soft-page-break/>Natürliche Zahl <text:span text:style-name="T37">(unsigned integer)</text:span><text:bookmark-end text:name="__RefHeading___Toc29_1849558913"/></text:h>
      <text:p text:style-name="P28"><draw:g text:anchor-type="paragraph" draw:z-index="1" draw:name="Gruppenobjekt 2" draw:style-name="gr1"><draw:custom-shape draw:style-name="gr358" draw:text-style-name="P82" svg:width="3.001cm" svg:height="1.003cm" svg:x="6.224cm" svg:y="0.764cm"><text:p text:style-name="P81"><text:span text:style-name="T72">digi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59" draw:text-style-name="P74" svg:x1="1.223cm" svg:y1="1.264cm" svg:x2="6.224cm" svg:y2="1.264cm"><text:p/></draw:line><draw:line draw:style-name="gr360" draw:text-style-name="P74" svg:x1="9.224cm" svg:y1="1.264cm" svg:x2="14.225cm" svg:y2="1.264cm"><text:p/></draw:line><draw:line draw:style-name="gr6" draw:text-style-name="P74" svg:x1="9.724cm" svg:y1="1.264cm" svg:x2="9.724cm" svg:y2="0.264cm"><text:p/></draw:line><draw:line draw:style-name="gr6" draw:text-style-name="P74" svg:x1="9.723cm" svg:y1="0.264cm" svg:x2="5.223cm" svg:y2="0.264cm"><text:p/></draw:line><draw:line draw:style-name="gr361" draw:text-style-name="P74" svg:x1="5.223cm" svg:y1="0.264cm" svg:x2="5.223cm" svg:y2="1.264cm"><text:p/></draw:line></draw:g></text:p>
      <text:h text:style-name="P60" text:outline-level="2"><text:bookmark-start text:name="__RefHeading___Toc31_1849558913"/>Vorzeichenlose Zahl <text:span text:style-name="T37">(unsigned number)</text:span><text:bookmark-end text:name="__RefHeading___Toc31_1849558913"/></text:h>
      <text:p text:style-name="P30"/>
      <text:p text:style-name="P7"><draw:g text:anchor-type="paragraph" draw:z-index="0" draw:name="Gruppenobjekt 3" draw:style-name="gr1"><draw:custom-shape draw:style-name="gr3" draw:text-style-name="P73" svg:width="3.25cm" svg:height="1.001cm" svg:x="0.752cm" svg:y="1.461cm"><text:p text:style-name="P72"><text:span text:style-name="T70">unsigned integer</text:span></text:p><draw:enhanced-geometry svg:viewBox="0 0 21600 21600" draw:type="rectangle" draw:enhanced-path="M 0 0 L 21600 0 21600 21600 0 21600 0 0 Z N"/></draw:custom-shape><draw:custom-shape draw:style-name="gr10" draw:text-style-name="P73" svg:width="3.252cm" svg:height="1.001cm" svg:x="13.251cm" svg:y="1.461cm"><text:p text:style-name="P72"><text:span text:style-name="T70">unsigned integer</text:span></text:p><draw:enhanced-geometry svg:viewBox="0 0 21600 21600" draw:type="rectangle" draw:enhanced-path="M 0 0 L 21600 0 21600 21600 0 21600 0 0 Z N"/></draw:custom-shape><draw:custom-shape draw:style-name="gr2" draw:text-style-name="P79" xml:id="id2" draw:id="id2" svg:width="2.001cm" svg:height="1.001cm" svg:x="6.751cm" svg:y="1.461cm"><text:p text:style-name="P78"><text:span text:style-name="T72">digi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71" xml:id="id1" draw:id="id1" svg:width="1.001cm" svg:height="1.001cm" svg:x="5.001cm" svg:y="1.461cm"><text:p text:style-name="P70"><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1" svg:width="1.001cm" svg:height="1.001cm" svg:x="9.751cm" svg:y="1.461cm"><text:p text:style-name="P70"><text:span text:style-name="T69">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 draw:text-style-name="P82" svg:width="3.001cm" svg:height="1.001cm" svg:x="6.751cm" svg:y="3.463cm"><text:p text:style-name="P81"><text:span text:style-name="T72">hex digi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1" svg:width="1.001cm" svg:height="1.001cm" svg:x="5.001cm" svg:y="3.461cm"><text:p text:style-name="P70"><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1" svg:width="1.001cm" svg:height="1.001cm" svg:x="11.501cm" svg:y="0.461cm"><text:p text:style-name="P70"><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1" svg:width="1.001cm" svg:height="1.001cm" svg:x="11.501cm" svg:y="2.461cm"><text:p text:style-name="P70"><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62" draw:text-style-name="P74" draw:type="line" svg:x1="6.001cm" svg:y1="1.962cm" svg:x2="6.75cm" svg:y2="1.962cm" draw:start-shape="id1" draw:start-glue-point="10" draw:end-shape="id2" draw:end-glue-point="6" svg:d="M6001 1962h749" svg:viewBox="0 0 751 2"><text:p/></draw:connector><draw:line draw:style-name="gr363" draw:text-style-name="P74" svg:x1="16.501cm" svg:y1="1.965cm" svg:x2="17.251cm" svg:y2="1.965cm"><text:p/></draw:line><draw:line draw:style-name="gr6" draw:text-style-name="P74" svg:x1="9.751cm" svg:y1="3.961cm" svg:x2="16.751cm" svg:y2="3.961cm"><text:p/></draw:line><draw:line draw:style-name="gr364" draw:text-style-name="P74" svg:x1="16.751cm" svg:y1="3.965cm" svg:x2="16.751cm" svg:y2="1.965cm"><text:p/></draw:line><draw:line draw:style-name="gr6" draw:text-style-name="P74" svg:x1="0.252cm" svg:y1="1.965cm" svg:x2="0.252cm" svg:y2="3.965cm"><text:p/></draw:line><draw:line draw:style-name="gr365" draw:text-style-name="P74" svg:x1="6.001cm" svg:y1="3.961cm" svg:x2="6.751cm" svg:y2="3.961cm"><text:p/></draw:line><draw:line draw:style-name="gr6" draw:text-style-name="P74" svg:x1="10.251cm" svg:y1="3.212cm" svg:x2="6.251cm" svg:y2="3.212cm"><text:p/></draw:line><draw:line draw:style-name="gr366" draw:text-style-name="P74" svg:x1="6.251cm" svg:y1="3.212cm" svg:x2="6.251cm" svg:y2="3.962cm"><text:p/></draw:line><draw:line draw:style-name="gr6" draw:text-style-name="P74" svg:x1="10.251cm" svg:y1="3.962cm" svg:x2="10.251cm" svg:y2="3.212cm"><text:p/></draw:line><draw:line draw:style-name="gr6" draw:text-style-name="P74" svg:x1="9.001cm" svg:y1="1.965cm" svg:x2="9.001cm" svg:y2="2.715cm"><text:p/></draw:line><draw:line draw:style-name="gr6" draw:text-style-name="P74" svg:x1="9.001cm" svg:y1="2.711cm" svg:x2="6.251cm" svg:y2="2.711cm"><text:p/></draw:line><draw:line draw:style-name="gr367" draw:text-style-name="P74" svg:x1="6.251cm" svg:y1="2.715cm" svg:x2="6.251cm" svg:y2="1.965cm"><text:p/></draw:line><draw:line draw:style-name="gr6" draw:text-style-name="P74" svg:x1="4.503cm" svg:y1="1.961cm" svg:x2="4.503cm" svg:y2="1.211cm"><text:p/></draw:line><draw:line draw:style-name="gr6" draw:text-style-name="P74" svg:x1="4.503cm" svg:y1="1.211cm" svg:x2="9.253cm" svg:y2="1.211cm"><text:p/></draw:line><draw:line draw:style-name="gr368" draw:text-style-name="P74" svg:x1="9.251cm" svg:y1="1.211cm" svg:x2="9.251cm" svg:y2="1.961cm"><text:p/></draw:line><draw:line draw:style-name="gr369" draw:text-style-name="P74" svg:x1="0.252cm" svg:y1="3.961cm" svg:x2="5.002cm" svg:y2="3.961cm"><text:p/></draw:line><draw:line draw:style-name="gr6" draw:text-style-name="P74" svg:x1="4.251cm" svg:y1="1.961cm" svg:x2="4.251cm" svg:y2="0.211cm"><text:p/></draw:line><draw:line draw:style-name="gr370" draw:text-style-name="P74" svg:x1="4.001cm" svg:y1="1.965cm" svg:x2="5.001cm" svg:y2="1.965cm"><text:p/></draw:line><draw:line draw:style-name="gr371" draw:text-style-name="P74" svg:x1="8.751cm" svg:y1="1.965cm" svg:x2="9.751cm" svg:y2="1.965cm"><text:p/></draw:line><draw:line draw:style-name="gr103" draw:text-style-name="P74" svg:x1="11.003cm" svg:y1="0.963cm" svg:x2="11.503cm" svg:y2="0.963cm"><text:p/></draw:line><draw:line draw:style-name="gr104" draw:text-style-name="P74" svg:x1="11.003cm" svg:y1="2.961cm" svg:x2="11.503cm" svg:y2="2.961cm"><text:p/></draw:line><draw:line draw:style-name="gr6" draw:text-style-name="P74" svg:x1="11.003cm" svg:y1="0.963cm" svg:x2="11.003cm" svg:y2="2.963cm"><text:p/></draw:line><draw:line draw:style-name="gr105" draw:text-style-name="P74" svg:x1="12.751cm" svg:y1="2.965cm" svg:x2="12.751cm" svg:y2="1.965cm"><text:p/></draw:line><draw:line draw:style-name="gr106" draw:text-style-name="P74" svg:x1="12.751cm" svg:y1="0.963cm" svg:x2="12.751cm" svg:y2="1.963cm"><text:p/></draw:line><draw:line draw:style-name="gr6" draw:text-style-name="P74" svg:x1="12.501cm" svg:y1="0.963cm" svg:x2="12.751cm" svg:y2="0.963cm"><text:p/></draw:line><draw:line draw:style-name="gr6" draw:text-style-name="P74" svg:x1="12.501cm" svg:y1="2.961cm" svg:x2="12.751cm" svg:y2="2.961cm"><text:p/></draw:line><draw:line draw:style-name="gr372" draw:text-style-name="P74" svg:x1="16.751cm" svg:y1="0.211cm" svg:x2="16.751cm" svg:y2="1.961cm"><text:p/></draw:line><draw:line draw:style-name="gr6" draw:text-style-name="P74" svg:x1="4.251cm" svg:y1="0.211cm" svg:x2="16.751cm" svg:y2="0.211cm"><text:p/></draw:line><draw:line draw:style-name="gr373" draw:text-style-name="P74" svg:x1="0.001cm" svg:y1="1.965cm" svg:x2="0.751cm" svg:y2="1.965cm"><text:p/></draw:line><draw:line draw:style-name="gr107" draw:text-style-name="P74" svg:x1="10.751cm" svg:y1="1.965cm" svg:x2="13.251cm" svg:y2="1.965cm"><text:p/></draw:line></draw:g></text:p>
      <text:p text:style-name="P7">Ganze Zahlen (<text:span text:style-name="Source_20_Text">INTEGER</text:span>s) haben in KC-PASCAL einen Absolutwert kleiner gleich 32767. Größere Zahlen werden als reelle Zahlen (<text:span text:style-name="Source_20_Text">REAL</text:span>s) betrachtet. Die Mantisse von <text:span text:style-name="Source_20_Text">REAL</text:span>s ist 23 Bit lang. Die Genauigkeit ist demzufolge etwa 7 signifikante Stellen. Beachten Sie bitte, dass die Genauigkeit einer Berechnung abnimmt, wenn der Absolutwert des Ergebnisses viel kleiner als der der Argumente ist, z.B. liefert 2.00002-2 nicht genau 0.00002. Das rührt von der Ungenauigkeit in der Darstellung von Dezimalbrüchen als Binärbrüche her. Dieser Fall tritt nicht auf, wenn ganze Zahlen mäßiger Größe als <text:span text:style-name="Source_20_Text">REAL</text:span>s dargestellt werden, z.B. wird 200002-200000 = 2 exakt berechnet. Die größte mögliche <text:span text:style-name="Source_20_Text">REAL</text:span>-Zahl ist 3.4E38, die kleinste 5.9E-39. <text:s/>Bei der Beschreibung einer Zahl werden nur die Werte der ersten 7 Ziffern betrachtet, bei den weiteren zählt nur der Stellenwert. Führende Nullen sollten vermieden werden, da diese als Ziffer gelten und somit die Genauigkeit beeinträchtigen (z.B. ist 0.000123456 ungenauer als 1.23456E-4).</text:p>
      <text:p text:style-name="P7">Hexadezimalzahlen sind verfügbar, um z.B. Speicher<text:span text:style-name="T14">a</text:span>dressen darzustellen. Beachten Sie, dass nach '<text:span text:style-name="Source_20_Text">#</text:span>' mindestens eine Hex-Ziffer stehen muss (sonst <text:span text:style-name="Source_20_Text">FEHLER 51</text:span>).</text:p>
      <text:h text:style-name="P61" text:outline-level="2"><text:bookmark-start text:name="__RefHeading___Toc33_1849558913"/>Vorzeichenlose Konstante <text:span text:style-name="T38">(unsigned constant)</text:span><text:bookmark-end text:name="__RefHeading___Toc33_1849558913"/></text:h>
      <text:p text:style-name="Text_20_body"><draw:g text:anchor-type="paragraph" draw:z-index="17" draw:name="Gruppenobjekt 18" draw:style-name="gr1"><draw:custom-shape draw:style-name="gr89" draw:text-style-name="P73" svg:width="3.252cm" svg:height="0.999cm" svg:x="5.821cm" svg:y="0.146cm"><text:p text:style-name="P72"><text:span text:style-name="T70">constant identifier</text:span></text:p><draw:enhanced-geometry svg:viewBox="0 0 21600 21600" draw:type="rectangle" draw:enhanced-path="M 0 0 L 21600 0 21600 21600 0 21600 0 0 Z N"/></draw:custom-shape><draw:custom-shape draw:style-name="gr10" draw:text-style-name="P73" svg:width="3.252cm" svg:height="1.001cm" svg:x="5.821cm" svg:y="1.645cm"><text:p text:style-name="P72"><text:span text:style-name="T70">unsigned number</text:span></text:p><draw:enhanced-geometry svg:viewBox="0 0 21600 21600" draw:type="rectangle" draw:enhanced-path="M 0 0 L 21600 0 21600 21600 0 21600 0 0 Z N"/></draw:custom-shape><draw:custom-shape draw:style-name="gr37" draw:text-style-name="P71" svg:width="2.25cm" svg:height="1.001cm" svg:x="6.322cm" svg:y="3.145cm"><text:p text:style-name="P70"><text:span text:style-name="T69">NIL</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0" draw:text-style-name="P77" svg:width="3.252cm" svg:height="1.001cm" svg:x="5.821cm" svg:y="4.646cm"><text:p text:style-name="P76"><text:span text:style-name="T71">charact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1" svg:width="1.001cm" svg:height="1.001cm" svg:x="3.82cm" svg:y="4.646cm"><text:p text:style-name="P70"><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1" svg:width="1.001cm" svg:height="1.001cm" svg:x="10.072cm" svg:y="4.647cm"><text:p text:style-name="P70"><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1" draw:text-style-name="P74" svg:x1="1.822cm" svg:y1="0.642cm" svg:x2="5.822cm" svg:y2="0.642cm"><text:p/></draw:line><draw:line draw:style-name="gr92" draw:text-style-name="P74" svg:x1="9.072cm" svg:y1="0.642cm" svg:x2="13.822cm" svg:y2="0.642cm"><text:p/></draw:line><draw:line draw:style-name="gr6" draw:text-style-name="P74" svg:x1="2.819cm" svg:y1="0.642cm" svg:x2="2.819cm" svg:y2="5.142cm"><text:p/></draw:line><draw:line draw:style-name="gr93" draw:text-style-name="P74" svg:x1="2.819cm" svg:y1="5.146cm" svg:x2="3.819cm" svg:y2="5.146cm"><text:p/></draw:line><draw:line draw:style-name="gr94" draw:text-style-name="P74" svg:x1="4.821cm" svg:y1="5.146cm" svg:x2="5.821cm" svg:y2="5.146cm"><text:p/></draw:line><draw:line draw:style-name="gr95" draw:text-style-name="P74" svg:x1="9.072cm" svg:y1="5.146cm" svg:x2="10.072cm" svg:y2="5.146cm"><text:p/></draw:line><draw:line draw:style-name="gr6" draw:text-style-name="P74" svg:x1="11.072cm" svg:y1="5.146cm" svg:x2="12.072cm" svg:y2="5.146cm"><text:p/></draw:line><draw:line draw:style-name="gr96" draw:text-style-name="P74" svg:x1="12.072cm" svg:y1="5.142cm" svg:x2="12.072cm" svg:y2="0.642cm"><text:p/></draw:line><draw:line draw:style-name="gr6" draw:text-style-name="P74" svg:x1="9.322cm" svg:y1="5.142cm" svg:x2="9.322cm" svg:y2="4.392cm"><text:p/></draw:line><draw:line draw:style-name="gr6" draw:text-style-name="P74" svg:x1="9.322cm" svg:y1="4.392cm" svg:x2="5.322cm" svg:y2="4.392cm"><text:p/></draw:line><draw:line draw:style-name="gr97" draw:text-style-name="P74" svg:x1="5.322cm" svg:y1="4.392cm" svg:x2="5.322cm" svg:y2="5.142cm"><text:p/></draw:line><draw:line draw:style-name="gr98" draw:text-style-name="P74" svg:x1="2.819cm" svg:y1="3.646cm" svg:x2="6.319cm" svg:y2="3.646cm"><text:p/></draw:line><draw:line draw:style-name="gr99" draw:text-style-name="P74" svg:x1="8.571cm" svg:y1="3.646cm" svg:x2="12.071cm" svg:y2="3.646cm"><text:p/></draw:line><draw:line draw:style-name="gr100" draw:text-style-name="P74" svg:x1="2.819cm" svg:y1="2.143cm" svg:x2="5.819cm" svg:y2="2.143cm"><text:p/></draw:line><draw:line draw:style-name="gr101" draw:text-style-name="P74" svg:x1="9.072cm" svg:y1="2.143cm" svg:x2="12.072cm" svg:y2="2.143cm"><text:p/></draw:line></draw:g></text:p>
      <text:p text:style-name="Text_20_body">Beachten Sie, dass Strings (Zeichenketten) nicht mehr als 255 Zeichen enthalten dürfen. String-Typen sind <text:span text:style-name="Source_20_Text">ARRAY[1..N] OF CHAR</text:span>, wobei <text:span text:style-name="Source_20_Text">N</text:span> eine ganze Zahl von 1 bis 255 ist. Zeichenstrings dürfen kein End-of-line-Zeichen <text:span text:style-name="T15">(</text:span><text:span text:style-name="Source_20_Text">CHR (13)</text:span><text:span text:style-name="T15">)</text:span> enthalten, sonst tritt '<text:span text:style-name="Source_20_Text">FEHLER 68</text:span>' auf.</text:p>
      <text:p text:style-name="Text_20_body">Der gesamte erweiterte ASCII-Zeichensatz mit 256 Elementen ist zulässig. Um die Kompatibilität mit Standard-Pascal aufrechtzuerhalten, wird das Null-Zeichen nicht als <text:span text:style-name="Source_20_Text">''</text:span> dargestellt, sondern als <text:span text:style-name="Source_20_Text">CHR(0)</text:span>.</text:p>
      <text:h text:style-name="Heading_20_2" text:outline-level="2"><text:bookmark-start text:name="__RefHeading___Toc35_1849558913"/>Konstante <text:span text:style-name="T39">(constant)</text:span><text:bookmark-end text:name="__RefHeading___Toc35_1849558913"/></text:h>
      <text:p text:style-name="Text_20_body"><draw:g text:anchor-type="paragraph" draw:z-index="3" draw:name="Gruppenobjekt 5" draw:style-name="gr1"><draw:custom-shape draw:style-name="gr10" draw:text-style-name="P73" svg:width="3.252cm" svg:height="1.001cm" svg:x="7.724cm" svg:y="0.557cm"><text:p text:style-name="P72"><text:span text:style-name="T70">constant identifier</text:span></text:p><draw:enhanced-geometry svg:viewBox="0 0 21600 21600" draw:type="rectangle" draw:enhanced-path="M 0 0 L 21600 0 21600 21600 0 21600 0 0 Z N"/></draw:custom-shape><draw:custom-shape draw:style-name="gr263" draw:text-style-name="P73" svg:width="3.252cm" svg:height="1.003cm" svg:x="7.724cm" svg:y="2.056cm"><text:p text:style-name="P72"><text:span text:style-name="T70">unsigned number</text:span></text:p><draw:enhanced-geometry svg:viewBox="0 0 21600 21600" draw:type="rectangle" draw:enhanced-path="M 0 0 L 21600 0 21600 21600 0 21600 0 0 Z N"/></draw:custom-shape><draw:custom-shape draw:style-name="gr332" draw:text-style-name="P71" svg:width="2.003cm" svg:height="1.003cm" svg:x="2.471cm" svg:y="4.806cm"><text:p text:style-name="P70"><text:span text:style-name="T69">CH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33" draw:text-style-name="P77" svg:width="3.252cm" svg:height="1.003cm" svg:x="7.724cm" svg:y="3.556cm"><text:p text:style-name="P76"><text:span text:style-name="T71">charact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9" draw:text-style-name="P71" svg:width="1.003cm" svg:height="1.003cm" svg:x="5.722cm" svg:y="3.557cm"><text:p text:style-name="P70"><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9" draw:text-style-name="P71" svg:width="1.003cm" svg:height="1.003cm" svg:x="11.973cm" svg:y="3.557cm"><text:p text:style-name="P70"><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4" draw:text-style-name="P74" svg:x1="6.723cm" svg:y1="4.057cm" svg:x2="7.723cm" svg:y2="4.057cm"><text:p/></draw:line><draw:line draw:style-name="gr95" draw:text-style-name="P74" svg:x1="10.973cm" svg:y1="4.057cm" svg:x2="11.973cm" svg:y2="4.057cm"><text:p/></draw:line><draw:line draw:style-name="gr6" draw:text-style-name="P74" svg:x1="11.22cm" svg:y1="4.057cm" svg:x2="11.22cm" svg:y2="3.307cm"><text:p/></draw:line><draw:line draw:style-name="gr6" draw:text-style-name="P74" svg:x1="11.224cm" svg:y1="3.307cm" svg:x2="7.223cm" svg:y2="3.307cm"><text:p/></draw:line><draw:line draw:style-name="gr97" draw:text-style-name="P74" svg:x1="7.223cm" svg:y1="3.307cm" svg:x2="7.223cm" svg:y2="4.057cm"><text:p/></draw:line><draw:custom-shape draw:style-name="gr229" draw:text-style-name="P71" svg:width="1.003cm" svg:height="1.003cm" svg:x="5.722cm" svg:y="4.806cm"><text:p text:style-name="P70"><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9" draw:text-style-name="P71" svg:width="1.003cm" svg:height="1.003cm" svg:x="11.975cm" svg:y="4.806cm"><text:p text:style-name="P70"><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3" draw:text-style-name="P73" svg:width="3.252cm" svg:height="1.003cm" svg:x="7.724cm" svg:y="4.806cm"><text:p text:style-name="P72"><text:span text:style-name="T70">constant</text:span></text:p><draw:enhanced-geometry svg:viewBox="0 0 21600 21600" draw:type="rectangle" draw:enhanced-path="M 0 0 L 21600 0 21600 21600 0 21600 0 0 Z N"/></draw:custom-shape><draw:custom-shape draw:style-name="gr212" draw:text-style-name="P71" svg:width="1.003cm" svg:height="1.001cm" svg:x="3.471cm" svg:y="0.559cm"><text:p text:style-name="P70"><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9" draw:text-style-name="P71" svg:width="1.003cm" svg:height="1.003cm" svg:x="3.473cm" svg:y="2.056cm"><text:p text:style-name="P70"><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34" draw:text-style-name="P74" svg:x1="6.971cm" svg:y1="1.053cm" svg:x2="7.721cm" svg:y2="1.053cm"><text:p/></draw:line><draw:line draw:style-name="gr335" draw:text-style-name="P74" svg:x1="6.971cm" svg:y1="2.554cm" svg:x2="7.721cm" svg:y2="2.554cm"><text:p/></draw:line><draw:line draw:style-name="gr6" draw:text-style-name="P74" svg:x1="6.971cm" svg:y1="1.053cm" svg:x2="6.971cm" svg:y2="2.553cm"><text:p/></draw:line><draw:line draw:style-name="gr336" draw:text-style-name="P74" svg:x1="1.222cm" svg:y1="1.807cm" svg:x2="6.973cm" svg:y2="1.807cm"><text:p/></draw:line><draw:line draw:style-name="gr337" draw:text-style-name="P74" svg:x1="1.718cm" svg:y1="5.304cm" svg:x2="2.468cm" svg:y2="5.304cm"><text:p/></draw:line><draw:line draw:style-name="gr6" draw:text-style-name="P74" svg:x1="1.718cm" svg:y1="1.807cm" svg:x2="1.718cm" svg:y2="5.307cm"><text:p/></draw:line><draw:line draw:style-name="gr6" draw:text-style-name="P74" svg:x1="2.72cm" svg:y1="1.053cm" svg:x2="2.72cm" svg:y2="2.553cm"><text:p/></draw:line><draw:line draw:style-name="gr338" draw:text-style-name="P74" svg:x1="2.72cm" svg:y1="1.053cm" svg:x2="3.47cm" svg:y2="1.053cm"><text:p/></draw:line><draw:line draw:style-name="gr339" draw:text-style-name="P74" svg:x1="2.72cm" svg:y1="2.554cm" svg:x2="3.47cm" svg:y2="2.554cm"><text:p/></draw:line><draw:line draw:style-name="gr6" draw:text-style-name="P74" svg:x1="4.472cm" svg:y1="2.554cm" svg:x2="4.972cm" svg:y2="2.554cm"><text:p/></draw:line><draw:line draw:style-name="gr6" draw:text-style-name="P74" svg:x1="4.472cm" svg:y1="1.053cm" svg:x2="4.972cm" svg:y2="1.053cm"><text:p/></draw:line><draw:line draw:style-name="gr340" draw:text-style-name="P74" svg:x1="4.972cm" svg:y1="1.053cm" svg:x2="4.972cm" svg:y2="1.803cm"><text:p/></draw:line><draw:line draw:style-name="gr341" draw:text-style-name="P74" svg:x1="4.972cm" svg:y1="2.557cm" svg:x2="4.972cm" svg:y2="1.807cm"><text:p/></draw:line><draw:line draw:style-name="gr342" draw:text-style-name="P74" svg:x1="1.718cm" svg:y1="4.057cm" svg:x2="5.719cm" svg:y2="4.057cm"><text:p/></draw:line><draw:line draw:style-name="gr343" draw:text-style-name="P74" svg:x1="4.472cm" svg:y1="5.304cm" svg:x2="5.722cm" svg:y2="5.304cm"><text:p/></draw:line><draw:line draw:style-name="gr344" draw:text-style-name="P74" svg:x1="6.723cm" svg:y1="5.304cm" svg:x2="7.723cm" svg:y2="5.304cm"><text:p/></draw:line><draw:line draw:style-name="gr345" draw:text-style-name="P74" svg:x1="10.973cm" svg:y1="5.304cm" svg:x2="11.973cm" svg:y2="5.304cm"><text:p/></draw:line><draw:line draw:style-name="gr6" draw:text-style-name="P74" svg:x1="12.974cm" svg:y1="5.304cm" svg:x2="13.724cm" svg:y2="5.304cm"><text:p/></draw:line><draw:line draw:style-name="gr6" draw:text-style-name="P74" svg:x1="10.973cm" svg:y1="2.554cm" svg:x2="11.723cm" svg:y2="2.554cm"><text:p/></draw:line><draw:line draw:style-name="gr6" draw:text-style-name="P74" svg:x1="10.973cm" svg:y1="1.053cm" svg:x2="11.723cm" svg:y2="1.053cm"><text:p/></draw:line><draw:line draw:style-name="gr346" draw:text-style-name="P74" svg:x1="11.721cm" svg:y1="2.557cm" svg:x2="11.721cm" svg:y2="1.807cm"><text:p/></draw:line><draw:line draw:style-name="gr347" draw:text-style-name="P74" svg:x1="11.721cm" svg:y1="1.053cm" svg:x2="11.721cm" svg:y2="1.803cm"><text:p/></draw:line><draw:line draw:style-name="gr348" draw:text-style-name="P74" svg:x1="11.721cm" svg:y1="1.807cm" svg:x2="14.722cm" svg:y2="1.807cm"><text:p/></draw:line><draw:line draw:style-name="gr349" draw:text-style-name="P74" svg:x1="13.723cm" svg:y1="5.307cm" svg:x2="13.723cm" svg:y2="1.807cm"><text:p/></draw:line><draw:line draw:style-name="gr350" draw:text-style-name="P74" svg:x1="12.974cm" svg:y1="4.057cm" svg:x2="13.724cm" svg:y2="4.057cm"><text:p/></draw:line></draw:g></text:p>
      <text:p text:style-name="Text_20_body"/>
      <text:p text:style-name="Text_20_body">Die nicht standardgemäße <text:span text:style-name="Source_20_Text">CHR</text:span>-Konstruktion ist hier zugelassen, so dass Konstanten auch als Steuerzeichen benutzt werden können. In diesem Fall muss die Konstante in den runden Klammern vom <text:span text:style-name="Source_20_Text">INTEGER</text:span>-Typ sein.</text:p>
      <text:p text:style-name="Text_20_body">z.B.:</text:p>
      <text:p text:style-name="Preformatted_20_Text">CONST bs=CHR(8); <text:s/><text:span text:style-name="T15">(* </text:span>BACKSPACE *<text:span text:style-name="T15">)</text:span></text:p>
      <text:p text:style-name="Preformatted_20_Text"><text:s text:c="6"/>cr=CHR(13); <text:span text:style-name="T15">(* </text:span>CARRIGE RETURN *<text:span text:style-name="T15">)</text:span></text:p>
      <text:p text:style-name="Preformatted_20_Text"><text:soft-page-break/></text:p>
      <text:h text:style-name="Heading_20_2" text:outline-level="2"><text:bookmark-start text:name="__RefHeading___Toc37_1849558913"/>Einfacher Typ <text:span text:style-name="T40">(simple type)</text:span><text:bookmark-end text:name="__RefHeading___Toc37_1849558913"/></text:h>
      <text:p text:style-name="P33">Skalare Aufzählungstypen <text:span text:style-name="Source_20_Text">(name,name,...)</text:span> dürfen nicht mehr als 256 Elemente enthalten.</text:p>
      <text:p text:style-name="P33"/>
      <text:p text:style-name="P32"><draw:g text:anchor-type="paragraph" draw:z-index="5" draw:name="Gruppenobjekt 6" draw:style-name="gr1"><draw:custom-shape draw:style-name="gr292" draw:text-style-name="P73" svg:width="3.255cm" svg:height="1.003cm" svg:x="6.644cm" svg:y="0.319cm"><text:p text:style-name="P72"><text:span text:style-name="T70">type identifier</text:span></text:p><draw:enhanced-geometry svg:viewBox="0 0 21600 21600" draw:type="rectangle" draw:enhanced-path="M 0 0 L 21600 0 21600 21600 0 21600 0 0 Z N"/></draw:custom-shape><draw:custom-shape draw:style-name="gr293" draw:text-style-name="P73" svg:width="3.255cm" svg:height="1.004cm" svg:x="6.644cm" svg:y="1.82cm"><text:p text:style-name="P72"><text:span text:style-name="T70">identifier</text:span></text:p><draw:enhanced-geometry svg:viewBox="0 0 21600 21600" draw:type="rectangle" draw:enhanced-path="M 0 0 L 21600 0 21600 21600 0 21600 0 0 Z N"/></draw:custom-shape><draw:custom-shape draw:style-name="gr294" draw:text-style-name="P71" svg:width="1.004cm" svg:height="1.003cm" svg:x="4.648cm" svg:y="1.822cm"><text:p text:style-name="P70"><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4" draw:text-style-name="P71" svg:width="1.004cm" svg:height="1.003cm" svg:x="10.897cm" svg:y="1.822cm"><text:p text:style-name="P70"><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9" draw:text-style-name="P71" svg:width="1.003cm" svg:height="1.003cm" svg:x="7.646cm" svg:y="3.072cm"><text:p text:style-name="P70"><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5" draw:text-style-name="P73" svg:width="3.253cm" svg:height="1.004cm" svg:x="3.395cm" svg:y="4.321cm"><text:p text:style-name="P72"><text:span text:style-name="T70">constant</text:span></text:p><draw:enhanced-geometry svg:viewBox="0 0 21600 21600" draw:type="rectangle" draw:enhanced-path="M 0 0 L 21600 0 21600 21600 0 21600 0 0 Z N"/></draw:custom-shape><draw:custom-shape draw:style-name="gr295" draw:text-style-name="P73" svg:width="3.253cm" svg:height="1.004cm" svg:x="9.647cm" svg:y="4.321cm"><text:p text:style-name="P72"><text:span text:style-name="T70">constant</text:span></text:p><draw:enhanced-geometry svg:viewBox="0 0 21600 21600" draw:type="rectangle" draw:enhanced-path="M 0 0 L 21600 0 21600 21600 0 21600 0 0 Z N"/></draw:custom-shape><draw:custom-shape draw:style-name="gr296" draw:text-style-name="P71" svg:width="1.504cm" svg:height="1.004cm" svg:x="7.396cm" svg:y="4.321cm"><text:p text:style-name="P70"><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7" draw:text-style-name="P74" svg:x1="1.896cm" svg:y1="0.819cm" svg:x2="6.647cm" svg:y2="0.819cm"><text:p/></draw:line><draw:line draw:style-name="gr298" draw:text-style-name="P74" svg:x1="9.895cm" svg:y1="0.819cm" svg:x2="14.646cm" svg:y2="0.819cm"><text:p/></draw:line><draw:line draw:style-name="gr6" draw:text-style-name="P74" svg:x1="2.392cm" svg:y1="0.819cm" svg:x2="2.392cm" svg:y2="4.823cm"><text:p/></draw:line><draw:line draw:style-name="gr299" draw:text-style-name="P74" svg:x1="2.392cm" svg:y1="4.823cm" svg:x2="3.392cm" svg:y2="4.823cm"><text:p/></draw:line><draw:line draw:style-name="gr300" draw:text-style-name="P74" svg:x1="2.392cm" svg:y1="2.321cm" svg:x2="4.642cm" svg:y2="2.321cm"><text:p/></draw:line><draw:line draw:style-name="gr301" draw:text-style-name="P74" svg:x1="5.646cm" svg:y1="2.321cm" svg:x2="6.646cm" svg:y2="2.321cm"><text:p/></draw:line><draw:line draw:style-name="gr302" draw:text-style-name="P74" svg:x1="9.895cm" svg:y1="2.321cm" svg:x2="10.895cm" svg:y2="2.321cm"><text:p/></draw:line><draw:line draw:style-name="gr6" draw:text-style-name="P74" svg:x1="10.145cm" svg:y1="3.572cm" svg:x2="8.645cm" svg:y2="3.572cm"><text:p/></draw:line><draw:line draw:style-name="gr6" draw:text-style-name="P74" svg:x1="10.146cm" svg:y1="2.321cm" svg:x2="10.146cm" svg:y2="3.572cm"><text:p/></draw:line><draw:line draw:style-name="gr6" draw:text-style-name="P74" svg:x1="7.646cm" svg:y1="3.572cm" svg:x2="5.896cm" svg:y2="3.572cm"><text:p/></draw:line><draw:line draw:style-name="gr303" draw:text-style-name="P74" svg:x1="5.896cm" svg:y1="3.572cm" svg:x2="5.896cm" svg:y2="2.321cm"><text:p/></draw:line><draw:line draw:style-name="gr304" draw:text-style-name="P74" svg:x1="6.646cm" svg:y1="4.823cm" svg:x2="7.396cm" svg:y2="4.823cm"><text:p/></draw:line><draw:line draw:style-name="gr305" draw:text-style-name="P74" svg:x1="8.897cm" svg:y1="4.823cm" svg:x2="9.647cm" svg:y2="4.823cm"><text:p/></draw:line><draw:line draw:style-name="gr6" draw:text-style-name="P74" svg:x1="12.896cm" svg:y1="4.823cm" svg:x2="13.646cm" svg:y2="4.823cm"><text:p/></draw:line><draw:line draw:style-name="gr306" draw:text-style-name="P74" svg:x1="13.645cm" svg:y1="4.823cm" svg:x2="13.645cm" svg:y2="0.819cm"><text:p/></draw:line><draw:line draw:style-name="gr307" draw:text-style-name="P74" svg:x1="11.894cm" svg:y1="2.321cm" svg:x2="13.644cm" svg:y2="2.321cm"><text:p/></draw:line></draw:g></text:p>
      <text:h text:style-name="Heading_20_2" text:outline-level="2"><text:bookmark-start text:name="__RefHeading___Toc39_1849558913"/>Typ <text:span text:style-name="T41">(type)</text:span><text:bookmark-end text:name="__RefHeading___Toc39_1849558913"/></text:h>
      <text:p text:style-name="Text_20_body"><draw:g text:anchor-type="paragraph" draw:z-index="4" draw:name="Gruppenobjekt 7" draw:style-name="gr1"><draw:custom-shape draw:style-name="gr90" draw:text-style-name="P71" svg:width="3.252cm" svg:height="1.001cm" svg:x="1.22cm" svg:y="2.709cm"><text:p text:style-name="P70"><text:span text:style-name="T69">PACKE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2" draw:text-style-name="P71" svg:width="3.252cm" svg:height="0.999cm" svg:x="1.22cm" svg:y="4.461cm"><text:p text:style-name="P70"><text:span text:style-name="T69">ARRA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0" draw:text-style-name="P71" svg:width="3.252cm" svg:height="1.001cm" svg:x="1.22cm" svg:y="6.96cm"><text:p text:style-name="P70"><text:span text:style-name="T69">RECOR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5" draw:text-style-name="P73" svg:width="2.751cm" svg:height="1.001cm" svg:x="6.722cm" svg:y="1.96cm"><text:p text:style-name="P72"><text:span text:style-name="T70">type identifier</text:span></text:p><draw:enhanced-geometry svg:viewBox="0 0 21600 21600" draw:type="rectangle" draw:enhanced-path="M 0 0 L 21600 0 21600 21600 0 21600 0 0 Z N"/></draw:custom-shape><draw:custom-shape draw:style-name="gr308" draw:text-style-name="P73" svg:width="2.751cm" svg:height="0.999cm" svg:x="6.722cm" svg:y="0.711cm"><text:p text:style-name="P72"><text:span text:style-name="T70">simple type</text:span></text:p><draw:enhanced-geometry svg:viewBox="0 0 21600 21600" draw:type="rectangle" draw:enhanced-path="M 0 0 L 21600 0 21600 21600 0 21600 0 0 Z N"/></draw:custom-shape><draw:custom-shape draw:style-name="gr4" draw:text-style-name="P71" svg:width="1.001cm" svg:height="1.001cm" svg:x="4.97cm" svg:y="1.96cm"><text:p text:style-name="P70"><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5" draw:text-style-name="P73" svg:width="2.751cm" svg:height="1.001cm" svg:x="6.722cm" svg:y="4.461cm"><text:p text:style-name="P72"><text:span text:style-name="T70">simple type</text:span></text:p><draw:enhanced-geometry svg:viewBox="0 0 21600 21600" draw:type="rectangle" draw:enhanced-path="M 0 0 L 21600 0 21600 21600 0 21600 0 0 Z N"/></draw:custom-shape><draw:custom-shape draw:style-name="gr4" draw:text-style-name="P71" svg:width="1.001cm" svg:height="1.001cm" svg:x="4.97cm" svg:y="4.463cm"><text:p text:style-name="P70"><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1" svg:width="1.001cm" svg:height="1.001cm" svg:x="10.221cm" svg:y="4.463cm"><text:p text:style-name="P70"><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1" svg:width="1.001cm" svg:height="1.001cm" svg:x="7.471cm" svg:y="3.21cm"><text:p text:style-name="P70"><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1" draw:text-style-name="P74" svg:x1="5.969cm" svg:y1="4.961cm" svg:x2="6.719cm" svg:y2="4.961cm"><text:p/></draw:line><draw:line draw:style-name="gr302" draw:text-style-name="P74" svg:x1="9.471cm" svg:y1="4.961cm" svg:x2="10.221cm" svg:y2="4.961cm"><text:p/></draw:line><draw:line draw:style-name="gr6" draw:text-style-name="P74" svg:x1="9.721cm" svg:y1="3.711cm" svg:x2="8.471cm" svg:y2="3.711cm"><text:p/></draw:line><draw:line draw:style-name="gr6" draw:text-style-name="P74" svg:x1="9.719cm" svg:y1="3.711cm" svg:x2="9.719cm" svg:y2="4.961cm"><text:p/></draw:line><draw:line draw:style-name="gr6" draw:text-style-name="P74" svg:x1="7.471cm" svg:y1="3.711cm" svg:x2="6.221cm" svg:y2="3.711cm"><text:p/></draw:line><draw:custom-shape draw:style-name="gr2" draw:text-style-name="P71" svg:width="2.001cm" svg:height="1.001cm" svg:x="1.22cm" svg:y="5.71cm"><text:p text:style-name="P70"><text:span text:style-name="T69">SE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71" svg:width="1.5cm" svg:height="1.001cm" svg:x="4.471cm" svg:y="5.71cm"><text:p text:style-name="P70"><text:span text:style-name="T69">OF</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9" draw:text-style-name="P71" svg:width="1.502cm" svg:height="0.999cm" svg:x="11.721cm" svg:y="4.461cm"><text:p text:style-name="P70"><text:span text:style-name="T69">OF</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0" draw:text-style-name="P73" svg:width="1.502cm" svg:height="1.001cm" svg:x="13.721cm" svg:y="4.461cm"><text:p text:style-name="P72"><text:span text:style-name="T70">type</text:span></text:p><draw:enhanced-geometry svg:viewBox="0 0 21600 21600" draw:type="rectangle" draw:enhanced-path="M 0 0 L 21600 0 21600 21600 0 21600 0 0 Z N"/></draw:custom-shape><draw:line draw:style-name="gr311" draw:text-style-name="P74" svg:x1="13.221cm" svg:y1="4.96cm" svg:x2="13.721cm" svg:y2="4.96cm"><text:p/></draw:line><draw:line draw:style-name="gr312" draw:text-style-name="P74" svg:x1="11.22cm" svg:y1="4.96cm" svg:x2="11.72cm" svg:y2="4.96cm"><text:p/></draw:line><draw:line draw:style-name="gr313" draw:text-style-name="P74" svg:x1="4.471cm" svg:y1="4.96cm" svg:x2="4.971cm" svg:y2="4.96cm"><text:p/></draw:line><draw:custom-shape draw:style-name="gr145" draw:text-style-name="P73" svg:width="2.751cm" svg:height="1.001cm" svg:x="6.722cm" svg:y="5.71cm"><text:p text:style-name="P72"><text:span text:style-name="T70">simple type</text:span></text:p><draw:enhanced-geometry svg:viewBox="0 0 21600 21600" draw:type="rectangle" draw:enhanced-path="M 0 0 L 21600 0 21600 21600 0 21600 0 0 Z N"/></draw:custom-shape><draw:custom-shape draw:style-name="gr2" draw:text-style-name="P71" svg:width="2.001cm" svg:height="1.001cm" svg:x="13.222cm" svg:y="6.96cm"><text:p text:style-name="P70"><text:span text:style-name="T69">EN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45" draw:text-style-name="P73" svg:width="2.751cm" svg:height="1.001cm" svg:x="6.722cm" svg:y="6.96cm"><text:p text:style-name="P72"><text:span text:style-name="T70">field list</text:span></text:p><draw:enhanced-geometry svg:viewBox="0 0 21600 21600" draw:type="rectangle" draw:enhanced-path="M 0 0 L 21600 0 21600 21600 0 21600 0 0 Z N"/></draw:custom-shape><draw:line draw:style-name="gr314" draw:text-style-name="P74" svg:x1="4.471cm" svg:y1="7.461cm" svg:x2="6.721cm" svg:y2="7.461cm"><text:p/></draw:line><draw:line draw:style-name="gr315" draw:text-style-name="P74" svg:x1="9.471cm" svg:y1="7.461cm" svg:x2="13.221cm" svg:y2="7.461cm"><text:p/></draw:line><draw:line draw:style-name="gr316" draw:text-style-name="P74" svg:x1="9.471cm" svg:y1="6.21cm" svg:x2="15.721cm" svg:y2="6.21cm"><text:p/></draw:line><draw:line draw:style-name="gr6" draw:text-style-name="P74" svg:x1="15.217cm" svg:y1="7.461cm" svg:x2="15.717cm" svg:y2="7.461cm"><text:p/></draw:line><draw:line draw:style-name="gr317" draw:text-style-name="P74" svg:x1="9.471cm" svg:y1="1.21cm" svg:x2="16.471cm" svg:y2="1.21cm"><text:p/></draw:line><draw:line draw:style-name="gr318" draw:text-style-name="P74" svg:x1="15.718cm" svg:y1="7.46cm" svg:x2="15.718cm" svg:y2="1.21cm"><text:p/></draw:line><draw:line draw:style-name="gr319" draw:text-style-name="P74" svg:x1="0.721cm" svg:y1="7.461cm" svg:x2="1.221cm" svg:y2="7.461cm"><text:p/></draw:line><draw:line draw:style-name="gr320" draw:text-style-name="P74" svg:x1="0.221cm" svg:y1="1.21cm" svg:x2="6.721cm" svg:y2="1.21cm"><text:p/></draw:line><draw:line draw:style-name="gr6" draw:text-style-name="P74" svg:x1="0.721cm" svg:y1="1.21cm" svg:x2="0.721cm" svg:y2="7.46cm"><text:p/></draw:line><draw:line draw:style-name="gr321" draw:text-style-name="P74" svg:x1="0.721cm" svg:y1="6.21cm" svg:x2="1.221cm" svg:y2="6.21cm"><text:p/></draw:line><draw:line draw:style-name="gr322" draw:text-style-name="P74" svg:x1="0.721cm" svg:y1="4.96cm" svg:x2="1.221cm" svg:y2="4.96cm"><text:p/></draw:line><draw:line draw:style-name="gr323" draw:text-style-name="P74" svg:x1="0.721cm" svg:y1="3.21cm" svg:x2="1.221cm" svg:y2="3.21cm"><text:p/></draw:line><draw:line draw:style-name="gr6" draw:text-style-name="P74" svg:x1="4.471cm" svg:y1="3.21cm" svg:x2="4.971cm" svg:y2="3.21cm"><text:p/></draw:line><draw:line draw:style-name="gr6" draw:text-style-name="P74" svg:x1="4.967cm" svg:y1="3.96cm" svg:x2="4.967cm" svg:y2="3.21cm"><text:p/></draw:line><draw:line draw:style-name="gr324" draw:text-style-name="P74" svg:x1="4.971cm" svg:y1="3.96cm" svg:x2="0.721cm" svg:y2="3.96cm"><text:p/></draw:line><draw:line draw:style-name="gr325" draw:text-style-name="P74" svg:x1="3.219cm" svg:y1="6.21cm" svg:x2="4.469cm" svg:y2="6.21cm"><text:p/></draw:line><draw:line draw:style-name="gr326" draw:text-style-name="P74" svg:x1="5.969cm" svg:y1="6.21cm" svg:x2="6.719cm" svg:y2="6.21cm"><text:p/></draw:line><draw:line draw:style-name="gr327" draw:text-style-name="P74" svg:x1="15.217cm" svg:y1="4.96cm" svg:x2="15.717cm" svg:y2="4.96cm"><text:p/></draw:line><draw:line draw:style-name="gr328" draw:text-style-name="P74" svg:x1="0.721cm" svg:y1="2.46cm" svg:x2="4.971cm" svg:y2="2.46cm"><text:p/></draw:line><draw:line draw:style-name="gr329" draw:text-style-name="P74" svg:x1="5.969cm" svg:y1="2.46cm" svg:x2="6.719cm" svg:y2="2.46cm"><text:p/></draw:line><draw:line draw:style-name="gr330" draw:text-style-name="P74" svg:x1="9.471cm" svg:y1="2.46cm" svg:x2="15.721cm" svg:y2="2.46cm"><text:p/></draw:line><draw:line draw:style-name="gr331" draw:text-style-name="P74" svg:x1="6.221cm" svg:y1="3.711cm" svg:x2="6.221cm" svg:y2="4.961cm"><text:p/></draw:line></draw:g></text:p>
      <text:p text:style-name="Text_20_body"/>
      <text:p text:style-name="Text_20_body">Das reservierte Wort <text:span text:style-name="Source_20_Text">PACKED</text:span> wird akzeptiert aber ignoriert, da Packen bei <text:span text:style-name="Source_20_Text">ARRAYs OF CHAR</text:span> usw. schon stattfindet. Der einzige Fall, in dem Packen von Arrays vorteilhaft wäre, ist der bei <text:span text:style-name="Source_20_Text">ARRAYs OF BOOLEAN</text:span>, aber in diesem Fall wird normalerweise ein SET verwendet, wenn Packen erforderlich ist.</text:p>
      <text:h text:style-name="Heading_20_3" text:outline-level="3"><text:bookmark-start text:name="__RefHeading___Toc41_1849558913"/><text:soft-page-break/>Felder und Mengen<text:bookmark-end text:name="__RefHeading___Toc41_1849558913"/></text:h>
      <text:p text:style-name="Text_20_body">Der Grundtyp eines <text:span text:style-name="Source_20_Text">SET</text:span>s kann bis zu 256 Elemente enthalten. Das ermöglicht <text:span text:style-name="Source_20_Text">SET </text:span><text:span text:style-name="Source_20_Text"><text:span text:style-name="T16">OF</text:span></text:span><text:span text:style-name="Source_20_Text"> CHAR</text:span> zusammen mit <text:span text:style-name="Source_20_Text">SET</text:span>s von jedem Nutzer-Aufzählungstyp zu deklarieren. Beachten Sie, dass nur Untermengen von <text:span text:style-name="Source_20_Text">INTERGER</text:span>s als Grundtypen verwendet werden können. Alle Teilmengen von <text:span text:style-name="Source_20_Text">INTEGER</text:span>s werden als <text:span text:style-name="Source_20_Text">SET </text:span><text:span text:style-name="Source_20_Text"><text:span text:style-name="T16">OF</text:span></text:span><text:span text:style-name="Source_20_Text"> 0..255</text:span> behandelt.</text:p>
      <text:p text:style-name="Text_20_body">Zugelassen sind auch <text:span text:style-name="Source_20_Text">ARRAY </text:span><text:span text:style-name="Source_20_Text"><text:span text:style-name="T17">OF</text:span></text:span><text:span text:style-name="Source_20_Text"> ARRAY</text:span>, <text:span text:style-name="Source_20_Text">ARRAY </text:span><text:span text:style-name="Source_20_Text"><text:span text:style-name="T17">OF</text:span></text:span><text:span text:style-name="Source_20_Text"> SET</text:span>, <text:span text:style-name="Source_20_Text">RECORD </text:span><text:span text:style-name="Source_20_Text"><text:span text:style-name="T17">OF</text:span></text:span><text:span text:style-name="Source_20_Text"> SET</text:span> usw.</text:p>
      <text:p text:style-name="Text_20_body">Zwei Array-Typen werden nur dann als äquivalent betrachtet, wenn ihre Definition in ein und derselben Benutzung des reservierten Wertes ARRAY erfolgt. Folgende Typen sind somit nicht äquivalent:</text:p>
      <text:p text:style-name="Preformatted_20_Text">TYPE tablea = ARRAY[1..100] OF INTEGER;</text:p>
      <text:p text:style-name="Preformatted_20_Text"><text:s text:c="5"/>tableb = ARRAY[1..100] OF INTEGER;</text:p>
      <text:p text:style-name="Preformatted_20_Text"/>
      <text:p text:style-name="Text_20_body">Eine Variable vom Typ <text:span text:style-name="Source_20_Text">tablea</text:span> kann also nicht einer Variablen vom Typ <text:span text:style-name="Source_20_Text">tableb</text:span> zugewiesen werden. Das ermöglicht das Ermitteln von Fehlern, wenn die beiden Tabellen verschiedene Daten darstellen. Die o.g. Einschränkung gilt nicht für den Spezialfall <text:span text:style-name="Source_20_Text">ARRAY</text:span>s vom Stringtyp, da diese immer zur Darstellung von ähnlichen Daten verwendet werden.</text:p>
      <text:h text:style-name="Heading_20_3" text:outline-level="3"><text:bookmark-start text:name="__RefHeading___Toc43_1849558913"/>Zeiger<text:bookmark-end text:name="__RefHeading___Toc43_1849558913"/></text:h>
      <text:p text:style-name="Text_20_body">KC-PASCAL erlaubt die Erzeugung dynamischer Variablen durch die Benutzung der Standardprozedur <text:span text:style-name="Source_20_Text">NEW</text:span>. Im Gegensatz zur statischen Variablen, der ein Speicherplatz überall in dem Block zugewiesen ist, in der sie deklariert ist, kann auf die dynamische Variable nicht direkt durch einen Namen Bezug genommen werden. Diese Zeigervariable ist eine statische Variable und enthält die Adresse der dynamischen Variablen. <text:s/>Auf diese wird mittels eines '<text:span text:style-name="Source_20_Text">^</text:span>' hinter der Zeigervariablen zugegriffen.</text:p>
      <text:p text:style-name="Text_20_body">Im KC-PASCAL gibt es folgende Einschränkungen in der Benutzung von Zeigern:</text:p>
      <text:p text:style-name="Text_20_body">Zeiger auf Typen, die nicht vereinbart wurden, sind nicht erlaubt. Das verhindert nicht die Erzeugung von verketteten Listen, da Typ-Definitionen Zeiger auf sich selbst enthalten dürfen, z.B.:</text:p>
      <text:p text:style-name="Preformatted_20_Text">TYPE</text:p>
      <text:p text:style-name="Preformatted_20_Text"><text:s text:c="2"/>item = RECORD</text:p>
      <text:p text:style-name="Preformatted_20_Text"><text:s text:c="9"/>value:INTEGER;</text:p>
      <text:p text:style-name="Preformatted_20_Text"><text:s text:c="9"/>next:^item</text:p>
      <text:p text:style-name="Preformatted_20_Text"><text:s text:c="9"/>END;</text:p>
      <text:p text:style-name="Preformatted_20_Text"><text:s text:c="2"/>link = ^item;</text:p>
      <text:p text:style-name="Preformatted_20_Text"><text:s text:c="2"/></text:p>
      <text:p text:style-name="Text_20_body">Zeiger auf Zeiger sind nicht erlaubt.</text:p>
      <text:p text:style-name="Text_20_body">Zeiger auf den gleichen Typ werden als äquivalent betrachtet, z.B.:</text:p>
      <text:p text:style-name="Preformatted_20_Text">VAR first:link;</text:p>
      <text:p text:style-name="Preformatted_20_Text"><text:s text:c="4"/>current: ^item;</text:p>
      <text:p text:style-name="Preformatted_20_Text"/>
      <text:p text:style-name="Text_20_body"><text:soft-page-break/>Die Variablen <text:span text:style-name="Source_20_Text">first</text:span> und <text:span text:style-name="Source_20_Text">current</text:span> sind äquivalent (d.h. Strukturäquivalenz wird benutzt) und dürfen einander zugewiesen oder verglichen werden.</text:p>
      <text:p text:style-name="Text_20_body">Die vordefinierte Konstante <text:span text:style-name="Source_20_Text">NIL</text:span> ist zugelassen. Wenn sie einer Zeigervariablen zugewiesen wird, wird sie als keine Adressen enthaltend betrachtet.</text:p>
      <text:h text:style-name="Heading_20_3" text:outline-level="3"><text:bookmark-start text:name="__RefHeading___Toc45_1849558913"/>R<text:span text:style-name="T4">ecord</text:span>s<text:bookmark-end text:name="__RefHeading___Toc45_1849558913"/></text:h>
      <text:p text:style-name="Text_20_body">Die Implementierung von <text:span text:style-name="Source_20_Text">RECORD</text:span>s, strukturierten Variablen, die sich aus einer festen Anzahl Bestandteilen, sogenannten Feldern (fields), zusammensetzen, entspricht dem Standard-PASCAL bis auf die Einschränkung, dass ein <text:span text:style-name="Source_20_Text">VARIANT</text:span>-Teil der Feldliste nicht zugelassen ist.</text:p>
      <text:p text:style-name="Text_20_body">Zwei <text:span text:style-name="Source_20_Text">RECORD</text:span>-Typen werden nur als äquivalent betrachtet, wenn ihre Deklaration zum gleichen Zeitpunkt unter dem gleichen reservierten Wort <text:span text:style-name="Source_20_Text">RECORD</text:span> erfolgt.</text:p>
      <text:p text:style-name="Text_20_body">Die <text:span text:style-name="Source_20_Text">WITH</text:span>-Anweisung kann verwendet werden, um den Zugriff zu den einzelnen Feldern innerhalb eines <text:span text:style-name="Source_20_Text">RECORD</text:span>s in kompakterer Form zu ermöglichen.</text:p>
      <text:h text:style-name="Heading_20_2" text:outline-level="2"><text:bookmark-start text:name="__RefHeading___Toc47_1849558913"/>Feldliste <text:span text:style-name="T42">(field list)</text:span><text:bookmark-end text:name="__RefHeading___Toc47_1849558913"/></text:h>
      <text:p text:style-name="Text_20_body"><draw:g text:anchor-type="paragraph" draw:z-index="6" draw:name="Gruppenobjekt 8" draw:style-name="gr1"><draw:custom-shape draw:style-name="gr145" draw:text-style-name="P73" svg:width="2.751cm" svg:height="1.001cm" svg:x="3.232cm" svg:y="2.554cm"><text:p text:style-name="P72"><text:span text:style-name="T70">identifier</text:span></text:p><draw:enhanced-geometry svg:viewBox="0 0 21600 21600" draw:type="rectangle" draw:enhanced-path="M 0 0 L 21600 0 21600 21600 0 21600 0 0 Z N"/></draw:custom-shape><draw:custom-shape draw:style-name="gr145" draw:text-style-name="P73" svg:width="2.751cm" svg:height="1.001cm" svg:x="9.732cm" svg:y="2.554cm"><text:p text:style-name="P72"><text:span text:style-name="T70">type</text:span></text:p><draw:enhanced-geometry svg:viewBox="0 0 21600 21600" draw:type="rectangle" draw:enhanced-path="M 0 0 L 21600 0 21600 21600 0 21600 0 0 Z N"/></draw:custom-shape><draw:custom-shape draw:style-name="gr4" draw:text-style-name="P71" svg:width="1.001cm" svg:height="1.001cm" svg:x="4.232cm" svg:y="1.306cm"><text:p text:style-name="P70"><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2" draw:text-style-name="P71" svg:width="1.001cm" svg:height="0.999cm" svg:x="7.481cm" svg:y="0.556cm"><text:p text:style-name="P70"><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1" svg:width="1.001cm" svg:height="1.001cm" svg:x="7.481cm" svg:y="2.554cm"><text:p text:style-name="P70"><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83" draw:text-style-name="P74" svg:x1="1.481cm" svg:y1="3.055cm" svg:x2="3.231cm" svg:y2="3.055cm"><text:p/></draw:line><draw:line draw:style-name="gr284" draw:text-style-name="P74" svg:x1="5.983cm" svg:y1="3.055cm" svg:x2="7.483cm" svg:y2="3.055cm"><text:p/></draw:line><draw:line draw:style-name="gr285" draw:text-style-name="P74" svg:x1="8.481cm" svg:y1="3.055cm" svg:x2="9.731cm" svg:y2="3.055cm"><text:p/></draw:line><draw:line draw:style-name="gr286" draw:text-style-name="P74" svg:x1="12.483cm" svg:y1="3.055cm" svg:x2="14.233cm" svg:y2="3.055cm"><text:p/></draw:line><draw:line draw:style-name="gr6" draw:text-style-name="P74" svg:x1="6.481cm" svg:y1="3.058cm" svg:x2="6.481cm" svg:y2="1.808cm"><text:p/></draw:line><draw:line draw:style-name="gr287" draw:text-style-name="P74" svg:x1="6.481cm" svg:y1="1.808cm" svg:x2="5.231cm" svg:y2="1.808cm"><text:p/></draw:line><draw:line draw:style-name="gr6" draw:text-style-name="P74" svg:x1="4.231cm" svg:y1="1.808cm" svg:x2="2.481cm" svg:y2="1.808cm"><text:p/></draw:line><draw:line draw:style-name="gr288" draw:text-style-name="P74" svg:x1="2.481cm" svg:y1="1.808cm" svg:x2="2.481cm" svg:y2="3.058cm"><text:p/></draw:line><draw:line draw:style-name="gr6" draw:text-style-name="P74" svg:x1="12.984cm" svg:y1="3.055cm" svg:x2="12.984cm" svg:y2="1.055cm"><text:p/></draw:line><draw:line draw:style-name="gr289" draw:text-style-name="P74" svg:x1="12.981cm" svg:y1="1.055cm" svg:x2="8.481cm" svg:y2="1.055cm"><text:p/></draw:line><draw:line draw:style-name="gr6" draw:text-style-name="P74" svg:x1="7.481cm" svg:y1="1.055cm" svg:x2="1.981cm" svg:y2="1.055cm"><text:p/></draw:line><draw:line draw:style-name="gr290" draw:text-style-name="P74" svg:x1="1.981cm" svg:y1="1.055cm" svg:x2="1.981cm" svg:y2="3.055cm"><text:p/></draw:line><draw:line draw:style-name="gr6" draw:text-style-name="P74" svg:x1="1.981cm" svg:y1="3.805cm" svg:x2="1.981cm" svg:y2="3.055cm"><text:p/></draw:line><draw:line draw:style-name="gr6" draw:text-style-name="P74" svg:x1="1.981cm" svg:y1="3.805cm" svg:x2="12.981cm" svg:y2="3.805cm"><text:p/></draw:line><draw:line draw:style-name="gr291" draw:text-style-name="P74" svg:x1="12.984cm" svg:y1="3.805cm" svg:x2="12.984cm" svg:y2="3.055cm"><text:p/></draw:line></draw:g></text:p>
      <text:p text:style-name="Text_20_body"/>
      <text:p text:style-name="Text_20_body">Wird im Zusammenhang mit <text:span text:style-name="Source_20_Text">RECORD</text:span>s verwendet.</text:p>
      <text:h text:style-name="Heading_20_2" text:outline-level="2"><text:bookmark-start text:name="__RefHeading___Toc49_1849558913"/>Variable <text:span text:style-name="T43">(variable)</text:span><text:bookmark-end text:name="__RefHeading___Toc49_1849558913"/></text:h>
      <text:p text:style-name="Text_20_body"><draw:g text:anchor-type="paragraph" draw:z-index="7" draw:name="Gruppenobjekt 9" draw:style-name="gr1"><draw:custom-shape draw:style-name="gr10" draw:text-style-name="P73" svg:width="3.252cm" svg:height="1.001cm" svg:x="2.228cm" svg:y="0.714cm"><text:p text:style-name="P72"><text:span text:style-name="T70">variable identifier</text:span></text:p><draw:enhanced-geometry svg:viewBox="0 0 21600 21600" draw:type="rectangle" draw:enhanced-path="M 0 0 L 21600 0 21600 21600 0 21600 0 0 Z N"/></draw:custom-shape><draw:custom-shape draw:style-name="gr211" draw:text-style-name="P73" svg:width="2.504cm" svg:height="1.001cm" svg:x="8.976cm" svg:y="1.464cm"><text:p text:style-name="P72"><text:span text:style-name="T70">expression</text:span></text:p><draw:enhanced-geometry svg:viewBox="0 0 21600 21600" draw:type="rectangle" draw:enhanced-path="M 0 0 L 21600 0 21600 21600 0 21600 0 0 Z N"/></draw:custom-shape><draw:custom-shape draw:style-name="gr228" draw:text-style-name="P71" svg:width="1.001cm" svg:height="1.003cm" svg:x="9.729cm" svg:y="2.712cm"><text:p text:style-name="P70"><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2" draw:text-style-name="P71" svg:width="1.003cm" svg:height="1.001cm" svg:x="7.226cm" svg:y="1.464cm"><text:p text:style-name="P70"><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2" draw:text-style-name="P71" svg:width="1.003cm" svg:height="1.001cm" svg:x="12.227cm" svg:y="1.464cm"><text:p text:style-name="P70"><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63" draw:text-style-name="P73" svg:width="3.252cm" svg:height="1.003cm" svg:x="2.228cm" svg:y="2.213cm"><text:p text:style-name="P72"><text:span text:style-name="T70">field identifier</text:span></text:p><draw:enhanced-geometry svg:viewBox="0 0 21600 21600" draw:type="rectangle" draw:enhanced-path="M 0 0 L 21600 0 21600 21600 0 21600 0 0 Z N"/></draw:custom-shape><draw:line draw:style-name="gr264" draw:text-style-name="P74" svg:x1="0.477cm" svg:y1="1.964cm" svg:x2="1.227cm" svg:y2="1.964cm"><text:p/></draw:line><draw:line draw:style-name="gr6" draw:text-style-name="P74" svg:x1="1.226cm" svg:y1="1.21cm" svg:x2="1.226cm" svg:y2="2.71cm"><text:p/></draw:line><draw:line draw:style-name="gr265" draw:text-style-name="P74" svg:x1="1.226cm" svg:y1="1.21cm" svg:x2="2.226cm" svg:y2="1.21cm"><text:p/></draw:line><draw:line draw:style-name="gr266" draw:text-style-name="P74" svg:x1="1.226cm" svg:y1="2.711cm" svg:x2="2.226cm" svg:y2="2.711cm"><text:p/></draw:line><draw:line draw:style-name="gr6" draw:text-style-name="P74" svg:x1="5.477cm" svg:y1="1.21cm" svg:x2="5.977cm" svg:y2="1.21cm"><text:p/></draw:line><draw:line draw:style-name="gr6" draw:text-style-name="P74" svg:x1="5.477cm" svg:y1="2.711cm" svg:x2="5.977cm" svg:y2="2.711cm"><text:p/></draw:line><draw:line draw:style-name="gr267" draw:text-style-name="P74" svg:x1="5.978cm" svg:y1="1.21cm" svg:x2="5.978cm" svg:y2="1.96cm"><text:p/></draw:line><draw:line draw:style-name="gr268" draw:text-style-name="P74" svg:x1="5.978cm" svg:y1="2.714cm" svg:x2="5.978cm" svg:y2="1.964cm"><text:p/></draw:line><draw:line draw:style-name="gr269" draw:text-style-name="P74" svg:x1="5.978cm" svg:y1="1.964cm" svg:x2="7.228cm" svg:y2="1.964cm"><text:p/></draw:line><draw:line draw:style-name="gr6" draw:text-style-name="P74" svg:x1="6.478cm" svg:y1="1.964cm" svg:x2="6.478cm" svg:y2="0.714cm"><text:p/></draw:line><draw:line draw:style-name="gr270" draw:text-style-name="P74" svg:x1="6.728cm" svg:y1="0.963cm" svg:x2="6.728cm" svg:y2="1.963cm"><text:p/></draw:line><draw:line draw:style-name="gr271" draw:text-style-name="P74" svg:x1="8.227cm" svg:y1="1.964cm" svg:x2="8.977cm" svg:y2="1.964cm"><text:p/></draw:line><draw:line draw:style-name="gr6" draw:text-style-name="P74" svg:x1="9.728cm" svg:y1="3.212cm" svg:x2="8.478cm" svg:y2="3.212cm"><text:p/></draw:line><draw:line draw:style-name="gr272" draw:text-style-name="P74" svg:x1="8.478cm" svg:y1="3.214cm" svg:x2="8.478cm" svg:y2="1.964cm"><text:p/></draw:line><draw:line draw:style-name="gr6" draw:text-style-name="P74" svg:x1="11.728cm" svg:y1="1.964cm" svg:x2="11.728cm" svg:y2="3.214cm"><text:p/></draw:line><draw:line draw:style-name="gr273" draw:text-style-name="P74" svg:x1="11.728cm" svg:y1="3.212cm" svg:x2="10.728cm" svg:y2="3.212cm"><text:p/></draw:line><draw:line draw:style-name="gr274" draw:text-style-name="P74" svg:x1="11.476cm" svg:y1="1.964cm" svg:x2="12.226cm" svg:y2="1.964cm"><text:p/></draw:line><draw:custom-shape draw:style-name="gr275" draw:text-style-name="P73" svg:width="3.003cm" svg:height="1.003cm" svg:x="8.976cm" svg:y="3.963cm"><text:p text:style-name="P72"><text:span text:style-name="T70">field identifier</text:span></text:p><draw:enhanced-geometry svg:viewBox="0 0 21600 21600" draw:type="rectangle" draw:enhanced-path="M 0 0 L 21600 0 21600 21600 0 21600 0 0 Z N"/></draw:custom-shape><draw:custom-shape draw:style-name="gr229" draw:text-style-name="P71" svg:width="1.003cm" svg:height="1.003cm" svg:x="7.226cm" svg:y="3.963cm"><text:p text:style-name="P70"><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76" draw:text-style-name="P74" svg:x1="6.728cm" svg:y1="4.464cm" svg:x2="7.228cm" svg:y2="4.464cm"><text:p/></draw:line><draw:line draw:style-name="gr277" draw:text-style-name="P74" svg:x1="8.227cm" svg:y1="4.464cm" svg:x2="8.977cm" svg:y2="4.464cm"><text:p/></draw:line><draw:custom-shape draw:style-name="gr228" draw:text-style-name="P71" svg:width="1.001cm" svg:height="1.003cm" svg:x="9.729cm" svg:y="5.214cm"><text:p text:style-name="P70"><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74" svg:x1="6.728cm" svg:y1="1.964cm" svg:x2="6.728cm" svg:y2="5.715cm"><text:p/></draw:line><draw:line draw:style-name="gr278" draw:text-style-name="P74" svg:x1="6.728cm" svg:y1="5.715cm" svg:x2="9.728cm" svg:y2="5.715cm"><text:p/></draw:line><draw:line draw:style-name="gr279" draw:text-style-name="P74" svg:x1="13.228cm" svg:y1="1.964cm" svg:x2="15.978cm" svg:y2="1.964cm"><text:p/></draw:line><draw:line draw:style-name="gr6" draw:text-style-name="P74" svg:x1="10.728cm" svg:y1="5.715cm" svg:x2="13.728cm" svg:y2="5.715cm"><text:p/></draw:line><draw:line draw:style-name="gr280" draw:text-style-name="P74" svg:x1="13.728cm" svg:y1="5.715cm" svg:x2="13.728cm" svg:y2="1.964cm"><text:p/></draw:line><draw:line draw:style-name="gr6" draw:text-style-name="P74" svg:x1="13.728cm" svg:y1="1.963cm" svg:x2="13.728cm" svg:y2="0.963cm"><text:p/></draw:line><draw:line draw:style-name="gr6" draw:text-style-name="P74" svg:x1="13.728cm" svg:y1="0.963cm" svg:x2="6.728cm" svg:y2="0.963cm"><text:p/></draw:line><draw:line draw:style-name="gr6" draw:text-style-name="P74" svg:x1="6.478cm" svg:y1="0.714cm" svg:x2="14.228cm" svg:y2="0.714cm"><text:p/></draw:line><draw:line draw:style-name="gr281" draw:text-style-name="P74" svg:x1="14.226cm" svg:y1="0.714cm" svg:x2="14.226cm" svg:y2="1.964cm"><text:p/></draw:line><draw:line draw:style-name="gr282" draw:text-style-name="P74" svg:x1="11.977cm" svg:y1="4.464cm" svg:x2="13.727cm" svg:y2="4.464cm"><text:p/></draw:line></draw:g></text:p>
      <text:p text:style-name="Text_20_body"/>
      <text:p text:style-name="Text_20_body"><text:soft-page-break/>In KC-PASCAL sind sowohl statische als auch dynamische Variable zugelassen. Statische Variable werden explizit durch <text:span text:style-name="Source_20_Text">VAR</text:span> deklariert, wobei für sie im gesamten Block, in dem sie deklariert sind, Speicherplatz zugewiesen wird.</text:p>
      <text:p text:style-name="Text_20_body">Dynamische Variable werden jedoch während der Programmierung durch die Prozedur <text:span text:style-name="Source_20_Text">NEW</text:span> dynamisch erzeugt. Sie werden nicht explizit deklariert und können nicht durch einen Namen angesprochen werden.</text:p>
      <text:p text:style-name="Text_20_body">Auf sie wird indirekt durch eine statische Variable vom Pointertyp, die die Adresse der dynamischen Variablen enthält, Bezug genommen.</text:p>
      <text:p text:style-name="P31">Beim Beschreiben von Elementen mehrdimensionaler Arrays muss der Programmierer nicht die gleiche Art der Index-Beschreibung in der Bezugnahme verwenden, die in der Deklaration benutzt wurde.</text:p>
      <text:p text:style-name="P31">z.B.: Wenn <text:span text:style-name="Source_20_Text">V</text:span><text:span text:style-name="Source_20_Text"><text:span text:style-name="T18">AR</text:span></text:span><text:span text:style-name="Source_20_Text"> a</text:span> als <text:span text:style-name="Source_20_Text">ARRAY[1..10] OF ARRAY[1..10] OF INTEGER</text:span> deklariert wurde, kann sowohl mit <text:span text:style-name="Source_20_Text">a[1][1]</text:span> als auch mit <text:span text:style-name="Source_20_Text">a[1,1]</text:span> auf das Element (1,1) des Arrays zugegriffen werden.</text:p>
      <text:h text:style-name="Heading_20_2" text:outline-level="2"><text:bookmark-start text:name="__RefHeading___Toc51_1849558913"/>F<text:span text:style-name="T4">aktor </text:span><text:span text:style-name="T44">(factor)</text:span><text:bookmark-end text:name="__RefHeading___Toc51_1849558913"/></text:h>
      <text:p text:style-name="Text_20_body"><draw:g text:anchor-type="paragraph" draw:z-index="8" draw:name="Gruppenobjekt 10" draw:style-name="gr1"><draw:custom-shape draw:style-name="gr173" draw:text-style-name="P73" svg:width="3.5cm" svg:height="0.999cm" svg:x="6.537cm" svg:y="0.302cm"><text:p text:style-name="P72"><text:span text:style-name="T70">unsigned constant</text:span></text:p><draw:enhanced-geometry svg:viewBox="0 0 21600 21600" draw:type="rectangle" draw:enhanced-path="M 0 0 L 21600 0 21600 21600 0 21600 0 0 Z N"/></draw:custom-shape><draw:custom-shape draw:style-name="gr225" draw:text-style-name="P73" svg:width="3.5cm" svg:height="1.003cm" svg:x="6.537cm" svg:y="1.551cm"><text:p text:style-name="P72"><text:span text:style-name="T70">variable</text:span></text:p><draw:enhanced-geometry svg:viewBox="0 0 21600 21600" draw:type="rectangle" draw:enhanced-path="M 0 0 L 21600 0 21600 21600 0 21600 0 0 Z N"/></draw:custom-shape><draw:custom-shape draw:style-name="gr226" draw:text-style-name="P73" svg:width="3.502cm" svg:height="1.003cm" svg:x="3.535cm" svg:y="2.801cm"><text:p text:style-name="P72"><text:span text:style-name="T70">function identifier</text:span></text:p><draw:enhanced-geometry svg:viewBox="0 0 21600 21600" draw:type="rectangle" draw:enhanced-path="M 0 0 L 21600 0 21600 21600 0 21600 0 0 Z N"/></draw:custom-shape><draw:custom-shape draw:style-name="gr227" draw:text-style-name="P73" svg:width="2.504cm" svg:height="1.003cm" svg:x="9.786cm" svg:y="2.801cm"><text:p text:style-name="P72"><text:span text:style-name="T70">expression</text:span></text:p><draw:enhanced-geometry svg:viewBox="0 0 21600 21600" draw:type="rectangle" draw:enhanced-path="M 0 0 L 21600 0 21600 21600 0 21600 0 0 Z N"/></draw:custom-shape><draw:custom-shape draw:style-name="gr228" draw:text-style-name="P71" svg:width="1.001cm" svg:height="1.003cm" svg:x="8.037cm" svg:y="2.801cm"><text:p text:style-name="P70"><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9" draw:text-style-name="P71" svg:width="1.003cm" svg:height="1.003cm" svg:x="13.037cm" svg:y="2.801cm"><text:p text:style-name="P70"><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30" draw:text-style-name="P71" svg:width="1.003cm" svg:height="0.999cm" svg:x="10.538cm" svg:y="4.054cm"><text:p text:style-name="P70"><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1" draw:text-style-name="P73" svg:width="2.504cm" svg:height="1.001cm" svg:x="7.036cm" svg:y="5.553cm"><text:p text:style-name="P72"><text:span text:style-name="T70">expression</text:span></text:p><draw:enhanced-geometry svg:viewBox="0 0 21600 21600" draw:type="rectangle" draw:enhanced-path="M 0 0 L 21600 0 21600 21600 0 21600 0 0 Z N"/></draw:custom-shape><draw:custom-shape draw:style-name="gr4" draw:text-style-name="P71" svg:width="1.001cm" svg:height="1.001cm" svg:x="4.787cm" svg:y="5.553cm"><text:p text:style-name="P70"><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2" draw:text-style-name="P71" svg:width="1.003cm" svg:height="1.001cm" svg:x="10.538cm" svg:y="5.553cm"><text:p text:style-name="P70"><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7" draw:text-style-name="P73" svg:width="2.504cm" svg:height="1.003cm" svg:x="7.036cm" svg:y="6.802cm"><text:p text:style-name="P72"><text:span text:style-name="T70">factor</text:span></text:p><draw:enhanced-geometry svg:viewBox="0 0 21600 21600" draw:type="rectangle" draw:enhanced-path="M 0 0 L 21600 0 21600 21600 0 21600 0 0 Z N"/></draw:custom-shape><draw:custom-shape draw:style-name="gr231" draw:text-style-name="P71" svg:width="2.001cm" svg:height="1.003cm" svg:x="4.287cm" svg:y="6.802cm"><text:p text:style-name="P70"><text:span text:style-name="T69">NO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2" draw:text-style-name="P73" svg:width="2.502cm" svg:height="1.001cm" svg:x="4.036cm" svg:y="8.303cm"><text:p text:style-name="P72"><text:span text:style-name="T70">expression</text:span></text:p><draw:enhanced-geometry svg:viewBox="0 0 21600 21600" draw:type="rectangle" draw:enhanced-path="M 0 0 L 21600 0 21600 21600 0 21600 0 0 Z N"/></draw:custom-shape><draw:custom-shape draw:style-name="gr212" draw:text-style-name="P71" svg:width="1.003cm" svg:height="1.001cm" svg:x="2.036cm" svg:y="8.303cm"><text:p text:style-name="P70"><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2" draw:text-style-name="P71" svg:width="1.003cm" svg:height="1.001cm" svg:x="13.536cm" svg:y="8.303cm"><text:p text:style-name="P70"><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1" draw:text-style-name="P73" svg:width="2.504cm" svg:height="1.001cm" svg:x="9.786cm" svg:y="8.303cm"><text:p text:style-name="P72"><text:span text:style-name="T70">expression</text:span></text:p><draw:enhanced-geometry svg:viewBox="0 0 21600 21600" draw:type="rectangle" draw:enhanced-path="M 0 0 L 21600 0 21600 21600 0 21600 0 0 Z N"/></draw:custom-shape><draw:custom-shape draw:style-name="gr34" draw:text-style-name="P71" svg:width="1.5cm" svg:height="1.001cm" svg:x="7.537cm" svg:y="8.303cm"><text:p text:style-name="P70"><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33" draw:text-style-name="P74" svg:x1="0.285cm" svg:y1="0.802cm" svg:x2="6.536cm" svg:y2="0.802cm"><text:p/></draw:line><draw:line draw:style-name="gr6" draw:text-style-name="P74" svg:x1="1.285cm" svg:y1="0.802cm" svg:x2="1.285cm" svg:y2="8.802cm"><text:p/></draw:line><draw:line draw:style-name="gr234" draw:text-style-name="P74" svg:x1="1.285cm" svg:y1="8.802cm" svg:x2="2.035cm" svg:y2="8.802cm"><text:p/></draw:line><draw:line draw:style-name="gr235" draw:text-style-name="P74" svg:x1="1.285cm" svg:y1="2.055cm" svg:x2="6.536cm" svg:y2="2.055cm"><text:p/></draw:line><draw:line draw:style-name="gr236" draw:text-style-name="P74" svg:x1="1.285cm" svg:y1="3.302cm" svg:x2="3.535cm" svg:y2="3.302cm"><text:p/></draw:line><draw:line draw:style-name="gr237" draw:text-style-name="P74" svg:x1="1.285cm" svg:y1="6.052cm" svg:x2="4.785cm" svg:y2="6.052cm"><text:p/></draw:line><draw:line draw:style-name="gr238" draw:text-style-name="P74" svg:x1="1.285cm" svg:y1="7.302cm" svg:x2="4.285cm" svg:y2="7.302cm"><text:p/></draw:line><draw:line draw:style-name="gr239" draw:text-style-name="P74" svg:x1="10.036cm" svg:y1="0.802cm" svg:x2="16.537cm" svg:y2="0.802cm"><text:p/></draw:line><draw:line draw:style-name="gr6" draw:text-style-name="P74" svg:x1="14.537cm" svg:y1="8.802cm" svg:x2="15.037cm" svg:y2="8.802cm"><text:p/></draw:line><draw:line draw:style-name="gr240" draw:text-style-name="P74" svg:x1="15.037cm" svg:y1="8.802cm" svg:x2="15.037cm" svg:y2="0.802cm"><text:p/></draw:line><draw:line draw:style-name="gr241" draw:text-style-name="P74" svg:x1="10.036cm" svg:y1="2.055cm" svg:x2="15.037cm" svg:y2="2.055cm"><text:p/></draw:line><draw:line draw:style-name="gr242" draw:text-style-name="P74" svg:x1="7.036cm" svg:y1="3.302cm" svg:x2="8.036cm" svg:y2="3.302cm"><text:p/></draw:line><draw:line draw:style-name="gr243" draw:text-style-name="P74" svg:x1="9.038cm" svg:y1="3.302cm" svg:x2="9.788cm" svg:y2="3.302cm"><text:p/></draw:line><draw:line draw:style-name="gr244" draw:text-style-name="P74" svg:x1="12.289cm" svg:y1="3.302cm" svg:x2="13.039cm" svg:y2="3.302cm"><text:p/></draw:line><draw:line draw:style-name="gr245" draw:text-style-name="P74" svg:x1="14.037cm" svg:y1="3.302cm" svg:x2="15.037cm" svg:y2="3.302cm"><text:p/></draw:line><draw:line draw:style-name="gr6" draw:text-style-name="P74" svg:x1="12.537cm" svg:y1="3.302cm" svg:x2="12.537cm" svg:y2="4.552cm"><text:p/></draw:line><draw:line draw:style-name="gr246" draw:text-style-name="P74" svg:x1="12.537cm" svg:y1="4.552cm" svg:x2="11.537cm" svg:y2="4.552cm"><text:p/></draw:line><draw:line draw:style-name="gr6" draw:text-style-name="P74" svg:x1="10.536cm" svg:y1="4.552cm" svg:x2="9.286cm" svg:y2="4.552cm"><text:p/></draw:line><draw:line draw:style-name="gr247" draw:text-style-name="P74" svg:x1="9.286cm" svg:y1="4.552cm" svg:x2="9.286cm" svg:y2="3.302cm"><text:p/></draw:line><draw:line draw:style-name="gr6" draw:text-style-name="P74" svg:x1="7.286cm" svg:y1="3.302cm" svg:x2="7.286cm" svg:y2="5.302cm"><text:p/></draw:line><draw:line draw:style-name="gr248" draw:text-style-name="P74" svg:x1="7.286cm" svg:y1="5.304cm" svg:x2="15.037cm" svg:y2="5.304cm"><text:p/></draw:line><draw:line draw:style-name="gr249" draw:text-style-name="P74" svg:x1="5.786cm" svg:y1="6.052cm" svg:x2="7.036cm" svg:y2="6.052cm"><text:p/></draw:line><draw:line draw:style-name="gr250" draw:text-style-name="P74" svg:x1="9.536cm" svg:y1="6.052cm" svg:x2="10.536cm" svg:y2="6.052cm"><text:p/></draw:line><draw:line draw:style-name="gr251" draw:text-style-name="P74" svg:x1="11.537cm" svg:y1="6.052cm" svg:x2="15.037cm" svg:y2="6.052cm"><text:p/></draw:line><draw:line draw:style-name="gr252" draw:text-style-name="P74" svg:x1="6.286cm" svg:y1="7.302cm" svg:x2="7.036cm" svg:y2="7.302cm"><text:p/></draw:line><draw:line draw:style-name="gr253" draw:text-style-name="P74" svg:x1="9.536cm" svg:y1="7.302cm" svg:x2="15.037cm" svg:y2="7.302cm"><text:p/></draw:line><draw:line draw:style-name="gr254" draw:text-style-name="P74" svg:x1="3.035cm" svg:y1="8.802cm" svg:x2="4.035cm" svg:y2="8.802cm"><text:p/></draw:line><draw:line draw:style-name="gr255" draw:text-style-name="P74" svg:x1="6.536cm" svg:y1="8.802cm" svg:x2="7.536cm" svg:y2="8.802cm"><text:p/></draw:line><draw:line draw:style-name="gr256" draw:text-style-name="P74" svg:x1="9.038cm" svg:y1="8.802cm" svg:x2="9.788cm" svg:y2="8.802cm"><text:p/></draw:line><draw:line draw:style-name="gr257" draw:text-style-name="P74" svg:x1="12.289cm" svg:y1="8.802cm" svg:x2="13.539cm" svg:y2="8.802cm"><text:p/></draw:line><draw:line draw:style-name="gr6" draw:text-style-name="P74" svg:x1="6.786cm" svg:y1="8.802cm" svg:x2="6.786cm" svg:y2="9.552cm"><text:p/></draw:line><draw:line draw:style-name="gr6" draw:text-style-name="P74" svg:x1="6.786cm" svg:y1="9.555cm" svg:x2="12.537cm" svg:y2="9.555cm"><text:p/></draw:line><draw:line draw:style-name="gr258" draw:text-style-name="P74" svg:x1="12.537cm" svg:y1="9.552cm" svg:x2="12.537cm" svg:y2="8.802cm"><text:p/></draw:line><draw:custom-shape draw:style-name="gr259" draw:text-style-name="P71" svg:width="0.999cm" svg:height="1.003cm" svg:x="7.788cm" svg:y="9.801cm"><text:p text:style-name="P70"><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74" svg:x1="12.788cm" svg:y1="8.802cm" svg:x2="12.788cm" svg:y2="10.302cm"><text:p/></draw:line><draw:line draw:style-name="gr260" draw:text-style-name="P74" svg:x1="12.787cm" svg:y1="10.302cm" svg:x2="8.786cm" svg:y2="10.302cm"><text:p/></draw:line><draw:line draw:style-name="gr6" draw:text-style-name="P74" svg:x1="7.787cm" svg:y1="10.302cm" svg:x2="3.286cm" svg:y2="10.302cm"><text:p/></draw:line><draw:line draw:style-name="gr261" draw:text-style-name="P74" svg:x1="3.286cm" svg:y1="10.302cm" svg:x2="3.286cm" svg:y2="8.802cm"><text:p/></draw:line><draw:line draw:style-name="gr6" draw:text-style-name="P74" svg:x1="3.286cm" svg:y1="8.804cm" svg:x2="3.286cm" svg:y2="8.054cm"><text:p/></draw:line><draw:line draw:style-name="gr6" draw:text-style-name="P74" svg:x1="3.286cm" svg:y1="8.054cm" svg:x2="13.037cm" svg:y2="8.054cm"><text:p/></draw:line><draw:line draw:style-name="gr262" draw:text-style-name="P74" svg:x1="13.037cm" svg:y1="8.054cm" svg:x2="13.037cm" svg:y2="8.804cm"><text:p/></draw:line></draw:g>Siehe Ausdrücke und Funktionen.</text:p>
      <text:h text:style-name="P61" text:outline-level="2"><text:bookmark-start text:name="__RefHeading___Toc53_1849558913"/>T<text:span text:style-name="T4">erm</text:span><text:bookmark-end text:name="__RefHeading___Toc53_1849558913"/></text:h>
      <text:p text:style-name="Text_20_body"><draw:g text:anchor-type="paragraph" draw:z-index="9" draw:name="Gruppenobjekt 11" draw:style-name="gr1"><draw:custom-shape draw:style-name="gr211" draw:text-style-name="P73" svg:width="2.504cm" svg:height="1.001cm" svg:x="1.91cm" svg:y="0.213cm"><text:p text:style-name="P72"><text:span text:style-name="T70">factor</text:span></text:p><draw:enhanced-geometry svg:viewBox="0 0 21600 21600" draw:type="rectangle" draw:enhanced-path="M 0 0 L 21600 0 21600 21600 0 21600 0 0 Z N"/></draw:custom-shape><draw:custom-shape draw:style-name="gr212" draw:text-style-name="P71" svg:width="1.003cm" svg:height="1.001cm" svg:x="4.91cm" svg:y="1.213cm"><text:p text:style-name="P70"><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71" svg:width="1.001cm" svg:height="1.001cm" svg:x="6.411cm" svg:y="1.213cm"><text:p text:style-name="P70"><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71" svg:width="2.001cm" svg:height="1.001cm" svg:x="7.912cm" svg:y="1.213cm"><text:p text:style-name="P70"><text:span text:style-name="T69">DI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1" svg:width="2.001cm" svg:height="1.001cm" svg:x="10.412cm" svg:y="1.213cm"><text:p text:style-name="P70"><text:span text:style-name="T69">MO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1" svg:width="2.001cm" svg:height="1.001cm" svg:x="12.911cm" svg:y="1.213cm"><text:p text:style-name="P70"><text:span text:style-name="T69">AN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3" draw:text-style-name="P74" svg:x1="0.661cm" svg:y1="0.714cm" svg:x2="1.911cm" svg:y2="0.714cm"><text:p/></draw:line><draw:line draw:style-name="gr214" draw:text-style-name="P74" svg:x1="4.411cm" svg:y1="0.714cm" svg:x2="15.662cm" svg:y2="0.714cm"><text:p/></draw:line><draw:line draw:style-name="gr215" draw:text-style-name="P74" svg:x1="5.408cm" svg:y1="0.714cm" svg:x2="5.408cm" svg:y2="1.214cm"><text:p/></draw:line><draw:line draw:style-name="gr216" draw:text-style-name="P74" svg:x1="6.91cm" svg:y1="0.714cm" svg:x2="6.91cm" svg:y2="1.214cm"><text:p/></draw:line><draw:line draw:style-name="gr217" draw:text-style-name="P74" svg:x1="8.912cm" svg:y1="0.714cm" svg:x2="8.912cm" svg:y2="1.214cm"><text:p/></draw:line><draw:line draw:style-name="gr218" draw:text-style-name="P74" svg:x1="11.412cm" svg:y1="0.714cm" svg:x2="11.412cm" svg:y2="1.214cm"><text:p/></draw:line><draw:line draw:style-name="gr219" draw:text-style-name="P74" svg:x1="13.91cm" svg:y1="0.714cm" svg:x2="13.91cm" svg:y2="1.214cm"><text:p/></draw:line><draw:line draw:style-name="gr220" draw:text-style-name="P74" svg:x1="5.408cm" svg:y1="2.211cm" svg:x2="5.408cm" svg:y2="2.711cm"><text:p/></draw:line><draw:line draw:style-name="gr221" draw:text-style-name="P74" svg:x1="6.91cm" svg:y1="2.211cm" svg:x2="6.91cm" svg:y2="2.711cm"><text:p/></draw:line><draw:line draw:style-name="gr222" draw:text-style-name="P74" svg:x1="8.912cm" svg:y1="2.211cm" svg:x2="8.912cm" svg:y2="2.711cm"><text:p/></draw:line><draw:line draw:style-name="gr223" draw:text-style-name="P74" svg:x1="11.412cm" svg:y1="2.211cm" svg:x2="11.412cm" svg:y2="2.711cm"><text:p/></draw:line><draw:line draw:style-name="gr6" draw:text-style-name="P74" svg:x1="13.91cm" svg:y1="2.211cm" svg:x2="13.91cm" svg:y2="2.711cm"><text:p/></draw:line><draw:line draw:style-name="gr6" draw:text-style-name="P74" svg:x1="1.157cm" svg:y1="2.711cm" svg:x2="13.908cm" svg:y2="2.711cm"><text:p/></draw:line><draw:line draw:style-name="gr224" draw:text-style-name="P74" svg:x1="1.157cm" svg:y1="2.715cm" svg:x2="1.157cm" svg:y2="0.714cm"><text:p/></draw:line></draw:g></text:p>
      <text:p text:style-name="Text_20_body">Die Untergrenze einer Menge (<text:span text:style-name="Source_20_Text">SET</text:span>) ist immer Null und die Mengengröße ist immer das Maximum des Grundtyps des <text:span text:style-name="Source_20_Text">SET</text:span>s. Somit belegt ein <text:span text:style-name="Source_20_Text">SET OF CHAR</text:span> immer 32 Bytes (256 Elemente sind möglich <text:span text:style-name="T10">–</text:span> ein Bit für jedes Element). Ebenso ist ein <text:span text:style-name="Source_20_Text">SET OF 0..10</text:span> äquivalent zu einem <text:span text:style-name="Source_20_Text">SET OF 0..255</text:span>.</text:p>
      <text:h text:style-name="Heading_20_2" text:outline-level="2"><text:bookmark-start text:name="__RefHeading___Toc55_1849558913"/>Einfacher Ausdruck <text:span text:style-name="T4">(simple expression)</text:span><text:bookmark-end text:name="__RefHeading___Toc55_1849558913"/></text:h>
      <text:p text:style-name="Text_20_body"><draw:g text:anchor-type="paragraph" draw:z-index="10" draw:name="Gruppenobjekt 12" draw:style-name="gr1"><draw:custom-shape draw:style-name="gr194" draw:text-style-name="P71" svg:width="1.004cm" svg:height="1.006cm" svg:x="2.467cm" svg:y="0.437cm"><text:p text:style-name="P70"><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95" draw:text-style-name="P71" svg:width="1.004cm" svg:height="1.011cm" svg:x="2.469cm" svg:y="1.943cm"><text:p text:style-name="P70"><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96" draw:text-style-name="P73" svg:width="2.509cm" svg:height="1.015cm" svg:x="5.471cm" svg:y="1.187cm"><text:p text:style-name="P72"><text:span text:style-name="T70">term</text:span></text:p><draw:enhanced-geometry svg:viewBox="0 0 21600 21600" draw:type="rectangle" draw:enhanced-path="M 0 0 L 21600 0 21600 21600 0 21600 0 0 Z N"/></draw:custom-shape><draw:custom-shape draw:style-name="gr195" draw:text-style-name="P71" svg:width="1.004cm" svg:height="1.011cm" svg:x="8.974cm" svg:y="2.194cm"><text:p text:style-name="P70"><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97" draw:text-style-name="P71" svg:width="1.008cm" svg:height="1.011cm" svg:x="10.472cm" svg:y="2.194cm"><text:p text:style-name="P70"><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98" draw:text-style-name="P71" svg:width="2.006cm" svg:height="1.011cm" svg:x="11.973cm" svg:y="2.194cm"><text:p text:style-name="P70"><text:span text:style-name="T69">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9" draw:text-style-name="P74" svg:x1="1.469cm" svg:y1="1.688cm" svg:x2="5.469cm" svg:y2="1.688cm"><text:p/></draw:line><draw:line draw:style-name="gr200" draw:text-style-name="P74" svg:x1="1.965cm" svg:y1="0.938cm" svg:x2="2.465cm" svg:y2="0.938cm"><text:p/></draw:line><draw:line draw:style-name="gr201" draw:text-style-name="P74" svg:x1="1.965cm" svg:y1="2.443cm" svg:x2="2.465cm" svg:y2="2.443cm"><text:p/></draw:line><draw:line draw:style-name="gr6" draw:text-style-name="P74" svg:x1="1.965cm" svg:y1="0.938cm" svg:x2="1.965cm" svg:y2="2.448cm"><text:p/></draw:line><draw:line draw:style-name="gr6" draw:text-style-name="P74" svg:x1="3.466cm" svg:y1="0.938cm" svg:x2="3.966cm" svg:y2="0.938cm"><text:p/></draw:line><draw:line draw:style-name="gr6" draw:text-style-name="P74" svg:x1="3.466cm" svg:y1="2.443cm" svg:x2="3.966cm" svg:y2="2.443cm"><text:p/></draw:line><draw:line draw:style-name="gr202" draw:text-style-name="P74" svg:x1="3.967cm" svg:y1="0.938cm" svg:x2="3.967cm" svg:y2="1.692cm"><text:p/></draw:line><draw:line draw:style-name="gr203" draw:text-style-name="P74" svg:x1="3.967cm" svg:y1="2.442cm" svg:x2="3.967cm" svg:y2="1.688cm"><text:p/></draw:line><draw:line draw:style-name="gr204" draw:text-style-name="P74" svg:x1="7.971cm" svg:y1="1.688cm" svg:x2="15.476cm" svg:y2="1.688cm"><text:p/></draw:line><draw:line draw:style-name="gr205" draw:text-style-name="P74" svg:x1="9.474cm" svg:y1="1.688cm" svg:x2="9.474cm" svg:y2="2.192cm"><text:p/></draw:line><draw:line draw:style-name="gr206" draw:text-style-name="P74" svg:x1="10.974cm" svg:y1="1.688cm" svg:x2="10.974cm" svg:y2="2.192cm"><text:p/></draw:line><draw:line draw:style-name="gr207" draw:text-style-name="P74" svg:x1="12.976cm" svg:y1="1.688cm" svg:x2="12.976cm" svg:y2="2.192cm"><text:p/></draw:line><draw:line draw:style-name="gr208" draw:text-style-name="P74" svg:x1="10.974cm" svg:y1="3.197cm" svg:x2="10.974cm" svg:y2="3.701cm"><text:p/></draw:line><draw:line draw:style-name="gr209" draw:text-style-name="P74" svg:x1="9.474cm" svg:y1="3.197cm" svg:x2="9.474cm" svg:y2="3.701cm"><text:p/></draw:line><draw:line draw:style-name="gr6" draw:text-style-name="P74" svg:x1="12.976cm" svg:y1="3.197cm" svg:x2="12.976cm" svg:y2="3.701cm"><text:p/></draw:line><draw:line draw:style-name="gr6" draw:text-style-name="P74" svg:x1="4.721cm" svg:y1="3.703cm" svg:x2="12.976cm" svg:y2="3.703cm"><text:p/></draw:line><draw:line draw:style-name="gr210" draw:text-style-name="P74" svg:x1="4.721cm" svg:y1="3.7cm" svg:x2="4.721cm" svg:y2="1.688cm"><text:p/></draw:line></draw:g></text:p>
      <text:p text:style-name="Text_20_body">s. TERM</text:p>
      <text:h text:style-name="Heading_20_2" text:outline-level="2"><text:bookmark-start text:name="__RefHeading___Toc57_1849558913"/>Ausdruck <text:span text:style-name="T45">(expression)</text:span><text:bookmark-end text:name="__RefHeading___Toc57_1849558913"/></text:h>
      <text:p text:style-name="Text_20_body"><draw:g text:anchor-type="paragraph" draw:z-index="11" draw:name="Gruppenobjekt 14" draw:style-name="gr1"><draw:custom-shape draw:style-name="gr4" draw:text-style-name="P71" svg:width="1.001cm" svg:height="1.001cm" svg:x="1.373cm" svg:y="2.202cm"><text:p text:style-name="P70"><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3" draw:text-style-name="P73" svg:width="3.5cm" svg:height="0.999cm" svg:x="1.373cm" svg:y="0.452cm"><text:p text:style-name="P72"><text:span text:style-name="T70">simple expression</text:span></text:p><draw:enhanced-geometry svg:viewBox="0 0 21600 21600" draw:type="rectangle" draw:enhanced-path="M 0 0 L 21600 0 21600 21600 0 21600 0 0 Z N"/></draw:custom-shape><draw:custom-shape draw:style-name="gr9" draw:text-style-name="P71" svg:width="1.505cm" svg:height="1.001cm" svg:x="2.621cm" svg:y="2.202cm"><text:p text:style-name="P70"><text:span text:style-name="T69">&lt;&g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71" svg:width="1.001cm" svg:height="1.001cm" svg:x="4.373cm" svg:y="2.202cm"><text:p text:style-name="P70"><text:span text:style-name="T69">&l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4" draw:text-style-name="P71" svg:width="1.004cm" svg:height="1.001cm" svg:x="5.622cm" svg:y="2.202cm"><text:p text:style-name="P70"><text:span text:style-name="T69">&g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5" draw:text-style-name="P71" svg:width="1.504cm" svg:height="1.001cm" svg:x="6.872cm" svg:y="2.202cm"><text:p text:style-name="P70"><text:span text:style-name="T69">&l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 draw:text-style-name="P71" svg:width="1.502cm" svg:height="1.001cm" svg:x="8.624cm" svg:y="2.202cm"><text:p text:style-name="P70"><text:span text:style-name="T69">&g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5" draw:text-style-name="P71" svg:width="1.504cm" svg:height="1.001cm" svg:x="10.374cm" svg:y="2.202cm"><text:p text:style-name="P70"><text:span text:style-name="T69">I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6" draw:text-style-name="P73" svg:width="3.502cm" svg:height="1.001cm" svg:x="11.875cm" svg:y="3.202cm"><text:p text:style-name="P72"><text:span text:style-name="T70">simple expression</text:span></text:p><draw:enhanced-geometry svg:viewBox="0 0 21600 21600" draw:type="rectangle" draw:enhanced-path="M 0 0 L 21600 0 21600 21600 0 21600 0 0 Z N"/></draw:custom-shape><draw:line draw:style-name="gr177" draw:text-style-name="P74" svg:x1="0.622cm" svg:y1="0.951cm" svg:x2="1.372cm" svg:y2="0.951cm"><text:p/></draw:line><draw:line draw:style-name="gr178" draw:text-style-name="P74" svg:x1="4.872cm" svg:y1="0.951cm" svg:x2="16.375cm" svg:y2="0.951cm"><text:p/></draw:line><draw:line draw:style-name="gr6" draw:text-style-name="P74" svg:x1="5.373cm" svg:y1="0.951cm" svg:x2="5.373cm" svg:y2="1.701cm"><text:p/></draw:line><draw:line draw:style-name="gr6" draw:text-style-name="P74" svg:x1="1.875cm" svg:y1="1.704cm" svg:x2="11.127cm" svg:y2="1.704cm"><text:p/></draw:line><draw:line draw:style-name="gr179" draw:text-style-name="P74" svg:x1="1.875cm" svg:y1="1.704cm" svg:x2="1.875cm" svg:y2="2.204cm"><text:p/></draw:line><draw:line draw:style-name="gr180" draw:text-style-name="P74" svg:x1="3.372cm" svg:y1="1.704cm" svg:x2="3.372cm" svg:y2="2.204cm"><text:p/></draw:line><draw:line draw:style-name="gr181" draw:text-style-name="P74" svg:x1="4.872cm" svg:y1="1.704cm" svg:x2="4.872cm" svg:y2="2.204cm"><text:p/></draw:line><draw:line draw:style-name="gr182" draw:text-style-name="P74" svg:x1="6.126cm" svg:y1="1.704cm" svg:x2="6.126cm" svg:y2="2.204cm"><text:p/></draw:line><draw:line draw:style-name="gr183" draw:text-style-name="P74" svg:x1="7.623cm" svg:y1="1.704cm" svg:x2="7.623cm" svg:y2="2.204cm"><text:p/></draw:line><draw:line draw:style-name="gr184" draw:text-style-name="P74" svg:x1="9.375cm" svg:y1="1.704cm" svg:x2="9.375cm" svg:y2="2.204cm"><text:p/></draw:line><draw:line draw:style-name="gr185" draw:text-style-name="P74" svg:x1="11.124cm" svg:y1="1.704cm" svg:x2="11.124cm" svg:y2="2.204cm"><text:p/></draw:line><draw:line draw:style-name="gr6" draw:text-style-name="P74" svg:x1="1.875cm" svg:y1="3.2cm" svg:x2="1.875cm" svg:y2="3.7cm"><text:p/></draw:line><draw:line draw:style-name="gr186" draw:text-style-name="P74" svg:x1="3.372cm" svg:y1="3.2cm" svg:x2="3.372cm" svg:y2="3.7cm"><text:p/></draw:line><draw:line draw:style-name="gr187" draw:text-style-name="P74" svg:x1="4.872cm" svg:y1="3.2cm" svg:x2="4.872cm" svg:y2="3.7cm"><text:p/></draw:line><draw:line draw:style-name="gr188" draw:text-style-name="P74" svg:x1="6.126cm" svg:y1="3.2cm" svg:x2="6.126cm" svg:y2="3.7cm"><text:p/></draw:line><draw:line draw:style-name="gr189" draw:text-style-name="P74" svg:x1="7.623cm" svg:y1="3.2cm" svg:x2="7.623cm" svg:y2="3.7cm"><text:p/></draw:line><draw:line draw:style-name="gr190" draw:text-style-name="P74" svg:x1="9.375cm" svg:y1="3.2cm" svg:x2="9.375cm" svg:y2="3.7cm"><text:p/></draw:line><draw:line draw:style-name="gr191" draw:text-style-name="P74" svg:x1="11.124cm" svg:y1="3.2cm" svg:x2="11.124cm" svg:y2="3.7cm"><text:p/></draw:line><draw:line draw:style-name="gr192" draw:text-style-name="P74" svg:x1="1.875cm" svg:y1="3.7cm" svg:x2="11.877cm" svg:y2="3.7cm"><text:p/></draw:line><draw:line draw:style-name="gr6" draw:text-style-name="P74" svg:x1="15.375cm" svg:y1="3.7cm" svg:x2="15.625cm" svg:y2="3.7cm"><text:p/></draw:line><draw:line draw:style-name="gr193" draw:text-style-name="P74" svg:x1="15.625cm" svg:y1="3.701cm" svg:x2="15.625cm" svg:y2="0.951cm"><text:p/></draw:line></draw:g></text:p>
      <text:p text:style-name="Text_20_body">Bei der Benutzung von <text:span text:style-name="Source_20_Text">IN</text:span> umfasst das <text:span text:style-name="Source_20_Text">SET</text:span> immer den vollen Bereich des entsprechenden Grundtyps, nur bei <text:span text:style-name="Source_20_Text">INTEGER</text:span>-Argumenten umfaßt der Grundtyp immer den Bereich [0..255].</text:p>
      <text:p text:style-name="Text_20_body">Die obige Syntax wird beim Vergleich von Strings gleicher Länge, Zeiger und allen skalaren Typen verwendet. <text:span text:style-name="Source_20_Text">SET</text:span>s können durch <text:span text:style-name="Source_20_Text">&gt;=</text:span>, <text:span text:style-name="Source_20_Text">&lt;=</text:span>, <text:span text:style-name="Source_20_Text">&lt;&gt;</text:span> oder <text:span text:style-name="Source_20_Text">=</text:span> verglichen werden, Zeiger nur durch <text:span text:style-name="Source_20_Text">=</text:span> oder <text:span text:style-name="Source_20_Text">&lt;&gt;</text:span>.</text:p>
      <text:p text:style-name="Text"><text:soft-page-break/>Achtung:</text:p>
      <text:p text:style-name="Text_20_body">Vergleiche zwischen <text:span text:style-name="Source_20_Text">REAL</text:span>- und <text:span text:style-name="Source_20_Text">INTEGER</text:span>-Ausdrücken müssen so notiert werden, dass der <text:span text:style-name="Source_20_Text">REAL</text:span>-Ausdruck auf der linken Seite des Vergleiches steht.</text:p>
      <text:h text:style-name="Heading_20_2" text:outline-level="2"><text:bookmark-start text:name="__RefHeading___Toc59_1849558913"/>Parameterliste <text:span text:style-name="T46">(parameter list)</text:span><text:bookmark-end text:name="__RefHeading___Toc59_1849558913"/></text:h>
      <text:p text:style-name="Text_20_body"><draw:g text:anchor-type="paragraph" draw:z-index="12" draw:name="Gruppenobjekt 13" draw:style-name="gr1"><draw:custom-shape draw:style-name="gr2" draw:text-style-name="P71" svg:width="2.001cm" svg:height="1.001cm" svg:x="2.998cm" svg:y="1.711cm"><text:p text:style-name="P70"><text:span text:style-name="T69">VA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59" draw:text-style-name="P73" svg:width="2.5cm" svg:height="1.001cm" svg:x="5.999cm" svg:y="0.461cm"><text:p text:style-name="P72"><text:span text:style-name="T70">identifier</text:span></text:p><draw:enhanced-geometry svg:viewBox="0 0 21600 21600" draw:type="rectangle" draw:enhanced-path="M 0 0 L 21600 0 21600 21600 0 21600 0 0 Z N"/></draw:custom-shape><draw:custom-shape draw:style-name="gr145" draw:text-style-name="P73" svg:width="2.751cm" svg:height="1.001cm" svg:x="10.749cm" svg:y="0.461cm"><text:p text:style-name="P72"><text:span text:style-name="T70">type identifier</text:span></text:p><draw:enhanced-geometry svg:viewBox="0 0 21600 21600" draw:type="rectangle" draw:enhanced-path="M 0 0 L 21600 0 21600 21600 0 21600 0 0 Z N"/></draw:custom-shape><draw:custom-shape draw:style-name="gr4" draw:text-style-name="P71" svg:width="1.001cm" svg:height="1.001cm" svg:x="0.998cm" svg:y="0.461cm"><text:p text:style-name="P70"><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71" svg:width="1.001cm" svg:height="1.001cm" svg:x="9.25cm" svg:y="0.461cm"><text:p text:style-name="P70"><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71" svg:width="1.001cm" svg:height="1.001cm" svg:x="14.248cm" svg:y="0.461cm"><text:p text:style-name="P70"><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71" svg:width="1.001cm" svg:height="1.001cm" svg:x="6.748cm" svg:y="1.711cm"><text:p text:style-name="P70"><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71" svg:width="1.001cm" svg:height="1.001cm" svg:x="9.25cm" svg:y="2.461cm"><text:p text:style-name="P70"><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0" draw:text-style-name="P74" svg:x1="-0.001cm" svg:y1="0.963cm" svg:x2="0.999cm" svg:y2="0.963cm"><text:p/></draw:line><draw:line draw:style-name="gr161" draw:text-style-name="P74" svg:x1="1.999cm" svg:y1="0.963cm" svg:x2="5.999cm" svg:y2="0.963cm"><text:p/></draw:line><draw:line draw:style-name="gr162" draw:text-style-name="P74" svg:x1="2.249cm" svg:y1="2.963cm" svg:x2="2.249cm" svg:y2="0.963cm"><text:p/></draw:line><draw:line draw:style-name="gr163" draw:text-style-name="P74" svg:x1="2.499cm" svg:y1="2.211cm" svg:x2="2.999cm" svg:y2="2.211cm"><text:p/></draw:line><draw:line draw:style-name="gr6" draw:text-style-name="P74" svg:x1="2.499cm" svg:y1="0.963cm" svg:x2="2.499cm" svg:y2="2.213cm"><text:p/></draw:line><draw:line draw:style-name="gr6" draw:text-style-name="P74" svg:x1="4.999cm" svg:y1="2.211cm" svg:x2="5.249cm" svg:y2="2.211cm"><text:p/></draw:line><draw:line draw:style-name="gr164" draw:text-style-name="P74" svg:x1="5.249cm" svg:y1="2.213cm" svg:x2="5.249cm" svg:y2="0.963cm"><text:p/></draw:line><draw:line draw:style-name="gr6" draw:text-style-name="P74" svg:x1="6.749cm" svg:y1="2.211cm" svg:x2="5.499cm" svg:y2="2.211cm"><text:p/></draw:line><draw:line draw:style-name="gr165" draw:text-style-name="P74" svg:x1="5.499cm" svg:y1="2.213cm" svg:x2="5.499cm" svg:y2="0.963cm"><text:p/></draw:line><draw:line draw:style-name="gr166" draw:text-style-name="P74" svg:x1="8.499cm" svg:y1="0.963cm" svg:x2="9.249cm" svg:y2="0.963cm"><text:p/></draw:line><draw:line draw:style-name="gr6" draw:text-style-name="P74" svg:x1="8.749cm" svg:y1="0.963cm" svg:x2="8.749cm" svg:y2="2.213cm"><text:p/></draw:line><draw:line draw:style-name="gr167" draw:text-style-name="P74" svg:x1="8.749cm" svg:y1="2.211cm" svg:x2="7.749cm" svg:y2="2.211cm"><text:p/></draw:line><draw:line draw:style-name="gr168" draw:text-style-name="P74" svg:x1="10.249cm" svg:y1="0.963cm" svg:x2="10.749cm" svg:y2="0.963cm"><text:p/></draw:line><draw:line draw:style-name="gr169" draw:text-style-name="P74" svg:x1="13.499cm" svg:y1="0.963cm" svg:x2="14.249cm" svg:y2="0.963cm"><text:p/></draw:line><draw:line draw:style-name="gr6" draw:text-style-name="P74" svg:x1="2.249cm" svg:y1="2.961cm" svg:x2="9.249cm" svg:y2="2.961cm"><text:p/></draw:line><draw:line draw:style-name="gr6" draw:text-style-name="P74" svg:x1="13.748cm" svg:y1="0.963cm" svg:x2="13.748cm" svg:y2="2.963cm"><text:p/></draw:line><draw:line draw:style-name="gr170" draw:text-style-name="P74" svg:x1="13.749cm" svg:y1="2.961cm" svg:x2="10.249cm" svg:y2="2.961cm"><text:p/></draw:line><draw:line draw:style-name="gr6" draw:text-style-name="P74" svg:x1="0.499cm" svg:y1="0.961cm" svg:x2="0.499cm" svg:y2="0.211cm"><text:p/></draw:line><draw:line draw:style-name="gr6" draw:text-style-name="P74" svg:x1="0.499cm" svg:y1="0.211cm" svg:x2="15.749cm" svg:y2="0.211cm"><text:p/></draw:line><draw:line draw:style-name="gr171" draw:text-style-name="P74" svg:x1="15.749cm" svg:y1="0.211cm" svg:x2="15.749cm" svg:y2="0.961cm"><text:p/></draw:line><draw:line draw:style-name="gr172" draw:text-style-name="P74" svg:x1="15.249cm" svg:y1="0.963cm" svg:x2="16.249cm" svg:y2="0.963cm"><text:p/></draw:line></draw:g></text:p>
      <text:p text:style-name="Text_20_body">Auf den Doppelpunkt muss ein Typname folgen, sonst tritt '<text:span text:style-name="Source_20_Text">FEHLER 44</text:span>' auf.</text:p>
      <text:p text:style-name="Text_20_body">Sowohl variable Parameter als auch Festwertparameter sind ohne Einschränkungen zugelassen.</text:p>
      <text:p text:style-name="Text_20_body">Nicht zugelassen sind Funktionen und Prozeduren.</text:p>
      <text:h text:style-name="Heading_20_2" text:outline-level="2"><text:bookmark-start text:name="__RefHeading___Toc61_1849558913"/>Anweisung <text:span text:style-name="T47">(statement)</text:span><text:bookmark-end text:name="__RefHeading___Toc61_1849558913"/></text:h>
      <text:p text:style-name="P41">siehe Abbildung</text:p>
      <text:h text:style-name="Heading_20_3" text:outline-level="3"><text:bookmark-start text:name="__RefHeading___Toc6609_1452676818"/>Zuweisungen<text:bookmark-end text:name="__RefHeading___Toc6609_1452676818"/></text:h>
      <text:p text:style-name="Text_20_body">siehe '<text:span text:style-name="Source_20_Text">TYPE</text:span>'</text:p>
      <text:h text:style-name="Heading_20_3" text:outline-level="3"><text:bookmark-start text:name="__RefHeading___Toc6611_1452676818"/><text:span text:style-name="Source_20_Text">CASE</text:span>-Anwe<text:span text:style-name="T20">i</text:span>sung<text:bookmark-end text:name="__RefHeading___Toc6611_1452676818"/></text:h>
      <text:p text:style-name="Text_20_body">Eine leere <text:span text:style-name="Source_20_Text">CASE</text:span>-Liste ist nicht gestattet, d. h. „<text:span text:style-name="Source_20_Text">CASE OF END</text:span>“ ruft '<text:span text:style-name="Source_20_Text">FEHLER 13</text:span>' hervor.</text:p>
      <text:p text:style-name="Text_20_body"><text:span text:style-name="Source_20_Text">ELSE</text:span> (welches eine Alternative zu <text:span text:style-name="Source_20_Text">END</text:span> darstellt) wird ausgeführt, wenn die geforderte <text:span text:style-name="Source_20_Text">CASE</text:span>-Marke nicht existiert. Wenn mit <text:span text:style-name="Source_20_Text">END</text:span> abgeschlossen und die geforderte <text:span text:style-name="Source_20_Text">CASE</text:span>-Marke nicht gefunden wurde, setzt das Programm mit der auf <text:span text:style-name="Source_20_Text">END</text:span> folgenden Anweisung fort.</text:p>
      <text:h text:style-name="Heading_20_2" text:outline-level="2"><text:bookmark-start text:name="__RefHeading___Toc63_1849558913"/><text:span text:style-name="Source_20_Text">FOR</text:span>-Anweisung<text:bookmark-end text:name="__RefHeading___Toc63_1849558913"/></text:h>
      <text:p text:style-name="Text_20_body">Die Steuervariable einer <text:span text:style-name="Source_20_Text">FOR</text:span>-Anweisung darf nur eine unstrukturierte Variable, kein Parameter sein.</text:p>
      <text:p text:style-name="P4"><draw:g text:anchor-type="paragraph" draw:z-index="18" draw:name="Gruppenobjekt 15" draw:style-name="gr1"><draw:custom-shape draw:style-name="gr2" draw:text-style-name="P71" svg:width="2.001cm" svg:height="1.001cm" svg:x="11.501cm" svg:y="6.212cm"><text:p text:style-name="P70"><text:span text:style-name="T69">E</text:span><text:span text:style-name="T69">N</text:span><text:span text:style-name="T69">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3" svg:width="3.25cm" svg:height="1.001cm" svg:x="0.752cm" svg:y="0.462cm"><text:p text:style-name="P72"><text:span text:style-name="T70">u</text:span><text:span text:style-name="T70">n</text:span><text:span text:style-name="T70">s</text:span><text:span text:style-name="T70">i</text:span><text:span text:style-name="T70">g</text:span><text:span text:style-name="T70">n</text:span><text:span text:style-name="T70">e</text:span><text:span text:style-name="T70">d </text:span><text:span text:style-name="T70">i</text:span><text:span text:style-name="T70">n</text:span><text:span text:style-name="T70">t</text:span><text:span text:style-name="T70">e</text:span><text:span text:style-name="T70">g</text:span><text:span text:style-name="T70">e</text:span><text:span text:style-name="T70">r</text:span></text:p><draw:enhanced-geometry svg:viewBox="0 0 21600 21600" draw:type="rectangle" draw:enhanced-path="M 0 0 L 21600 0 21600 21600 0 21600 0 0 Z N"/></draw:custom-shape><draw:custom-shape draw:style-name="gr4" draw:text-style-name="P71" svg:width="1.001cm" svg:height="1.001cm" svg:x="5.001cm" svg:y="0.462cm"><text:p text:style-name="P70"><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 draw:text-style-name="P74" svg:x1="0.001cm" svg:y1="0.963cm" svg:x2="0.751cm" svg:y2="0.963cm"><text:p/></draw:line><draw:line draw:style-name="gr6" draw:text-style-name="P74" svg:x1="0.252cm" svg:y1="0.963cm" svg:x2="0.252cm" svg:y2="22.713cm"><text:p/></draw:line><draw:line draw:style-name="gr7" draw:text-style-name="P74" svg:x1="4.001cm" svg:y1="0.963cm" svg:x2="5.001cm" svg:y2="0.963cm"><text:p/></draw:line><draw:line draw:style-name="gr6" draw:text-style-name="P74" svg:x1="6.001cm" svg:y1="0.963cm" svg:x2="6.501cm" svg:y2="0.963cm"><text:p/></draw:line><draw:line draw:style-name="gr6" draw:text-style-name="P74" svg:x1="6.501cm" svg:y1="0.963cm" svg:x2="6.501cm" svg:y2="1.713cm"><text:p/></draw:line><draw:line draw:style-name="gr8" draw:text-style-name="P74" svg:x1="6.502cm" svg:y1="1.711cm" svg:x2="0.252cm" svg:y2="1.711cm"><text:p/></draw:line><draw:custom-shape draw:style-name="gr3" draw:text-style-name="P73" svg:width="3.25cm" svg:height="1.001cm" svg:x="0.752cm" svg:y="1.963cm"><text:p text:style-name="P72"><text:span text:style-name="T70">variable </text:span><text:span text:style-name="T70">identifier</text:span></text:p><draw:enhanced-geometry svg:viewBox="0 0 21600 21600" draw:type="rectangle" draw:enhanced-path="M 0 0 L 21600 0 21600 21600 0 21600 0 0 Z N"/></draw:custom-shape><draw:custom-shape draw:style-name="gr9" draw:text-style-name="P71" svg:width="1.502cm" svg:height="1.001cm" svg:x="5.001cm" svg:y="1.963cm"><text:p text:style-name="P70"><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3" svg:width="3.25cm" svg:height="1.001cm" svg:x="7.502cm" svg:y="1.963cm"><text:p text:style-name="P72"><text:span text:style-name="T70">e</text:span><text:span text:style-name="T70">x</text:span><text:span text:style-name="T70">p</text:span><text:span text:style-name="T70">r</text:span><text:span text:style-name="T70">e</text:span><text:span text:style-name="T70">s</text:span><text:span text:style-name="T70">s</text:span><text:span text:style-name="T70">i</text:span><text:span text:style-name="T70">o</text:span><text:span text:style-name="T70">n</text:span></text:p><draw:enhanced-geometry svg:viewBox="0 0 21600 21600" draw:type="rectangle" draw:enhanced-path="M 0 0 L 21600 0 21600 21600 0 21600 0 0 Z N"/></draw:custom-shape><draw:custom-shape draw:style-name="gr10" draw:text-style-name="P73" svg:width="3.252cm" svg:height="1.001cm" svg:x="1cm" svg:y="3.462cm"><text:p text:style-name="P72"><text:span text:style-name="T70">f</text:span><text:span text:style-name="T70">u</text:span><text:span text:style-name="T70">n</text:span><text:span text:style-name="T70">c</text:span><text:span text:style-name="T70">ti</text:span><text:span text:style-name="T70">o</text:span><text:span text:style-name="T70">n </text:span><text:span text:style-name="T70">i</text:span><text:span text:style-name="T70">d</text:span><text:span text:style-name="T70">e</text:span><text:span text:style-name="T70">n</text:span><text:span text:style-name="T70">ti</text:span><text:span text:style-name="T70">fi</text:span><text:span text:style-name="T70">e</text:span><text:span text:style-name="T70">r</text:span></text:p><draw:enhanced-geometry svg:viewBox="0 0 21600 21600" draw:type="rectangle" draw:enhanced-path="M 0 0 L 21600 0 21600 21600 0 21600 0 0 Z N"/></draw:custom-shape><draw:line draw:style-name="gr11" draw:text-style-name="P74" svg:x1="4.001cm" svg:y1="2.463cm" svg:x2="5.001cm" svg:y2="2.463cm"><text:p/></draw:line><draw:line draw:style-name="gr12" draw:text-style-name="P74" svg:x1="6.501cm" svg:y1="2.463cm" svg:x2="7.501cm" svg:y2="2.463cm"><text:p/></draw:line><draw:line draw:style-name="gr13" draw:text-style-name="P74" svg:x1="10.751cm" svg:y1="2.463cm" svg:x2="17.001cm" svg:y2="2.463cm"><text:p/></draw:line><draw:line draw:style-name="gr14" draw:text-style-name="P74" svg:x1="16.501cm" svg:y1="22.713cm" svg:x2="16.501cm" svg:y2="2.463cm"><text:p/></draw:line><draw:line draw:style-name="gr6" draw:text-style-name="P74" svg:x1="6.752cm" svg:y1="2.463cm" svg:x2="6.752cm" svg:y2="3.213cm"><text:p/></draw:line><draw:line draw:style-name="gr15" draw:text-style-name="P74" svg:x1="0.252cm" svg:y1="2.463cm" svg:x2="0.752cm" svg:y2="2.463cm"><text:p/></draw:line><draw:custom-shape draw:style-name="gr16" draw:text-style-name="P73" svg:width="3.5cm" svg:height="1.001cm" svg:x="0.752cm" svg:y="4.713cm"><text:p text:style-name="P72"><text:span text:style-name="T70">prodecure </text:span><text:span text:style-name="T70">identifier</text:span></text:p><draw:enhanced-geometry svg:viewBox="0 0 21600 21600" draw:type="rectangle" draw:enhanced-path="M 0 0 L 21600 0 21600 21600 0 21600 0 0 Z N"/></draw:custom-shape><draw:custom-shape draw:style-name="gr4" draw:text-style-name="P71" svg:width="1.001cm" svg:height="1.001cm" svg:x="8.5cm" svg:y="3.462cm"><text:p text:style-name="P70"><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3" svg:width="3.25cm" svg:height="1.001cm" svg:x="7.502cm" svg:y="4.713cm"><text:p text:style-name="P72"><text:span text:style-name="T70">e</text:span><text:span text:style-name="T70">x</text:span><text:span text:style-name="T70">p</text:span><text:span text:style-name="T70">r</text:span><text:span text:style-name="T70">e</text:span><text:span text:style-name="T70">s</text:span><text:span text:style-name="T70">s</text:span><text:span text:style-name="T70">i</text:span><text:span text:style-name="T70">o</text:span><text:span text:style-name="T70">n</text:span></text:p><draw:enhanced-geometry svg:viewBox="0 0 21600 21600" draw:type="rectangle" draw:enhanced-path="M 0 0 L 21600 0 21600 21600 0 21600 0 0 Z N"/></draw:custom-shape><draw:custom-shape draw:style-name="gr4" draw:text-style-name="P71" svg:width="1.001cm" svg:height="1.001cm" svg:x="11.501cm" svg:y="4.713cm"><text:p text:style-name="P70"><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71" svg:width="1.001cm" svg:height="1.001cm" svg:x="5.751cm" svg:y="4.713cm"><text:p text:style-name="P70"><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7" draw:text-style-name="P74" svg:x1="0.252cm" svg:y1="5.213cm" svg:x2="0.752cm" svg:y2="5.213cm"><text:p/></draw:line><draw:line draw:style-name="gr18" draw:text-style-name="P74" svg:x1="4.251cm" svg:y1="5.213cm" svg:x2="5.751cm" svg:y2="5.213cm"><text:p/></draw:line><draw:line draw:style-name="gr19" draw:text-style-name="P74" svg:x1="6.752cm" svg:y1="5.213cm" svg:x2="7.502cm" svg:y2="5.213cm"><text:p/></draw:line><draw:line draw:style-name="gr20" draw:text-style-name="P74" svg:x1="10.751cm" svg:y1="5.213cm" svg:x2="11.501cm" svg:y2="5.213cm"><text:p/></draw:line><draw:line draw:style-name="gr21" draw:text-style-name="P74" svg:x1="12.501cm" svg:y1="5.213cm" svg:x2="16.501cm" svg:y2="5.213cm"><text:p/></draw:line><draw:line draw:style-name="gr6" draw:text-style-name="P74" svg:x1="11.003cm" svg:y1="5.213cm" svg:x2="11.003cm" svg:y2="3.963cm"><text:p/></draw:line><draw:line draw:style-name="gr22" draw:text-style-name="P74" svg:x1="11.002cm" svg:y1="3.963cm" svg:x2="9.502cm" svg:y2="3.963cm"><text:p/></draw:line><draw:line draw:style-name="gr6" draw:text-style-name="P74" svg:x1="8.501cm" svg:y1="3.963cm" svg:x2="7.001cm" svg:y2="3.963cm"><text:p/></draw:line><draw:line draw:style-name="gr23" draw:text-style-name="P74" svg:x1="7.001cm" svg:y1="3.963cm" svg:x2="7.001cm" svg:y2="5.213cm"><text:p/></draw:line><draw:line draw:style-name="gr6" draw:text-style-name="P74" svg:x1="5.251cm" svg:y1="5.213cm" svg:x2="5.251cm" svg:y2="5.963cm"><text:p/></draw:line><draw:line draw:style-name="gr24" draw:text-style-name="P74" svg:x1="5.251cm" svg:y1="5.962cm" svg:x2="16.501cm" svg:y2="5.962cm"><text:p/></draw:line><draw:line draw:style-name="gr6" draw:text-style-name="P74" svg:x1="6.751cm" svg:y1="3.212cm" svg:x2="0.501cm" svg:y2="3.212cm"><text:p/></draw:line><draw:line draw:style-name="gr6" draw:text-style-name="P74" svg:x1="0.501cm" svg:y1="3.212cm" svg:x2="0.501cm" svg:y2="3.962cm"><text:p/></draw:line><draw:line draw:style-name="gr25" draw:text-style-name="P74" svg:x1="0.501cm" svg:y1="3.963cm" svg:x2="1.001cm" svg:y2="3.963cm"><text:p/></draw:line><draw:line draw:style-name="gr6" draw:text-style-name="P74" svg:x1="4.251cm" svg:y1="3.963cm" svg:x2="4.751cm" svg:y2="3.963cm"><text:p/></draw:line><draw:line draw:style-name="gr26" draw:text-style-name="P74" svg:x1="4.751cm" svg:y1="3.963cm" svg:x2="4.751cm" svg:y2="5.213cm"><text:p/></draw:line><draw:custom-shape draw:style-name="gr27" draw:text-style-name="P71" svg:width="2.751cm" svg:height="1.001cm" svg:x="1.251cm" svg:y="6.212cm"><text:p text:style-name="P70"><text:span text:style-name="T69">BEGI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0" draw:text-style-name="P73" svg:width="3.252cm" svg:height="1.001cm" svg:x="6.001cm" svg:y="6.212cm"><text:p text:style-name="P72"><text:span text:style-name="T70">s</text:span><text:span text:style-name="T70">t</text:span><text:span text:style-name="T70">a</text:span><text:span text:style-name="T70">t</text:span><text:span text:style-name="T70">e</text:span><text:span text:style-name="T70">m</text:span><text:span text:style-name="T70">e</text:span><text:span text:style-name="T70">n</text:span><text:span text:style-name="T70">t</text:span></text:p><draw:enhanced-geometry svg:viewBox="0 0 21600 21600" draw:type="rectangle" draw:enhanced-path="M 0 0 L 21600 0 21600 21600 0 21600 0 0 Z N"/></draw:custom-shape><draw:line draw:style-name="gr28" draw:text-style-name="P74" svg:x1="0.252cm" svg:y1="6.713cm" svg:x2="1.252cm" svg:y2="6.713cm"><text:p/></draw:line><draw:line draw:style-name="gr29" draw:text-style-name="P74" svg:x1="4.001cm" svg:y1="6.713cm" svg:x2="6.001cm" svg:y2="6.713cm"><text:p/></draw:line><draw:line draw:style-name="gr30" draw:text-style-name="P74" svg:x1="9.251cm" svg:y1="6.713cm" svg:x2="11.501cm" svg:y2="6.713cm"><text:p/></draw:line><draw:line draw:style-name="gr31" draw:text-style-name="P74" svg:x1="13.501cm" svg:y1="6.713cm" svg:x2="16.501cm" svg:y2="6.713cm"><text:p/></draw:line><draw:custom-shape draw:style-name="gr4" draw:text-style-name="P71" svg:width="1.001cm" svg:height="1.001cm" svg:x="7.252cm" svg:y="7.463cm"><text:p text:style-name="P70"><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74" svg:x1="9.751cm" svg:y1="6.713cm" svg:x2="9.751cm" svg:y2="7.963cm"><text:p/></draw:line><draw:line draw:style-name="gr32" draw:text-style-name="P74" svg:x1="9.753cm" svg:y1="7.963cm" svg:x2="8.253cm" svg:y2="7.963cm"><text:p/></draw:line><draw:line draw:style-name="gr6" draw:text-style-name="P74" svg:x1="7.251cm" svg:y1="7.963cm" svg:x2="5.251cm" svg:y2="7.963cm"><text:p/></draw:line><draw:line draw:style-name="gr33" draw:text-style-name="P74" svg:x1="5.251cm" svg:y1="7.963cm" svg:x2="5.251cm" svg:y2="6.713cm"><text:p/></draw:line><draw:custom-shape draw:style-name="gr34" draw:text-style-name="P71" svg:width="1.5cm" svg:height="1.001cm" svg:x="0.752cm" svg:y="8.463cm"><text:p text:style-name="P70"><text:span text:style-name="T69">IF</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73" svg:width="2.25cm" svg:height="1.001cm" svg:x="2.752cm" svg:y="8.463cm"><text:p text:style-name="P72"><text:span text:style-name="T70">expression</text:span></text:p><draw:enhanced-geometry svg:viewBox="0 0 21600 21600" draw:type="rectangle" draw:enhanced-path="M 0 0 L 21600 0 21600 21600 0 21600 0 0 Z N"/></draw:custom-shape><draw:line draw:style-name="gr36" draw:text-style-name="P74" svg:x1="0.252cm" svg:y1="8.963cm" svg:x2="0.752cm" svg:y2="8.963cm"><text:p/></draw:line><draw:custom-shape draw:style-name="gr37" draw:text-style-name="P71" svg:width="2.25cm" svg:height="1.001cm" svg:x="5.502cm" svg:y="8.463cm"><text:p text:style-name="P70"><text:span text:style-name="T69">THE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8" draw:text-style-name="P74" svg:x1="2.251cm" svg:y1="8.963cm" svg:x2="2.751cm" svg:y2="8.963cm"><text:p/></draw:line><draw:line draw:style-name="gr39" draw:text-style-name="P74" svg:x1="5.001cm" svg:y1="8.963cm" svg:x2="5.501cm" svg:y2="8.963cm"><text:p/></draw:line><draw:custom-shape draw:style-name="gr35" draw:text-style-name="P73" svg:width="2.25cm" svg:height="1.001cm" svg:x="8.252cm" svg:y="8.463cm"><text:p text:style-name="P72"><text:span text:style-name="T70">statement</text:span></text:p><draw:enhanced-geometry svg:viewBox="0 0 21600 21600" draw:type="rectangle" draw:enhanced-path="M 0 0 L 21600 0 21600 21600 0 21600 0 0 Z N"/></draw:custom-shape><draw:line draw:style-name="gr40" draw:text-style-name="P74" svg:x1="7.751cm" svg:y1="8.963cm" svg:x2="8.251cm" svg:y2="8.963cm"><text:p/></draw:line><draw:custom-shape draw:style-name="gr37" draw:text-style-name="P71" svg:width="2.25cm" svg:height="1.001cm" svg:x="11.002cm" svg:y="8.463cm"><text:p text:style-name="P70"><text:span text:style-name="T69">ELS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9" draw:text-style-name="P74" svg:x1="10.502cm" svg:y1="8.963cm" svg:x2="11.002cm" svg:y2="8.963cm"><text:p/></draw:line><draw:custom-shape draw:style-name="gr35" draw:text-style-name="P73" svg:width="2.25cm" svg:height="1.001cm" svg:x="13.752cm" svg:y="8.463cm"><text:p text:style-name="P72"><text:span text:style-name="T70">statement</text:span></text:p><draw:enhanced-geometry svg:viewBox="0 0 21600 21600" draw:type="rectangle" draw:enhanced-path="M 0 0 L 21600 0 21600 21600 0 21600 0 0 Z N"/></draw:custom-shape><draw:line draw:style-name="gr40" draw:text-style-name="P74" svg:x1="13.252cm" svg:y1="8.963cm" svg:x2="13.752cm" svg:y2="8.963cm"><text:p/></draw:line><draw:line draw:style-name="gr41" draw:text-style-name="P74" svg:x1="16.001cm" svg:y1="8.963cm" svg:x2="16.501cm" svg:y2="8.963cm"><text:p/></draw:line><draw:line draw:style-name="gr6" draw:text-style-name="P74" svg:x1="10.751cm" svg:y1="8.963cm" svg:x2="10.751cm" svg:y2="7.963cm"><text:p/></draw:line><draw:line draw:style-name="gr42" draw:text-style-name="P74" svg:x1="10.751cm" svg:y1="7.963cm" svg:x2="16.501cm" svg:y2="7.963cm"><text:p/></draw:line><draw:custom-shape draw:style-name="gr37" draw:text-style-name="P71" svg:width="2.25cm" svg:height="1.001cm" svg:x="0.752cm" svg:y="9.712cm"><text:p text:style-name="P70"><text:span text:style-name="T69">CAS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73" svg:width="2.25cm" svg:height="1.001cm" svg:x="3.502cm" svg:y="9.712cm"><text:p text:style-name="P72"><text:span text:style-name="T70">expression</text:span></text:p><draw:enhanced-geometry svg:viewBox="0 0 21600 21600" draw:type="rectangle" draw:enhanced-path="M 0 0 L 21600 0 21600 21600 0 21600 0 0 Z N"/></draw:custom-shape><draw:custom-shape draw:style-name="gr34" draw:text-style-name="P71" svg:width="1.5cm" svg:height="1.001cm" svg:x="6.251cm" svg:y="9.712cm"><text:p text:style-name="P70"><text:span text:style-name="T69">OF</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3" draw:text-style-name="P73" svg:width="2.001cm" svg:height="1.001cm" svg:x="8.751cm" svg:y="9.712cm"><text:p text:style-name="P72"><text:span text:style-name="T70">constant</text:span></text:p><draw:enhanced-geometry svg:viewBox="0 0 21600 21600" draw:type="rectangle" draw:enhanced-path="M 0 0 L 21600 0 21600 21600 0 21600 0 0 Z N"/></draw:custom-shape><draw:custom-shape draw:style-name="gr4" draw:text-style-name="P71" svg:width="1.001cm" svg:height="1.001cm" svg:x="11.501cm" svg:y="9.712cm"><text:p text:style-name="P70"><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73" svg:width="2.25cm" svg:height="1.001cm" svg:x="13.002cm" svg:y="9.712cm"><text:p text:style-name="P72"><text:span text:style-name="T70">statement</text:span></text:p><draw:enhanced-geometry svg:viewBox="0 0 21600 21600" draw:type="rectangle" draw:enhanced-path="M 0 0 L 21600 0 21600 21600 0 21600 0 0 Z N"/></draw:custom-shape><draw:custom-shape draw:style-name="gr4" draw:text-style-name="P71" svg:width="1.001cm" svg:height="1.001cm" svg:x="9.252cm" svg:y="10.962cm"><text:p text:style-name="P70"><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71" svg:width="1.001cm" svg:height="1.001cm" svg:x="11.501cm" svg:y="11.712cm"><text:p text:style-name="P70"><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4" draw:text-style-name="P74" svg:x1="0.252cm" svg:y1="10.212cm" svg:x2="0.752cm" svg:y2="10.212cm"><text:p/></draw:line><draw:line draw:style-name="gr45" draw:text-style-name="P74" svg:x1="3.002cm" svg:y1="10.212cm" svg:x2="3.502cm" svg:y2="10.212cm"><text:p/></draw:line><draw:line draw:style-name="gr46" draw:text-style-name="P74" svg:x1="5.752cm" svg:y1="10.212cm" svg:x2="6.252cm" svg:y2="10.212cm"><text:p/></draw:line><draw:line draw:style-name="gr47" draw:text-style-name="P74" svg:x1="7.751cm" svg:y1="10.212cm" svg:x2="8.751cm" svg:y2="10.212cm"><text:p/></draw:line><draw:line draw:style-name="gr48" draw:text-style-name="P74" svg:x1="10.751cm" svg:y1="10.212cm" svg:x2="11.501cm" svg:y2="10.212cm"><text:p/></draw:line><draw:line draw:style-name="gr49" draw:text-style-name="P74" svg:x1="12.501cm" svg:y1="10.212cm" svg:x2="13.001cm" svg:y2="10.212cm"><text:p/></draw:line><draw:line draw:style-name="gr6" draw:text-style-name="P74" svg:x1="11.003cm" svg:y1="10.212cm" svg:x2="11.003cm" svg:y2="11.462cm"><text:p/></draw:line><draw:line draw:style-name="gr50" draw:text-style-name="P74" svg:x1="11.001cm" svg:y1="11.46cm" svg:x2="10.251cm" svg:y2="11.46cm"><text:p/></draw:line><draw:line draw:style-name="gr6" draw:text-style-name="P74" svg:x1="9.253cm" svg:y1="11.46cm" svg:x2="8.253cm" svg:y2="11.46cm"><text:p/></draw:line><draw:line draw:style-name="gr51" draw:text-style-name="P74" svg:x1="8.253cm" svg:y1="11.462cm" svg:x2="8.253cm" svg:y2="10.212cm"><text:p/></draw:line><draw:line draw:style-name="gr6" draw:text-style-name="P74" svg:x1="11.501cm" svg:y1="12.213cm" svg:x2="8.001cm" svg:y2="12.213cm"><text:p/></draw:line><draw:line draw:style-name="gr52" draw:text-style-name="P74" svg:x1="8.001cm" svg:y1="12.212cm" svg:x2="8.001cm" svg:y2="10.212cm"><text:p/></draw:line><draw:line draw:style-name="gr6" draw:text-style-name="P74" svg:x1="15.251cm" svg:y1="10.212cm" svg:x2="15.751cm" svg:y2="10.212cm"><text:p/></draw:line><draw:line draw:style-name="gr6" draw:text-style-name="P74" svg:x1="15.751cm" svg:y1="10.212cm" svg:x2="15.751cm" svg:y2="12.962cm"><text:p/></draw:line><draw:line draw:style-name="gr53" draw:text-style-name="P74" svg:x1="15.751cm" svg:y1="12.213cm" svg:x2="12.501cm" svg:y2="12.213cm"><text:p/></draw:line><draw:line draw:style-name="gr6" draw:text-style-name="P74" svg:x1="15.751cm" svg:y1="12.961cm" svg:x2="7.501cm" svg:y2="12.961cm"><text:p/></draw:line><draw:line draw:style-name="gr6" draw:text-style-name="P74" svg:x1="7.501cm" svg:y1="12.959cm" svg:x2="7.501cm" svg:y2="10.959cm"><text:p/></draw:line><draw:custom-shape draw:style-name="gr54" draw:text-style-name="P71" svg:width="2.251cm" svg:height="1.001cm" svg:x="1.251cm" svg:y="12.461cm"><text:p text:style-name="P70"><text:span text:style-name="T69">ELS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73" svg:width="2.251cm" svg:height="1.001cm" svg:x="4.001cm" svg:y="12.461cm"><text:p text:style-name="P72"><text:span text:style-name="T70">statement</text:span></text:p><draw:enhanced-geometry svg:viewBox="0 0 21600 21600" draw:type="rectangle" draw:enhanced-path="M 0 0 L 21600 0 21600 21600 0 21600 0 0 Z N"/></draw:custom-shape><draw:line draw:style-name="gr45" draw:text-style-name="P74" svg:x1="3.503cm" svg:y1="12.961cm" svg:x2="4.003cm" svg:y2="12.961cm"><text:p/></draw:line><draw:custom-shape draw:style-name="gr2" draw:text-style-name="P71" svg:width="2.001cm" svg:height="1.001cm" svg:x="1.251cm" svg:y="11.213cm"><text:p text:style-name="P70"><text:span text:style-name="T69">EN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74" svg:x1="7.501cm" svg:y1="10.959cm" svg:x2="0.501cm" svg:y2="10.959cm"><text:p/></draw:line><draw:line draw:style-name="gr56" draw:text-style-name="P74" svg:x1="0.501cm" svg:y1="11.713cm" svg:x2="1.251cm" svg:y2="11.713cm"><text:p/></draw:line><draw:line draw:style-name="gr6" draw:text-style-name="P74" svg:x1="0.501cm" svg:y1="10.959cm" svg:x2="0.501cm" svg:y2="12.959cm"><text:p/></draw:line><draw:line draw:style-name="gr57" draw:text-style-name="P74" svg:x1="0.501cm" svg:y1="12.961cm" svg:x2="1.251cm" svg:y2="12.961cm"><text:p/></draw:line><draw:line draw:style-name="gr58" draw:text-style-name="P74" svg:x1="6.251cm" svg:y1="12.961cm" svg:x2="6.751cm" svg:y2="12.961cm"><text:p/></draw:line><draw:line draw:style-name="gr6" draw:text-style-name="P74" svg:x1="3.251cm" svg:y1="11.713cm" svg:x2="6.751cm" svg:y2="11.713cm"><text:p/></draw:line><draw:line draw:style-name="gr6" draw:text-style-name="P74" svg:x1="6.752cm" svg:y1="11.713cm" svg:x2="6.752cm" svg:y2="13.213cm"><text:p/></draw:line><draw:line draw:style-name="gr59" draw:text-style-name="P74" svg:x1="6.752cm" svg:y1="13.213cm" svg:x2="16.502cm" svg:y2="13.213cm"><text:p/></draw:line><draw:custom-shape draw:style-name="gr27" draw:text-style-name="P71" svg:width="2.751cm" svg:height="1.001cm" svg:x="0.752cm" svg:y="13.712cm"><text:p text:style-name="P70"><text:span text:style-name="T69">WHIL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73" svg:width="2.25cm" svg:height="1.001cm" svg:x="4.502cm" svg:y="13.712cm"><text:p text:style-name="P72"><text:span text:style-name="T70">expression</text:span></text:p><draw:enhanced-geometry svg:viewBox="0 0 21600 21600" draw:type="rectangle" draw:enhanced-path="M 0 0 L 21600 0 21600 21600 0 21600 0 0 Z N"/></draw:custom-shape><draw:custom-shape draw:style-name="gr34" draw:text-style-name="P71" svg:width="1.5cm" svg:height="1.001cm" svg:x="7.502cm" svg:y="13.712cm"><text:p text:style-name="P70"><text:span text:style-name="T69">D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73" svg:width="2.251cm" svg:height="1.001cm" svg:x="10.751cm" svg:y="13.712cm"><text:p text:style-name="P72"><text:span text:style-name="T70">statement</text:span></text:p><draw:enhanced-geometry svg:viewBox="0 0 21600 21600" draw:type="rectangle" draw:enhanced-path="M 0 0 L 21600 0 21600 21600 0 21600 0 0 Z N"/></draw:custom-shape><draw:line draw:style-name="gr44" draw:text-style-name="P74" svg:x1="0.252cm" svg:y1="14.213cm" svg:x2="0.752cm" svg:y2="14.213cm"><text:p/></draw:line><draw:custom-shape draw:style-name="gr60" draw:text-style-name="P71" svg:width="3.001cm" svg:height="1.001cm" svg:x="0.752cm" svg:y="14.963cm"><text:p text:style-name="P70"><text:span text:style-name="T69">REPEA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73" svg:width="2.251cm" svg:height="1.001cm" svg:x="10.751cm" svg:y="14.963cm"><text:p text:style-name="P72"><text:span text:style-name="T70">expression</text:span></text:p><draw:enhanced-geometry svg:viewBox="0 0 21600 21600" draw:type="rectangle" draw:enhanced-path="M 0 0 L 21600 0 21600 21600 0 21600 0 0 Z N"/></draw:custom-shape><draw:custom-shape draw:style-name="gr27" draw:text-style-name="P71" svg:width="2.751cm" svg:height="1.001cm" svg:x="7.502cm" svg:y="14.963cm"><text:p text:style-name="P70"><text:span text:style-name="T69">UNTIL</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73" svg:width="2.25cm" svg:height="1.001cm" svg:x="4.502cm" svg:y="14.963cm"><text:p text:style-name="P72"><text:span text:style-name="T70">statement</text:span></text:p><draw:enhanced-geometry svg:viewBox="0 0 21600 21600" draw:mirror-horizontal="false" draw:mirror-vertical="false" draw:type="rectangle" draw:enhanced-path="M 0 0 L 21600 0 21600 21600 0 21600 0 0 Z N"/></draw:custom-shape><draw:line draw:style-name="gr44" draw:text-style-name="P74" svg:x1="0.252cm" svg:y1="15.463cm" svg:x2="0.752cm" svg:y2="15.463cm"><text:p/></draw:line><draw:line draw:style-name="gr61" draw:text-style-name="P75" svg:x1="3.751cm" svg:y1="15.463cm" svg:x2="4.501cm" svg:y2="15.463cm"><text:p/></draw:line><draw:custom-shape draw:style-name="gr4" draw:text-style-name="P71" svg:width="1.001cm" svg:height="1.001cm" svg:x="5.001cm" svg:y="16.21cm"><text:p text:style-name="P70"><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75" svg:x1="5.001cm" svg:y1="16.711cm" svg:x2="4.001cm" svg:y2="16.711cm"><text:p/></draw:line><draw:line draw:style-name="gr62" draw:text-style-name="P75" svg:x1="4.001cm" svg:y1="16.713cm" svg:x2="4.001cm" svg:y2="15.463cm"><text:p/></draw:line><draw:line draw:style-name="gr6" draw:text-style-name="P75" svg:x1="7.001cm" svg:y1="15.463cm" svg:x2="7.001cm" svg:y2="16.713cm"><text:p/></draw:line><draw:line draw:style-name="gr63" draw:text-style-name="P75" svg:x1="7.001cm" svg:y1="16.711cm" svg:x2="6.001cm" svg:y2="16.711cm"><text:p/></draw:line><draw:line draw:style-name="gr64" draw:text-style-name="P75" svg:x1="6.752cm" svg:y1="15.463cm" svg:x2="7.502cm" svg:y2="15.463cm"><text:p/></draw:line><draw:line draw:style-name="gr65" draw:text-style-name="P75" svg:x1="10.251cm" svg:y1="15.463cm" svg:x2="10.751cm" svg:y2="15.463cm"><text:p/></draw:line><draw:line draw:style-name="gr66" draw:text-style-name="P75" svg:x1="13.001cm" svg:y1="15.463cm" svg:x2="16.501cm" svg:y2="15.463cm"><text:p/></draw:line><draw:line draw:style-name="gr67" draw:text-style-name="P75" svg:x1="3.503cm" svg:y1="14.213cm" svg:x2="4.503cm" svg:y2="14.213cm"><text:p/></draw:line><draw:line draw:style-name="gr68" draw:text-style-name="P75" svg:x1="6.752cm" svg:y1="14.213cm" svg:x2="7.502cm" svg:y2="14.213cm"><text:p/></draw:line><draw:line draw:style-name="gr69" draw:text-style-name="P75" svg:x1="9.001cm" svg:y1="14.213cm" svg:x2="10.751cm" svg:y2="14.213cm"><text:p/></draw:line><draw:line draw:style-name="gr70" draw:text-style-name="P75" svg:x1="13.001cm" svg:y1="14.213cm" svg:x2="16.501cm" svg:y2="14.213cm"><text:p/></draw:line><draw:custom-shape draw:style-name="gr10" draw:text-style-name="P73" svg:width="3.252cm" svg:height="1.001cm" svg:x="3.251cm" svg:y="17.462cm"><text:p text:style-name="P72"><text:span text:style-name="T70">variable identifier</text:span></text:p><draw:enhanced-geometry svg:viewBox="0 0 21600 21600" draw:type="rectangle" draw:enhanced-path="M 0 0 L 21600 0 21600 21600 0 21600 0 0 Z N"/></draw:custom-shape><draw:custom-shape draw:style-name="gr2" draw:text-style-name="P71" svg:width="2.001cm" svg:height="1.001cm" svg:x="0.752cm" svg:y="17.462cm"><text:p text:style-name="P70"><text:span text:style-name="T69">FO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71" svg:width="1.5cm" svg:height="1.001cm" svg:x="7.001cm" svg:y="17.462cm"><text:p text:style-name="P70"><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3" svg:width="3.25cm" svg:height="1.001cm" svg:x="9.001cm" svg:y="17.462cm"><text:p text:style-name="P72"><text:span text:style-name="T70">expression</text:span></text:p><draw:enhanced-geometry svg:viewBox="0 0 21600 21600" draw:type="rectangle" draw:enhanced-path="M 0 0 L 21600 0 21600 21600 0 21600 0 0 Z N"/></draw:custom-shape><draw:custom-shape draw:style-name="gr71" draw:text-style-name="P71" svg:width="2.999cm" svg:height="1.001cm" svg:x="13.002cm" svg:y="16.21cm"><text:p text:style-name="P70"><text:span text:style-name="T69">DOWNT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71" svg:width="1.5cm" svg:height="1.001cm" svg:x="13.002cm" svg:y="17.462cm"><text:p text:style-name="P70"><text:span text:style-name="T69">T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73" svg:width="2.251cm" svg:height="1.001cm" svg:x="4.251cm" svg:y="18.961cm"><text:p text:style-name="P72"><text:span text:style-name="T70">expression</text:span></text:p><draw:enhanced-geometry svg:viewBox="0 0 21600 21600" draw:type="rectangle" draw:enhanced-path="M 0 0 L 21600 0 21600 21600 0 21600 0 0 Z N"/></draw:custom-shape><draw:custom-shape draw:style-name="gr34" draw:text-style-name="P71" svg:width="1.5cm" svg:height="1.001cm" svg:x="7.252cm" svg:y="18.961cm"><text:p text:style-name="P70"><text:span text:style-name="T69">D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73" svg:width="2.251cm" svg:height="1.001cm" svg:x="10.501cm" svg:y="18.961cm"><text:p text:style-name="P72"><text:span text:style-name="T70">statement</text:span></text:p><draw:enhanced-geometry svg:viewBox="0 0 21600 21600" draw:type="rectangle" draw:enhanced-path="M 0 0 L 21600 0 21600 21600 0 21600 0 0 Z N"/></draw:custom-shape><draw:line draw:style-name="gr68" draw:text-style-name="P75" svg:x1="6.501cm" svg:y1="19.461cm" svg:x2="7.251cm" svg:y2="19.461cm"><text:p/></draw:line><draw:line draw:style-name="gr69" draw:text-style-name="P75" svg:x1="8.751cm" svg:y1="19.461cm" svg:x2="10.501cm" svg:y2="19.461cm"><text:p/></draw:line><draw:line draw:style-name="gr72" draw:text-style-name="P75" svg:x1="0.252cm" svg:y1="17.963cm" svg:x2="0.752cm" svg:y2="17.963cm"><text:p/></draw:line><draw:line draw:style-name="gr73" draw:text-style-name="P75" svg:x1="2.751cm" svg:y1="17.963cm" svg:x2="3.251cm" svg:y2="17.963cm"><text:p/></draw:line><draw:line draw:style-name="gr74" draw:text-style-name="P75" svg:x1="6.501cm" svg:y1="17.963cm" svg:x2="7.001cm" svg:y2="17.963cm"><text:p/></draw:line><draw:line draw:style-name="gr75" draw:text-style-name="P75" svg:x1="8.501cm" svg:y1="17.963cm" svg:x2="9.001cm" svg:y2="17.963cm"><text:p/></draw:line><draw:line draw:style-name="gr76" draw:text-style-name="P75" svg:x1="12.251cm" svg:y1="17.963cm" svg:x2="13.001cm" svg:y2="17.963cm"><text:p/></draw:line><draw:line draw:style-name="gr77" draw:text-style-name="P75" svg:x1="12.501cm" svg:y1="16.711cm" svg:x2="13.001cm" svg:y2="16.711cm"><text:p/></draw:line><draw:line draw:style-name="gr6" draw:text-style-name="P75" svg:x1="12.501cm" svg:y1="17.961cm" svg:x2="12.501cm" svg:y2="16.711cm"><text:p/></draw:line><draw:line draw:style-name="gr6" draw:text-style-name="P75" svg:x1="16.251cm" svg:y1="16.711cm" svg:x2="16.251cm" svg:y2="18.711cm"><text:p/></draw:line><draw:line draw:style-name="gr6" draw:text-style-name="P75" svg:x1="16.253cm" svg:y1="18.713cm" svg:x2="3.503cm" svg:y2="18.713cm"><text:p/></draw:line><draw:line draw:style-name="gr78" draw:text-style-name="P75" svg:x1="3.503cm" svg:y1="19.461cm" svg:x2="4.253cm" svg:y2="19.461cm"><text:p/></draw:line><draw:line draw:style-name="gr6" draw:text-style-name="P75" svg:x1="3.503cm" svg:y1="18.713cm" svg:x2="3.503cm" svg:y2="19.463cm"><text:p/></draw:line><draw:line draw:style-name="gr79" draw:text-style-name="P75" svg:x1="12.751cm" svg:y1="19.461cm" svg:x2="16.501cm" svg:y2="19.461cm"><text:p/></draw:line><draw:line draw:style-name="gr80" draw:text-style-name="P75" svg:x1="14.501cm" svg:y1="17.963cm" svg:x2="16.251cm" svg:y2="17.963cm"><text:p/></draw:line><draw:line draw:style-name="gr6" draw:text-style-name="P75" svg:x1="16.001cm" svg:y1="16.711cm" svg:x2="16.251cm" svg:y2="16.711cm"><text:p/></draw:line><draw:custom-shape draw:style-name="gr37" draw:text-style-name="P71" svg:width="2.25cm" svg:height="1.001cm" svg:x="0.752cm" svg:y="20.212cm"><text:p text:style-name="P70"><text:span text:style-name="T69">WITH</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73" svg:width="2.251cm" svg:height="1.001cm" svg:x="4.251cm" svg:y="20.212cm"><text:p text:style-name="P72"><text:span text:style-name="T70">variable</text:span></text:p><draw:enhanced-geometry svg:viewBox="0 0 21600 21600" draw:type="rectangle" draw:enhanced-path="M 0 0 L 21600 0 21600 21600 0 21600 0 0 Z N"/></draw:custom-shape><draw:custom-shape draw:style-name="gr34" draw:text-style-name="P71" svg:width="1.5cm" svg:height="1.001cm" svg:x="7.252cm" svg:y="20.212cm"><text:p text:style-name="P70"><text:span text:style-name="T69">D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73" svg:width="2.251cm" svg:height="1.001cm" svg:x="10.501cm" svg:y="20.212cm"><text:p text:style-name="P72"><text:span text:style-name="T70">statement</text:span></text:p><draw:enhanced-geometry svg:viewBox="0 0 21600 21600" draw:type="rectangle" draw:enhanced-path="M 0 0 L 21600 0 21600 21600 0 21600 0 0 Z N"/></draw:custom-shape><draw:line draw:style-name="gr68" draw:text-style-name="P75" svg:x1="6.501cm" svg:y1="20.713cm" svg:x2="7.251cm" svg:y2="20.713cm"><text:p/></draw:line><draw:line draw:style-name="gr69" draw:text-style-name="P75" svg:x1="8.751cm" svg:y1="20.713cm" svg:x2="10.501cm" svg:y2="20.713cm"><text:p/></draw:line><draw:line draw:style-name="gr81" draw:text-style-name="P75" svg:x1="0.252cm" svg:y1="20.713cm" svg:x2="0.752cm" svg:y2="20.713cm"><text:p/></draw:line><draw:line draw:style-name="gr82" draw:text-style-name="P75" svg:x1="3.002cm" svg:y1="20.713cm" svg:x2="4.252cm" svg:y2="20.713cm"><text:p/></draw:line><draw:line draw:style-name="gr83" draw:text-style-name="P75" svg:x1="12.751cm" svg:y1="20.713cm" svg:x2="16.501cm" svg:y2="20.713cm"><text:p/></draw:line><draw:custom-shape draw:style-name="gr4" draw:text-style-name="P71" svg:width="1.001cm" svg:height="1.001cm" svg:x="4.75cm" svg:y="21.463cm"><text:p text:style-name="P70"><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75" svg:x1="6.752cm" svg:y1="20.713cm" svg:x2="6.752cm" svg:y2="21.963cm"><text:p/></draw:line><draw:line draw:style-name="gr84" draw:text-style-name="P75" svg:x1="6.752cm" svg:y1="21.963cm" svg:x2="5.752cm" svg:y2="21.963cm"><text:p/></draw:line><draw:line draw:style-name="gr6" draw:text-style-name="P75" svg:x1="4.753cm" svg:y1="21.963cm" svg:x2="3.503cm" svg:y2="21.963cm"><text:p/></draw:line><draw:line draw:style-name="gr85" draw:text-style-name="P75" svg:x1="3.503cm" svg:y1="21.963cm" svg:x2="3.503cm" svg:y2="20.713cm"><text:p/></draw:line><draw:custom-shape draw:style-name="gr54" draw:text-style-name="P71" svg:width="2.251cm" svg:height="1.001cm" svg:x="1cm" svg:y="22.212cm"><text:p text:style-name="P70"><text:span text:style-name="T69">GOT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3" svg:width="3.25cm" svg:height="1.001cm" svg:x="7.252cm" svg:y="22.212cm"><text:p text:style-name="P72"><text:span text:style-name="T70">unsigned integer</text:span></text:p><draw:enhanced-geometry svg:viewBox="0 0 21600 21600" draw:type="rectangle" draw:enhanced-path="M 0 0 L 21600 0 21600 21600 0 21600 0 0 Z N"/></draw:custom-shape><draw:line draw:style-name="gr86" draw:text-style-name="P75" svg:x1="3.251cm" svg:y1="22.71cm" svg:x2="7.251cm" svg:y2="22.71cm"><text:p/></draw:line><draw:line draw:style-name="gr87" draw:text-style-name="P75" svg:x1="0.252cm" svg:y1="22.71cm" svg:x2="1.002cm" svg:y2="22.71cm"><text:p/></draw:line><draw:line draw:style-name="gr6" draw:text-style-name="P75" svg:x1="0.252cm" svg:y1="0.963cm" svg:x2="0.252cm" svg:y2="0.213cm"><text:p/></draw:line><draw:line draw:style-name="gr6" draw:text-style-name="P75" svg:x1="0.252cm" svg:y1="0.213cm" svg:x2="16.502cm" svg:y2="0.213cm"><text:p/></draw:line><draw:line draw:style-name="gr88" draw:text-style-name="P75" svg:x1="16.501cm" svg:y1="0.213cm" svg:x2="16.501cm" svg:y2="2.463cm"><text:p/></draw:line><draw:line draw:style-name="gr6" draw:text-style-name="P75" svg:x1="10.502cm" svg:y1="22.71cm" svg:x2="16.502cm" svg:y2="22.71cm"><text:p/></draw:line></draw:g></text:p>
      <text:h text:style-name="P61" text:outline-level="2"><text:bookmark-start text:name="__RefHeading___Toc65_1849558913"/><text:span text:style-name="Source_20_Text">GOTO</text:span>-Anweisung<text:bookmark-end text:name="__RefHeading___Toc65_1849558913"/></text:h>
      <text:p text:style-name="Text_20_body">Es ist nur ein <text:span text:style-name="Source_20_Text">GOTO</text:span> zu einer Marke möglich, die sich im selben Block und in derselben Ebene befindet.</text:p>
      <text:p text:style-name="Text_20_body">Marken müssen durch das reservierte Wort '<text:span text:style-name="Source_20_Text">LABEL</text:span>' in dem Block, in dem sie benutzt werden sollen, deklariert werden. Eine Marke besteht aus 1 bis 4 Zeichen. Wenn eine Anweisung markiert werden soll, muss die Marke vor der Anweisung stehen und mit einem Doppelpunkt '<text:span text:style-name="Source_20_Text">:</text:span>' abgeschlossen werden.</text:p>
      <text:h text:style-name="P62" text:outline-level="2"><text:bookmark-start text:name="__RefHeading___Toc69_1849558913"/>Block<text:bookmark-end text:name="__RefHeading___Toc69_1849558913"/></text:h>
      <text:p text:style-name="Text_20_body"><draw:g text:anchor-type="paragraph" draw:z-index="13" draw:name="Gruppenobjekt 16" draw:style-name="gr1"><draw:custom-shape draw:style-name="gr122" draw:text-style-name="P71" svg:width="2.752cm" svg:height="0.999cm" svg:x="0.998cm" svg:y="0.213cm"><text:p text:style-name="P70"><text:span text:style-name="T69">LABEL</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73" svg:width="2.251cm" svg:height="1.001cm" svg:x="4.999cm" svg:y="3.462cm"><text:p text:style-name="P72"><text:span text:style-name="T70">identifier</text:span></text:p><draw:enhanced-geometry svg:viewBox="0 0 21600 21600" draw:type="rectangle" draw:enhanced-path="M 0 0 L 21600 0 21600 21600 0 21600 0 0 Z N"/></draw:custom-shape><draw:custom-shape draw:style-name="gr55" draw:text-style-name="P73" svg:width="2.251cm" svg:height="1.001cm" svg:x="9.749cm" svg:y="3.462cm"><text:p text:style-name="P72"><text:span text:style-name="T70">constant</text:span></text:p><draw:enhanced-geometry svg:viewBox="0 0 21600 21600" draw:type="rectangle" draw:enhanced-path="M 0 0 L 21600 0 21600 21600 0 21600 0 0 Z N"/></draw:custom-shape><draw:custom-shape draw:style-name="gr123" draw:text-style-name="P71" svg:width="0.999cm" svg:height="1.001cm" svg:x="3.75cm" svg:y="1.211cm"><text:p text:style-name="P70"><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9" draw:text-style-name="P73" svg:width="3.252cm" svg:height="0.999cm" svg:x="4.999cm" svg:y="0.213cm"><text:p text:style-name="P72"><text:span text:style-name="T70">unsigned integer</text:span></text:p><draw:enhanced-geometry svg:viewBox="0 0 21600 21600" draw:type="rectangle" draw:enhanced-path="M 0 0 L 21600 0 21600 21600 0 21600 0 0 Z N"/></draw:custom-shape><draw:line draw:style-name="gr124" draw:text-style-name="P74" svg:x1="-0.001cm" svg:y1="0.709cm" svg:x2="0.999cm" svg:y2="0.709cm"><text:p/></draw:line><draw:line draw:style-name="gr125" draw:text-style-name="P74" svg:x1="3.749cm" svg:y1="0.709cm" svg:x2="4.999cm" svg:y2="0.709cm"><text:p/></draw:line><draw:line draw:style-name="gr126" draw:text-style-name="P74" svg:x1="4.249cm" svg:y1="1.209cm" svg:x2="4.249cm" svg:y2="0.709cm"><text:p/></draw:line><draw:custom-shape draw:style-name="gr4" draw:text-style-name="P71" svg:width="1.001cm" svg:height="1.001cm" svg:x="1.75cm" svg:y="2.21cm"><text:p text:style-name="P70"><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27" draw:text-style-name="P74" svg:x1="4.249cm" svg:y1="2.711cm" svg:x2="4.249cm" svg:y2="2.211cm"><text:p/></draw:line><draw:line draw:style-name="gr6" draw:text-style-name="P74" svg:x1="8.248cm" svg:y1="0.709cm" svg:x2="15.998cm" svg:y2="0.709cm"><text:p/></draw:line><draw:line draw:style-name="gr6" draw:text-style-name="P74" svg:x1="15.999cm" svg:y1="0.709cm" svg:x2="15.999cm" svg:y2="2.709cm"><text:p/></draw:line><draw:line draw:style-name="gr128" draw:text-style-name="P74" svg:x1="15.999cm" svg:y1="2.711cm" svg:x2="2.749cm" svg:y2="2.711cm"><text:p/></draw:line><draw:line draw:style-name="gr6" draw:text-style-name="P74" svg:x1="0.499cm" svg:y1="0.709cm" svg:x2="0.499cm" svg:y2="14.209cm"><text:p/></draw:line><draw:line draw:style-name="gr129" draw:text-style-name="P74" svg:x1="1.749cm" svg:y1="2.711cm" svg:x2="0.499cm" svg:y2="2.711cm"><text:p/></draw:line><draw:custom-shape draw:style-name="gr130" draw:text-style-name="P71" svg:width="2.752cm" svg:height="1.001cm" svg:x="0.998cm" svg:y="3.462cm"><text:p text:style-name="P70"><text:span text:style-name="T69">CONS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71" svg:width="1.001cm" svg:height="1.001cm" svg:x="12.749cm" svg:y="3.462cm"><text:p text:style-name="P70"><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25" draw:text-style-name="P74" svg:x1="3.773cm" svg:y1="3.963cm" svg:x2="5.023cm" svg:y2="3.963cm"><text:p/></draw:line><draw:custom-shape draw:style-name="gr4" draw:text-style-name="P71" svg:width="1.001cm" svg:height="1.001cm" svg:x="7.999cm" svg:y="3.462cm"><text:p text:style-name="P70"><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31" draw:text-style-name="P74" svg:x1="0.499cm" svg:y1="3.963cm" svg:x2="0.999cm" svg:y2="3.963cm"><text:p/></draw:line><draw:line draw:style-name="gr132" draw:text-style-name="P74" svg:x1="7.248cm" svg:y1="3.963cm" svg:x2="7.998cm" svg:y2="3.963cm"><text:p/></draw:line><draw:line draw:style-name="gr133" draw:text-style-name="P74" svg:x1="8.999cm" svg:y1="3.963cm" svg:x2="9.749cm" svg:y2="3.963cm"><text:p/></draw:line><draw:line draw:style-name="gr134" draw:text-style-name="P74" svg:x1="11.999cm" svg:y1="3.963cm" svg:x2="12.749cm" svg:y2="3.963cm"><text:p/></draw:line><draw:line draw:style-name="gr6" draw:text-style-name="P74" svg:x1="13.748cm" svg:y1="3.963cm" svg:x2="15.998cm" svg:y2="3.963cm"><text:p/></draw:line><draw:line draw:style-name="gr6" draw:text-style-name="P74" svg:x1="15.999cm" svg:y1="3.963cm" svg:x2="15.999cm" svg:y2="4.713cm"><text:p/></draw:line><draw:line draw:style-name="gr135" draw:text-style-name="P74" svg:x1="15.999cm" svg:y1="4.713cm" svg:x2="0.499cm" svg:y2="4.713cm"><text:p/></draw:line><draw:line draw:style-name="gr136" draw:text-style-name="P74" svg:x1="4.249cm" svg:y1="4.713cm" svg:x2="4.249cm" svg:y2="3.963cm"><text:p/></draw:line><draw:custom-shape draw:style-name="gr55" draw:text-style-name="P73" svg:width="2.251cm" svg:height="1.001cm" svg:x="4.999cm" svg:y="4.961cm"><text:p text:style-name="P72"><text:span text:style-name="T70">identifier</text:span></text:p><draw:enhanced-geometry svg:viewBox="0 0 21600 21600" draw:type="rectangle" draw:enhanced-path="M 0 0 L 21600 0 21600 21600 0 21600 0 0 Z N"/></draw:custom-shape><draw:custom-shape draw:style-name="gr55" draw:text-style-name="P73" svg:width="2.251cm" svg:height="1.001cm" svg:x="9.749cm" svg:y="4.961cm"><text:p text:style-name="P72"><text:span text:style-name="T70">type</text:span></text:p><draw:enhanced-geometry svg:viewBox="0 0 21600 21600" draw:type="rectangle" draw:enhanced-path="M 0 0 L 21600 0 21600 21600 0 21600 0 0 Z N"/></draw:custom-shape><draw:custom-shape draw:style-name="gr130" draw:text-style-name="P71" svg:width="2.752cm" svg:height="1.001cm" svg:x="0.998cm" svg:y="4.961cm"><text:p text:style-name="P70"><text:span text:style-name="T69">TYP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71" svg:width="1.001cm" svg:height="1.001cm" svg:x="12.749cm" svg:y="4.961cm"><text:p text:style-name="P70"><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25" draw:text-style-name="P74" svg:x1="3.773cm" svg:y1="5.461cm" svg:x2="5.023cm" svg:y2="5.461cm"><text:p/></draw:line><draw:custom-shape draw:style-name="gr4" draw:text-style-name="P71" svg:width="1.001cm" svg:height="1.001cm" svg:x="7.999cm" svg:y="4.961cm"><text:p text:style-name="P70"><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31" draw:text-style-name="P74" svg:x1="0.499cm" svg:y1="5.461cm" svg:x2="0.999cm" svg:y2="5.461cm"><text:p/></draw:line><draw:line draw:style-name="gr132" draw:text-style-name="P74" svg:x1="7.248cm" svg:y1="5.461cm" svg:x2="7.998cm" svg:y2="5.461cm"><text:p/></draw:line><draw:line draw:style-name="gr133" draw:text-style-name="P74" svg:x1="8.999cm" svg:y1="5.461cm" svg:x2="9.749cm" svg:y2="5.461cm"><text:p/></draw:line><draw:line draw:style-name="gr134" draw:text-style-name="P74" svg:x1="11.999cm" svg:y1="5.461cm" svg:x2="12.749cm" svg:y2="5.461cm"><text:p/></draw:line><draw:line draw:style-name="gr6" draw:text-style-name="P74" svg:x1="13.748cm" svg:y1="5.461cm" svg:x2="15.998cm" svg:y2="5.461cm"><text:p/></draw:line><draw:line draw:style-name="gr6" draw:text-style-name="P74" svg:x1="15.999cm" svg:y1="5.461cm" svg:x2="15.999cm" svg:y2="6.211cm"><text:p/></draw:line><draw:line draw:style-name="gr135" draw:text-style-name="P74" svg:x1="15.999cm" svg:y1="6.213cm" svg:x2="0.499cm" svg:y2="6.213cm"><text:p/></draw:line><draw:line draw:style-name="gr136" draw:text-style-name="P74" svg:x1="4.249cm" svg:y1="6.211cm" svg:x2="4.249cm" svg:y2="5.461cm"><text:p/></draw:line><draw:custom-shape draw:style-name="gr55" draw:text-style-name="P73" svg:width="2.251cm" svg:height="1.001cm" svg:x="4.999cm" svg:y="6.461cm"><text:p text:style-name="P72"><text:span text:style-name="T70">identifier</text:span></text:p><draw:enhanced-geometry svg:viewBox="0 0 21600 21600" draw:type="rectangle" draw:enhanced-path="M 0 0 L 21600 0 21600 21600 0 21600 0 0 Z N"/></draw:custom-shape><draw:custom-shape draw:style-name="gr55" draw:text-style-name="P80" svg:width="2.251cm" svg:height="1.001cm" svg:x="9.749cm" svg:y="6.461cm"><text:p text:style-name="P72"><text:span text:style-name="T70">type</text:span></text:p><draw:enhanced-geometry svg:viewBox="0 0 21600 21600" draw:type="rectangle" draw:enhanced-path="M 0 0 L 21600 0 21600 21600 0 21600 0 0 Z N"/></draw:custom-shape><draw:custom-shape draw:style-name="gr130" draw:text-style-name="P71" svg:width="2.752cm" svg:height="1.001cm" svg:x="0.998cm" svg:y="6.461cm"><text:p text:style-name="P70"><text:span text:style-name="T69">VA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71" svg:width="1.001cm" svg:height="1.001cm" svg:x="12.749cm" svg:y="6.461cm"><text:p text:style-name="P70"><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25" draw:text-style-name="P74" svg:x1="3.773cm" svg:y1="6.962cm" svg:x2="5.023cm" svg:y2="6.962cm"><text:p/></draw:line><draw:custom-shape draw:style-name="gr4" draw:text-style-name="P71" svg:width="1.001cm" svg:height="1.001cm" svg:x="7.999cm" svg:y="6.461cm"><text:p text:style-name="P70"><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31" draw:text-style-name="P74" svg:x1="0.499cm" svg:y1="6.962cm" svg:x2="0.999cm" svg:y2="6.962cm"><text:p/></draw:line><draw:line draw:style-name="gr132" draw:text-style-name="P74" svg:x1="7.248cm" svg:y1="6.962cm" svg:x2="7.998cm" svg:y2="6.962cm"><text:p/></draw:line><draw:line draw:style-name="gr133" draw:text-style-name="P74" svg:x1="8.999cm" svg:y1="6.962cm" svg:x2="9.749cm" svg:y2="6.962cm"><text:p/></draw:line><draw:line draw:style-name="gr134" draw:text-style-name="P74" svg:x1="11.999cm" svg:y1="6.962cm" svg:x2="12.749cm" svg:y2="6.962cm"><text:p/></draw:line><draw:line draw:style-name="gr6" draw:text-style-name="P74" svg:x1="13.748cm" svg:y1="6.962cm" svg:x2="15.998cm" svg:y2="6.962cm"><text:p/></draw:line><draw:line draw:style-name="gr6" draw:text-style-name="P74" svg:x1="15.999cm" svg:y1="6.962cm" svg:x2="15.999cm" svg:y2="8.962cm"><text:p/></draw:line><draw:line draw:style-name="gr135" draw:text-style-name="P74" svg:x1="15.999cm" svg:y1="8.963cm" svg:x2="0.499cm" svg:y2="8.963cm"><text:p/></draw:line><draw:line draw:style-name="gr136" draw:text-style-name="P74" svg:x1="4.249cm" svg:y1="8.962cm" svg:x2="4.249cm" svg:y2="6.962cm"><text:p/></draw:line><draw:custom-shape draw:style-name="gr102" draw:text-style-name="P71" svg:width="1.001cm" svg:height="0.999cm" svg:x="5.5cm" svg:y="7.713cm"><text:p text:style-name="P70"><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74" svg:x1="7.499cm" svg:y1="6.962cm" svg:x2="7.499cm" svg:y2="8.212cm"><text:p/></draw:line><draw:line draw:style-name="gr137" draw:text-style-name="P74" svg:x1="7.499cm" svg:y1="8.21cm" svg:x2="6.499cm" svg:y2="8.21cm"><text:p/></draw:line><draw:line draw:style-name="gr138" draw:text-style-name="P74" svg:x1="5.499cm" svg:y1="8.21cm" svg:x2="4.249cm" svg:y2="8.21cm"><text:p/></draw:line><draw:custom-shape draw:style-name="gr90" draw:text-style-name="P71" svg:width="3.252cm" svg:height="1.001cm" svg:x="4.999cm" svg:y="9.212cm"><text:p text:style-name="P70"><text:span text:style-name="T69">FORWAR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73" svg:width="2.251cm" svg:height="1.001cm" svg:x="9.749cm" svg:y="9.962cm"><text:p text:style-name="P72"><text:span text:style-name="T70">block</text:span></text:p><draw:enhanced-geometry svg:viewBox="0 0 21600 21600" draw:type="rectangle" draw:enhanced-path="M 0 0 L 21600 0 21600 21600 0 21600 0 0 Z N"/></draw:custom-shape><draw:custom-shape draw:style-name="gr4" draw:text-style-name="P71" svg:width="1.001cm" svg:height="1.001cm" svg:x="2.501cm" svg:y="9.962cm"><text:p text:style-name="P70"><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71" svg:width="1.001cm" svg:height="1.001cm" svg:x="12.749cm" svg:y="9.964cm"><text:p text:style-name="P70"><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39" draw:text-style-name="P74" svg:x1="12.749cm" svg:y1="10.463cm" svg:x2="11.999cm" svg:y2="10.463cm"><text:p/></draw:line><draw:line draw:style-name="gr140" draw:text-style-name="P74" svg:x1="9.748cm" svg:y1="10.463cm" svg:x2="3.498cm" svg:y2="10.463cm"><text:p/></draw:line><draw:line draw:style-name="gr141" draw:text-style-name="P74" svg:x1="2.499cm" svg:y1="10.463cm" svg:x2="0.499cm" svg:y2="10.463cm"><text:p/></draw:line><draw:line draw:style-name="gr6" draw:text-style-name="P74" svg:x1="4.999cm" svg:y1="9.712cm" svg:x2="4.249cm" svg:y2="9.712cm"><text:p/></draw:line><draw:line draw:style-name="gr142" draw:text-style-name="P74" svg:x1="4.249cm" svg:y1="9.712cm" svg:x2="4.249cm" svg:y2="10.462cm"><text:p/></draw:line><draw:line draw:style-name="gr6" draw:text-style-name="P74" svg:x1="12.499cm" svg:y1="10.462cm" svg:x2="12.499cm" svg:y2="9.712cm"><text:p/></draw:line><draw:line draw:style-name="gr143" draw:text-style-name="P74" svg:x1="12.498cm" svg:y1="9.712cm" svg:x2="8.248cm" svg:y2="9.712cm"><text:p/></draw:line><draw:custom-shape draw:style-name="gr144" draw:text-style-name="P71" svg:width="4cm" svg:height="1.001cm" svg:x="1cm" svg:y="11.213cm"><text:p text:style-name="P70"><text:span text:style-name="T69">PROCEDUR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44" draw:text-style-name="P71" svg:width="4cm" svg:height="1.001cm" svg:x="1cm" svg:y="12.461cm"><text:p text:style-name="P70"><text:span text:style-name="T69">FUNCTIO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73" svg:width="2.25cm" svg:height="1.001cm" svg:x="5.5cm" svg:y="11.213cm"><text:p text:style-name="P72"><text:span text:style-name="T70">identifier</text:span></text:p><draw:enhanced-geometry svg:viewBox="0 0 21600 21600" draw:type="rectangle" draw:enhanced-path="M 0 0 L 21600 0 21600 21600 0 21600 0 0 Z N"/></draw:custom-shape><draw:custom-shape draw:style-name="gr35" draw:text-style-name="P73" svg:width="2.25cm" svg:height="1.001cm" svg:x="5.5cm" svg:y="12.461cm"><text:p text:style-name="P72"><text:span text:style-name="T70">identifier</text:span></text:p><draw:enhanced-geometry svg:viewBox="0 0 21600 21600" draw:type="rectangle" draw:enhanced-path="M 0 0 L 21600 0 21600 21600 0 21600 0 0 Z N"/></draw:custom-shape><draw:custom-shape draw:style-name="gr145" draw:text-style-name="P73" svg:width="2.751cm" svg:height="1.001cm" svg:x="8.249cm" svg:y="12.461cm"><text:p text:style-name="P72"><text:span text:style-name="T70">parameter list</text:span></text:p><draw:enhanced-geometry svg:viewBox="0 0 21600 21600" draw:type="rectangle" draw:enhanced-path="M 0 0 L 21600 0 21600 21600 0 21600 0 0 Z N"/></draw:custom-shape><draw:custom-shape draw:style-name="gr145" draw:text-style-name="P73" svg:width="2.751cm" svg:height="1.001cm" svg:x="8.249cm" svg:y="11.213cm"><text:p text:style-name="P72"><text:span text:style-name="T70">parameter list</text:span></text:p><draw:enhanced-geometry svg:viewBox="0 0 21600 21600" draw:type="rectangle" draw:enhanced-path="M 0 0 L 21600 0 21600 21600 0 21600 0 0 Z N"/></draw:custom-shape><draw:custom-shape draw:style-name="gr4" draw:text-style-name="P71" svg:width="1.001cm" svg:height="1.001cm" svg:x="11.499cm" svg:y="12.463cm"><text:p text:style-name="P70"><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45" draw:text-style-name="P73" svg:width="2.751cm" svg:height="1.001cm" svg:x="13cm" svg:y="12.461cm"><text:p text:style-name="P72"><text:span text:style-name="T70">type identifier</text:span></text:p><draw:enhanced-geometry svg:viewBox="0 0 21600 21600" draw:type="rectangle" draw:enhanced-path="M 0 0 L 21600 0 21600 21600 0 21600 0 0 Z N"/></draw:custom-shape><draw:line draw:style-name="gr6" draw:text-style-name="P74" svg:x1="15.749cm" svg:y1="12.961cm" svg:x2="15.999cm" svg:y2="12.961cm"><text:p/></draw:line><draw:line draw:style-name="gr6" draw:text-style-name="P74" svg:x1="15.999cm" svg:y1="12.963cm" svg:x2="15.999cm" svg:y2="10.463cm"><text:p/></draw:line><draw:line draw:style-name="gr146" draw:text-style-name="P74" svg:x1="15.998cm" svg:y1="10.463cm" svg:x2="13.748cm" svg:y2="10.463cm"><text:p/></draw:line><draw:line draw:style-name="gr147" draw:text-style-name="P74" svg:x1="10.998cm" svg:y1="11.713cm" svg:x2="15.998cm" svg:y2="11.713cm"><text:p/></draw:line><draw:line draw:style-name="gr148" draw:text-style-name="P74" svg:x1="0.499cm" svg:y1="11.713cm" svg:x2="0.999cm" svg:y2="11.713cm"><text:p/></draw:line><draw:line draw:style-name="gr149" draw:text-style-name="P74" svg:x1="0.499cm" svg:y1="12.961cm" svg:x2="0.999cm" svg:y2="12.961cm"><text:p/></draw:line><draw:line draw:style-name="gr150" draw:text-style-name="P74" svg:x1="4.999cm" svg:y1="11.713cm" svg:x2="5.499cm" svg:y2="11.713cm"><text:p/></draw:line><draw:line draw:style-name="gr151" draw:text-style-name="P74" svg:x1="4.999cm" svg:y1="12.961cm" svg:x2="5.499cm" svg:y2="12.961cm"><text:p/></draw:line><draw:line draw:style-name="gr152" draw:text-style-name="P74" svg:x1="7.749cm" svg:y1="11.713cm" svg:x2="8.249cm" svg:y2="11.713cm"><text:p/></draw:line><draw:line draw:style-name="gr153" draw:text-style-name="P74" svg:x1="7.749cm" svg:y1="12.961cm" svg:x2="8.249cm" svg:y2="12.961cm"><text:p/></draw:line><draw:line draw:style-name="gr154" draw:text-style-name="P74" svg:x1="10.998cm" svg:y1="12.961cm" svg:x2="11.498cm" svg:y2="12.961cm"><text:p/></draw:line><draw:line draw:style-name="gr155" draw:text-style-name="P74" svg:x1="12.499cm" svg:y1="12.961cm" svg:x2="12.999cm" svg:y2="12.961cm"><text:p/></draw:line><draw:custom-shape draw:style-name="gr27" draw:text-style-name="P71" svg:width="2.751cm" svg:height="1.001cm" svg:x="1cm" svg:y="13.712cm"><text:p text:style-name="P70"><text:span text:style-name="T69">BEGI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73" svg:width="2.25cm" svg:height="1.001cm" svg:x="5.5cm" svg:y="13.712cm"><text:p text:style-name="P72"><text:span text:style-name="T70">statement</text:span></text:p><draw:enhanced-geometry svg:viewBox="0 0 21600 21600" draw:type="rectangle" draw:enhanced-path="M 0 0 L 21600 0 21600 21600 0 21600 0 0 Z N"/></draw:custom-shape><draw:custom-shape draw:style-name="gr2" draw:text-style-name="P71" svg:width="2.001cm" svg:height="1.001cm" svg:x="8.749cm" svg:y="13.714cm"><text:p text:style-name="P70"><text:span text:style-name="T69">EN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14" draw:text-style-name="P74" svg:x1="0.499cm" svg:y1="14.213cm" svg:x2="0.999cm" svg:y2="14.213cm"><text:p/></draw:line><draw:line draw:style-name="gr156" draw:text-style-name="P74" svg:x1="3.749cm" svg:y1="14.213cm" svg:x2="5.499cm" svg:y2="14.213cm"><text:p/></draw:line><draw:line draw:style-name="gr157" draw:text-style-name="P74" svg:x1="7.749cm" svg:y1="14.213cm" svg:x2="8.749cm" svg:y2="14.213cm"><text:p/></draw:line><draw:line draw:style-name="gr158" draw:text-style-name="P74" svg:x1="10.749cm" svg:y1="14.213cm" svg:x2="16.249cm" svg:y2="14.213cm"><text:p/></draw:line></draw:g></text:p>
      <text:h text:style-name="P63" text:outline-level="2"><text:bookmark-start text:name="__RefHeading___Toc67_1849558913"/><text:soft-page-break/>Vorwärts-Bezüge<text:bookmark-end text:name="__RefHeading___Toc67_1849558913"/></text:h>
      <text:p text:style-name="P35">Wie im Pascal User Manual and Report beschrieben, können Prozeduren und Funktionen verwendet werden, bevor sie deklariert wurden. Das ist möglich durch das reservierte Wort <text:span text:style-name="Source_20_Text">FORWARD</text:span>.</text:p>
      <text:p text:style-name="P35">Beispiel:</text:p>
      <text:p text:style-name="P34">PROCEDURE a(y:t); FORWARD; <text:s/><text:span text:style-name="T19">(* </text:span>Procedure a vorwärts deklariert *)</text:p>
      <text:p text:style-name="P34">PROCEDURE b(x:t); <text:s text:c="10"/>(* Procedure b *)</text:p>
      <text:p text:style-name="P34"><text:s text:c="2"/>BEGIN</text:p>
      <text:p text:style-name="P34"><text:s text:c="2"/>....</text:p>
      <text:p text:style-name="P34"><text:s text:c="2"/>a(p); <text:s text:c="20"/>(* Bezug auf Procedure a *)</text:p>
      <text:p text:style-name="P34"><text:s text:c="2"/>....</text:p>
      <text:p text:style-name="P34"><text:s text:c="2"/>END;</text:p>
      <text:p text:style-name="P34">PROCEDURE a; <text:s text:c="15"/>(* aktuelle Deklaration Procedure a *)</text:p>
      <text:p text:style-name="P34"><text:s text:c="2"/>BEGIN</text:p>
      <text:p text:style-name="P34"><text:s text:c="2"/>....</text:p>
      <text:p text:style-name="P34"><text:s text:c="2"/>b(q);</text:p>
      <text:p text:style-name="P34"><text:s text:c="2"/>....</text:p>
      <text:p text:style-name="P34"><text:s text:c="2"/>END;</text:p>
      <text:p text:style-name="P34"/>
      <text:p text:style-name="P35">Beachten Sie, dass die Parameter und der Typ des Ergebnisses einer Prozedur zusammen mit <text:span text:style-name="Source_20_Text">FORWARD</text:span> deklariert werden und in der eigentlichen Deklaration der Prozedur nicht wiederholt werden.</text:p>
      <text:h text:style-name="P64" text:outline-level="2"><text:bookmark-start text:name="__RefHeading___Toc8102_3364067021"/>Programme<text:bookmark-end text:name="__RefHeading___Toc8102_3364067021"/></text:h>
      <text:p text:style-name="P36"><draw:g text:anchor-type="paragraph" draw:z-index="14" draw:name="Gruppenobjekt 17" draw:style-name="gr1"><draw:custom-shape draw:style-name="gr112" draw:text-style-name="P71" svg:width="3.248cm" svg:height="0.999cm" svg:x="0.753cm" svg:y="0.213cm"><text:p text:style-name="P70"><text:span text:style-name="T69">PROGRAM</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13" draw:text-style-name="P73" svg:width="2.25cm" svg:height="0.999cm" svg:x="4.502cm" svg:y="0.213cm"><text:p text:style-name="P72"><text:span text:style-name="T70">identifier</text:span></text:p><draw:enhanced-geometry svg:viewBox="0 0 21600 21600" draw:type="rectangle" draw:enhanced-path="M 0 0 L 21600 0 21600 21600 0 21600 0 0 Z N"/></draw:custom-shape><draw:custom-shape draw:style-name="gr2" draw:text-style-name="P71" svg:width="2.001cm" svg:height="1.001cm" svg:x="11.301cm" svg:y="0.213cm"><text:p text:style-name="P70"><text:span text:style-name="T69">EN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14" draw:text-style-name="P74" svg:x1="0.001cm" svg:y1="0.709cm" svg:x2="0.751cm" svg:y2="0.709cm"><text:p/></draw:line><draw:custom-shape draw:style-name="gr102" draw:text-style-name="P71" svg:width="1.001cm" svg:height="0.999cm" svg:x="7.252cm" svg:y="0.213cm"><text:p text:style-name="P70"><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15" draw:text-style-name="P73" svg:width="2.001cm" svg:height="0.999cm" svg:x="8.751cm" svg:y="0.213cm"><text:p text:style-name="P72"><text:span text:style-name="T70">block</text:span></text:p><draw:enhanced-geometry svg:viewBox="0 0 21600 21600" draw:type="rectangle" draw:enhanced-path="M 0 0 L 21600 0 21600 21600 0 21600 0 0 Z N"/></draw:custom-shape><draw:custom-shape draw:style-name="gr102" draw:text-style-name="P71" svg:width="1.001cm" svg:height="0.999cm" svg:x="13.752cm" svg:y="0.213cm"><text:p text:style-name="P70"><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16" draw:text-style-name="P74" svg:x1="4.001cm" svg:y1="0.709cm" svg:x2="4.501cm" svg:y2="0.709cm"><text:p/></draw:line><draw:line draw:style-name="gr117" draw:text-style-name="P74" svg:x1="6.752cm" svg:y1="0.709cm" svg:x2="7.252cm" svg:y2="0.709cm"><text:p/></draw:line><draw:line draw:style-name="gr118" draw:text-style-name="P74" svg:x1="8.253cm" svg:y1="0.709cm" svg:x2="8.753cm" svg:y2="0.709cm"><text:p/></draw:line><draw:line draw:style-name="gr119" draw:text-style-name="P74" svg:x1="10.751cm" svg:y1="0.709cm" svg:x2="11.251cm" svg:y2="0.709cm"><text:p/></draw:line><draw:line draw:style-name="gr120" draw:text-style-name="P74" svg:x1="13.252cm" svg:y1="0.709cm" svg:x2="13.752cm" svg:y2="0.709cm"><text:p/></draw:line><draw:line draw:style-name="gr121" draw:text-style-name="P74" svg:x1="14.753cm" svg:y1="0.709cm" svg:x2="15.503cm" svg:y2="0.709cm"><text:p/></draw:line></draw:g></text:p>
      <text:p text:style-name="Text_20_body">Da keine Files implementiert sind, existieren auch <text:span text:style-name="Source_20_Text">INPUT</text:span> und <text:span text:style-name="Source_20_Text">OUTPUT</text:span> nicht.</text:p>
      <text:h text:style-name="Heading_20_2" text:outline-level="2"><text:bookmark-start text:name="__RefHeading___Toc71_1849558913"/>Konstanten<text:bookmark-end text:name="__RefHeading___Toc71_1849558913"/></text:h>
      <table:table table:name="Tabelle6" table:style-name="Tabelle6">
        <table:table-column table:style-name="Tabelle6.A"/>
        <table:table-column table:style-name="Tabelle6.B"/>
        <table:table-row>
          <table:table-cell office:value-type="string">
            <text:p text:style-name="Table_20_Contents"><text:span text:style-name="Source_20_Text">PI</text:span></text:p>
          </table:table-cell>
          <table:table-cell office:value-type="string">
            <text:p text:style-name="Table_20_Contents">die Zahl Pi = 3.14159E+00 vom Type <text:span text:style-name="Source_20_Text">REAL</text:span></text:p>
          </table:table-cell>
        </table:table-row>
        <table:table-row>
          <table:table-cell office:value-type="string">
            <text:p text:style-name="Table_20_Contents"><text:span text:style-name="Source_20_Text">MAXINT</text:span></text:p>
          </table:table-cell>
          <table:table-cell office:value-type="string">
            <text:p text:style-name="Table_20_Contents">die größte verfügbare ganze Zahl, d.h. 32767</text:p>
          </table:table-cell>
        </table:table-row>
        <table:table-row>
          <table:table-cell office:value-type="string">
            <text:p text:style-name="Table_20_Contents"><text:span text:style-name="Source_20_Text">TRUE, FALSE</text:span></text:p>
          </table:table-cell>
          <table:table-cell office:value-type="string">
            <text:p text:style-name="Table_20_Contents">die Konstanten vom Typ <text:span text:style-name="Source_20_Text">BOOLEAN</text:span></text:p>
          </table:table-cell>
        </table:table-row>
      </table:table>
      <text:h text:style-name="Heading_20_2" text:outline-level="2"><text:bookmark-start text:name="__RefHeading___Toc6613_1452676818"/>Typen<text:bookmark-end text:name="__RefHeading___Toc6613_1452676818"/></text:h>
      <table:table table:name="Tabelle5" table:style-name="Tabelle5">
        <table:table-column table:style-name="Tabelle5.A"/>
        <table:table-row>
          <table:table-cell office:value-type="string">
            <text:p text:style-name="Standard"><text:span text:style-name="Source_20_Text">INTEGER</text:span></text:p>
          </table:table-cell>
        </table:table-row>
        <table:table-row>
          <table:table-cell office:value-type="string">
            <text:p text:style-name="Standard"><text:span text:style-name="Source_20_Text">REAL</text:span></text:p>
          </table:table-cell>
        </table:table-row>
        <table:table-row>
          <table:table-cell office:value-type="string">
            <text:p text:style-name="Standard"><text:span text:style-name="Source_20_Text">CHAR</text:span></text:p>
          </table:table-cell>
        </table:table-row>
        <table:table-row>
          <table:table-cell office:value-type="string">
            <text:p text:style-name="Standard"><text:span text:style-name="Source_20_Text">BOOLEAN</text:span></text:p>
          </table:table-cell>
        </table:table-row>
      </table:table>
      <text:h text:style-name="P59" text:outline-level="1"><text:bookmark-start text:name="__RefHeading___Toc73_1849558913"/>Prozeduren und Funktionen<text:bookmark-end text:name="__RefHeading___Toc73_1849558913"/></text:h>
      <text:h text:style-name="Heading_20_2" text:outline-level="2"><text:bookmark-start text:name="__RefHeading___Toc75_1849558913"/>E<text:span text:style-name="T4">in- und Ausgabe-Prozeduren</text:span><text:bookmark-end text:name="__RefHeading___Toc75_1849558913"/></text:h>
      <text:h text:style-name="Heading_20_3" text:outline-level="3"><text:bookmark-start text:name="__RefHeading___Toc6615_1452676818"/><text:span text:style-name="Source_20_Text">WRITE</text:span><text:bookmark-end text:name="__RefHeading___Toc6615_1452676818"/></text:h>
      <text:p text:style-name="Text_20_body">Die Prozedur <text:span text:style-name="Source_20_Text">WRITE</text:span> wird verwendet, um Daten auf dem Bildschirm auszugeben. Wenn der auszugebende Ausdruck vom <text:span text:style-name="Source_20_Text">CHARACTER</text:span>-Typ ist, dann gibt <text:span text:style-name="Source_20_Text">WRITE (e)</text:span> den 8-bit-Wert, der durch den Wert des Ausdruckes <text:span text:style-name="Source_20_Text">e</text:span> dargestellt wird, am Bildschirm aus.</text:p>
      <text:p text:style-name="Text">Beachte:</text:p>
      <text:p text:style-name="Text_20_body"><text:span text:style-name="Source_20_Text">CHR (n)</text:span> ergibt das Steuerzeichen <text:span text:style-name="Source_20_Text">n</text:span>. <text:span text:style-name="T20">D</text:span>ie möglichen Steuerzeichen entnehmen Sie bitte den KC85-Programmierhandbüchern.</text:p>
      <text:p text:style-name="Text">Allgemein gilt:</text:p>
      <text:p text:style-name="Text_20_body"><text:span text:style-name="Source_20_Text">WRITE (P1, P2, ... Pn);</text:span> entspricht:</text:p>
      <text:p text:style-name="Preformatted_20_Text">BEGIN WRITE(P1);WRITE(P2);......;WRITE(Pn) END;</text:p>
      <text:p text:style-name="Preformatted_20_Text"/>
      <text:p text:style-name="Text_20_body">Die Parameter <text:span text:style-name="Source_20_Text">P1,P2,...Pn</text:span> können eine der folgenden Formen haben:</text:p>
      <text:p text:style-name="Text_20_body"><text:span text:style-name="Source_20_Text">(e)</text:span> oder <text:span text:style-name="Source_20_Text">(e:m)</text:span> oder <text:span text:style-name="Source_20_Text">(e:m:n)</text:span> oder <text:span text:style-name="Source_20_Text">(e:m:H)</text:span></text:p>
      <text:p text:style-name="Text_20_body">wobei <text:span text:style-name="Source_20_Text">e</text:span>, <text:span text:style-name="Source_20_Text">m</text:span>, <text:span text:style-name="Source_20_Text">n</text:span> Ausdrücke <text:span text:style-name="T20">sind </text:span>und <text:span text:style-name="Source_20_Text">H</text:span> der unmittelbare Buchstabe ist.</text:p>
      <text:p text:style-name="Text_20_body">5 Fälle sind zu betrachten:</text:p>
      <text:p text:style-name="Text">1) e ist von <text:span text:style-name="Source_20_Text">INTEGER</text:span>-Typ und <text:span text:style-name="Source_20_Text">(e)</text:span> oder <text:span text:style-name="Source_20_Text">(e:m)</text:span> wird benutzt:</text:p>
      <text:p text:style-name="Text_20_body">Der Wert von <text:span text:style-name="Source_20_Text">e</text:span> wird in einen Zeichenstring mit abschließendem Leerzeichen umgewandelt. Eine Verlängerung des Strings durch führende Leerzeichen kann durch Angabe von <text:span text:style-name="Source_20_Text">m</text:span>, welches die Gesamtlänge des Strings angibt, erreicht werden. Wenn <text:span text:style-name="Source_20_Text">m</text:span> nicht ausreichend ist, um <text:span text:style-name="Source_20_Text">e</text:span> auszugeben oder <text:span text:style-name="Source_20_Text">m</text:span> nicht vorhanden ist, dann wird <text:span text:style-name="Source_20_Text">e</text:span> vollständig mit abschließendem Leerzeichen ausgegeben und <text:span text:style-name="Source_20_Text">m</text:span> wird ignoriert. Wenn die durch <text:span text:style-name="Source_20_Text">m</text:span> festgelegte Länge der Länge von <text:span text:style-name="Source_20_Text">e</text:span> ohne nachfolgenden Leerzeichen entspricht, wird kein abschließendes Leerzeichen ausgegeben.</text:p>
      <text:p text:style-name="Text">2) <text:span text:style-name="Source_20_Text">e</text:span> ist vom <text:span text:style-name="Source_20_Text">INTEGER</text:span>-Typ und <text:span text:style-name="Source_20_Text">(e:m:H)</text:span> wird benutzt:</text:p>
      <text:p text:style-name="Text_20_body">In diesem Fall erfolgt die Ausgabe hexadezimal. Falls <text:span text:style-name="Source_20_Text">m</text:span>=1 oder <text:span text:style-name="Source_20_Text">m</text:span>=2 ist, wird der Wert <text:span text:style-name="Source_20_Text">(e MOD 16)</text:span> ausgegeben, d.h. die <text:span text:style-name="Source_20_Text">m</text:span> höchstwertigen Hex-Ziffern ausgegeben. Wenn <text:span text:style-name="Source_20_Text">m</text:span>&gt;4 ist, werden führende Leerzeichen hinzugefügt. Führende Nullen werden angefügt, wo es notwendig ist.</text:p>
      <text:p text:style-name="Text">Beispiel:</text:p>
      <text:p text:style-name="Preformatted_20_Text">WRITE (1025:m:H);</text:p>
      <text:p text:style-name="Preformatted_20_Text"/>
      <table:table table:name="Tabelle7" table:style-name="Tabelle7">
        <table:table-column table:style-name="Tabelle7.A"/>
        <table:table-column table:style-name="Tabelle7.B"/>
        <text:soft-page-break/>
        <table:table-row>
          <table:table-cell office:value-type="string">
            <text:p text:style-name="Table_20_Heading">Parameter m</text:p>
          </table:table-cell>
          <table:table-cell office:value-type="string">
            <text:p text:style-name="Table_20_Heading">Ausgabe</text:p>
          </table:table-cell>
        </table:table-row>
        <table:table-row>
          <table:table-cell office:value-type="string">
            <text:p text:style-name="Standard"><text:span text:style-name="Source_20_Text">1</text:span></text:p>
          </table:table-cell>
          <table:table-cell office:value-type="string">
            <text:p text:style-name="Standard"><text:span text:style-name="Source_20_Text">1</text:span></text:p>
          </table:table-cell>
        </table:table-row>
        <table:table-row>
          <table:table-cell office:value-type="string">
            <text:p text:style-name="Standard"><text:span text:style-name="Source_20_Text">2</text:span></text:p>
          </table:table-cell>
          <table:table-cell office:value-type="string">
            <text:p text:style-name="Standard"><text:span text:style-name="Source_20_Text">01</text:span></text:p>
          </table:table-cell>
        </table:table-row>
        <table:table-row>
          <table:table-cell office:value-type="string">
            <text:p text:style-name="Standard"><text:span text:style-name="Source_20_Text">3</text:span></text:p>
          </table:table-cell>
          <table:table-cell office:value-type="string">
            <text:p text:style-name="Standard"><text:span text:style-name="Source_20_Text">0401</text:span></text:p>
          </table:table-cell>
        </table:table-row>
        <table:table-row>
          <table:table-cell office:value-type="string">
            <text:p text:style-name="Standard"><text:span text:style-name="Source_20_Text">4</text:span></text:p>
          </table:table-cell>
          <table:table-cell office:value-type="string">
            <text:p text:style-name="Standard"><text:span text:style-name="Source_20_Text">0401</text:span></text:p>
          </table:table-cell>
        </table:table-row>
        <table:table-row>
          <table:table-cell office:value-type="string">
            <text:p text:style-name="Standard"><text:span text:style-name="Source_20_Text">5</text:span></text:p>
          </table:table-cell>
          <table:table-cell office:value-type="string">
            <text:p text:style-name="Standard"><text:span text:style-name="Source_20_Text"><text:s/>0401</text:span></text:p>
          </table:table-cell>
        </table:table-row>
      </table:table>
      <text:p text:style-name="Text_20_body"/>
      <text:p text:style-name="Text">3) <text:span text:style-name="Source_20_Text">e</text:span> ist vom <text:span text:style-name="Source_20_Text">REAL</text:span>-Typ und <text:span text:style-name="Source_20_Text">(e)</text:span>, <text:span text:style-name="Source_20_Text">(e:m)</text:span> oder <text:span text:style-name="Source_20_Text">(e:m:n)</text:span> wird benutzt</text:p>
      <text:p text:style-name="Standard"/>
      <text:p text:style-name="Text_20_body">Der Wert von <text:span text:style-name="Source_20_Text">e</text:span> wird in einen Zeichenstring, der eine reelle Zahl darstellt, umgewandelt. Das Format der Darstellung wird durch <text:span text:style-name="Source_20_Text">n</text:span> festgelegt. Falls <text:span text:style-name="Source_20_Text">n</text:span> nicht vorhanden ist, wird die Zahl in wissenschaftlicher Zahlendarstellung mit Mantisse und Exponent ausgegeben. Wenn die Zahl negativ ist, wird ein Minuszeichen vor der Mantisse, anderenfalls ein Leerzeichen ausgegeben. Die Zahl wird immer mit mindestens einer Nachkommastelle und mit maximal 5 Nachkommastellen ausgegeben. Der Exponent wird immer mit Vorzeichen notiert. Daraus folgt, dass die minimale Länge der wissenschaftlichen Darstellung 8 Zeichen beträgt. Wenn <text:span text:style-name="Source_20_Text">m</text:span> &lt; 8 ist, wird die vollständige Darstellung von 12 Zeichen genommen. Wenn 8 &lt;= <text:span text:style-name="Source_20_Text">m</text:span> &lt;= 12 ist, werden mehr oder weniger Dezimalstellen ausgegeben. Ist <text:span text:style-name="Source_20_Text">m</text:span> &gt; 12, werden führende Leerzeichen angefügt.</text:p>
      <text:p text:style-name="Text">Beispiel:</text:p>
      <text:p text:style-name="Preformatted_20_Text">WRITE(-1.23E10:m);</text:p>
      <text:p text:style-name="Preformatted_20_Text"/>
      <table:table table:name="Tabelle8" table:style-name="Tabelle8">
        <table:table-column table:style-name="Tabelle8.A"/>
        <table:table-column table:style-name="Tabelle8.B"/>
        <table:table-row>
          <table:table-cell office:value-type="string">
            <text:p text:style-name="Table_20_Heading">Parameter m</text:p>
          </table:table-cell>
          <table:table-cell office:value-type="string">
            <text:p text:style-name="Table_20_Heading">Ausgabe</text:p>
          </table:table-cell>
        </table:table-row>
        <table:table-row>
          <table:table-cell office:value-type="string">
            <text:p text:style-name="Standard"><text:span text:style-name="Source_20_Text">7</text:span></text:p>
          </table:table-cell>
          <table:table-cell office:value-type="string">
            <text:p text:style-name="Standard"><text:span text:style-name="Source_20_Text">-1.23000E+10</text:span></text:p>
          </table:table-cell>
        </table:table-row>
        <table:table-row>
          <table:table-cell office:value-type="string">
            <text:p text:style-name="Standard"><text:span text:style-name="Source_20_Text">8</text:span></text:p>
          </table:table-cell>
          <table:table-cell office:value-type="string">
            <text:p text:style-name="Standard"><text:span text:style-name="Source_20_Text">-1.2E+10</text:span></text:p>
          </table:table-cell>
        </table:table-row>
        <table:table-row>
          <table:table-cell office:value-type="string">
            <text:p text:style-name="Standard"><text:span text:style-name="Source_20_Text">10</text:span></text:p>
          </table:table-cell>
          <table:table-cell office:value-type="string">
            <text:p text:style-name="Standard"><text:span text:style-name="Source_20_Text">-1.230E+10</text:span></text:p>
          </table:table-cell>
        </table:table-row>
        <table:table-row>
          <table:table-cell office:value-type="string">
            <text:p text:style-name="Standard"><text:span text:style-name="Source_20_Text">12</text:span></text:p>
          </table:table-cell>
          <table:table-cell office:value-type="string">
            <text:p text:style-name="Standard"><text:span text:style-name="Source_20_Text">-1.23000E+10</text:span></text:p>
          </table:table-cell>
        </table:table-row>
        <table:table-row>
          <table:table-cell office:value-type="string">
            <text:p text:style-name="Standard"><text:span text:style-name="Source_20_Text">13</text:span></text:p>
          </table:table-cell>
          <table:table-cell office:value-type="string">
            <text:p text:style-name="Standard"><text:span text:style-name="Source_20_Text"><text:s/>-1.23000E+10</text:span></text:p>
          </table:table-cell>
        </table:table-row>
      </table:table>
      <text:p text:style-name="Text_20_body"/>
      <text:p text:style-name="Text_20_body">Wird die Form <text:span text:style-name="Source_20_Text">(e:m:n)</text:span> benutzt, so wird die Zahl <text:span text:style-name="Source_20_Text">e</text:span> in Festkommadarstellung ausgegeben, wobei <text:span text:style-name="Source_20_Text">n</text:span> die Zahl der Nachkommastellen angibt. Solange die Länge <text:span text:style-name="Source_20_Text">m</text:span> nicht ausreichend groß ist, werden keine führenden Leerzeichen ausgegeben. Wenn <text:span text:style-name="Source_20_Text">n</text:span>=0 ist, ist die Ausgabe eine ganze Zahl. Falls <text:span text:style-name="Source_20_Text">e</text:span> zu groß ist, um in dem angegebenen Feld dargestellt zu werden, erfolgt die Ausgabe im wissenschaftlichen Format (siehe oben).</text:p>
      <text:p text:style-name="Text">Beispiel:</text:p>
      <table:table table:name="Tabelle9" table:style-name="Tabelle9">
        <table:table-column table:style-name="Tabelle9.A"/>
        <table:table-column table:style-name="Tabelle9.B"/>
        <table:table-row>
          <table:table-cell office:value-type="string">
            <text:p text:style-name="Table_20_Heading">Quelltext</text:p>
          </table:table-cell>
          <table:table-cell office:value-type="string">
            <text:p text:style-name="Table_20_Heading">Ausgabe</text:p>
          </table:table-cell>
        </table:table-row>
        <table:table-row>
          <table:table-cell office:value-type="string">
            <text:p text:style-name="P8"><text:span text:style-name="Source_20_Text">WRITE(1E2:6:2)</text:span></text:p>
          </table:table-cell>
          <table:table-cell office:value-type="string">
            <text:p text:style-name="P8"><text:span text:style-name="Source_20_Text">100.00</text:span></text:p>
          </table:table-cell>
        </table:table-row>
        <table:table-row>
          <table:table-cell office:value-type="string">
            <text:p text:style-name="Standard"><text:span text:style-name="Source_20_Text">WRITE(1E2:8:2)</text:span></text:p>
          </table:table-cell>
          <table:table-cell office:value-type="string">
            <text:p text:style-name="Standard"><text:span text:style-name="Source_20_Text"><text:s text:c="2"/>100.00</text:span></text:p>
          </table:table-cell>
        </table:table-row>
        <table:table-row>
          <table:table-cell office:value-type="string">
            <text:p text:style-name="Standard"><text:span text:style-name="Source_20_Text">WRITE(23.455:6:1)</text:span></text:p>
          </table:table-cell>
          <table:table-cell office:value-type="string">
            <text:p text:style-name="Standard"><text:span text:style-name="Source_20_Text">23.5</text:span></text:p>
          </table:table-cell>
        </table:table-row>
        <table:table-row>
          <table:table-cell office:value-type="string">
            <text:p text:style-name="Standard"><text:span text:style-name="Source_20_Text">WRITE(23.455:4:2)</text:span></text:p>
          </table:table-cell>
          <table:table-cell office:value-type="string">
            <text:p text:style-name="Standard"><text:span text:style-name="Source_20_Text">2.34550E+01</text:span></text:p>
          </table:table-cell>
        </table:table-row>
        <table:table-row>
          <table:table-cell office:value-type="string">
            <text:p text:style-name="Standard"><text:span text:style-name="Source_20_Text">WRITE(23.455:4:0)</text:span></text:p>
          </table:table-cell>
          <table:table-cell office:value-type="string">
            <text:p text:style-name="Standard"><text:span text:style-name="Source_20_Text"><text:s text:c="2"/>23</text:span></text:p>
          </table:table-cell>
        </table:table-row>
      </table:table>
      <text:p text:style-name="Text_20_body"/>
      <text:p text:style-name="Text"><text:soft-page-break/>4) <text:span text:style-name="Source_20_Text">e</text:span> ist vom <text:span text:style-name="Source_20_Text">CHARACTER</text:span>- oder <text:span text:style-name="Source_20_Text">STRING</text:span>-Typ:</text:p>
      <text:p text:style-name="Text_20_body">Sowohl <text:span text:style-name="Source_20_Text">(e)</text:span> als auch <text:span text:style-name="Source_20_Text">(e:m)</text:span> können verwendet werden. Das Zeichen oder der String werden mit einer minimalen Länge von 1 (bei Zeichen) oder Länge der Strings (bei <text:span text:style-name="Source_20_Text">STRING</text:span>-Typen) ausgegeben. Führende Leerzeichen werden angefügt, wenn <text:span text:style-name="Source_20_Text">m</text:span> ausreichend groß ist.</text:p>
      <text:p text:style-name="Text">5) e ist von BOOLEAN-Typ:</text:p>
      <text:p text:style-name="Text_20_body"><text:span text:style-name="Source_20_Text">(e)</text:span> und <text:span text:style-name="Source_20_Text">(e:m)</text:span> können verwendet werden. '<text:span text:style-name="Source_20_Text">TRUE</text:span>' oder '<text:span text:style-name="Source_20_Text">FALSE</text:span>' werden in Abhängigkeit vom boolschen Wert <text:span text:style-name="Source_20_Text">e</text:span> ausgegeben, wobei eine minimale Länge von 4 bzw. 5 verwendet wird.</text:p>
      <text:h text:style-name="Heading_20_3" text:outline-level="3"><text:bookmark-start text:name="__RefHeading___Toc6617_1452676818"/><text:span text:style-name="Source_20_Text">WRITELN</text:span><text:bookmark-end text:name="__RefHeading___Toc6617_1452676818"/></text:h>
      <text:p text:style-name="Text_20_body">Ausgaben mittels <text:span text:style-name="Source_20_Text">WRITELN</text:span> schließen mit Zeilenvorschub/Wagenrücklauf ab, d.h. mit einem <text:span text:style-name="Source_20_Text">WRITE (CHR(13))</text:span>.</text:p>
      <text:p text:style-name="Text_20_body"><text:span text:style-name="Source_20_Text">WRITELN(P1,P2......,P3);</text:span> entspricht</text:p>
      <text:p text:style-name="Preformatted_20_Text">BEGIN WRITE(P1,P2,...,P3);WRITELN END;</text:p>
      <text:p text:style-name="Preformatted_20_Text"/>
      <text:h text:style-name="Heading_20_3" text:outline-level="3"><text:bookmark-start text:name="__RefHeading___Toc6619_1452676818"/><text:span text:style-name="Source_20_Text">READ</text:span><text:bookmark-end text:name="__RefHeading___Toc6619_1452676818"/></text:h>
      <text:p text:style-name="Text_20_body">Die Prozedur <text:span text:style-name="Source_20_Text">READ</text:span> liest Daten von der Tastatur. Dies erfolgt über einen Puffer, der sich in den Runtimes befindet. Dieser ist anfangs leer (bis auf eine Zeilenende-Markierung). Man kann sich den Zugriff auf diesen Puffer so vorstellen, dass ein Textfenster über den Puffer gelegt wird, durch welches jeweils ein Zeichen sichtbar ist. Wenn dieses Textfenster über einer Zeilenende-Markierung liegt, wird vor dem Abschluß der <text:span text:style-name="Source_20_Text">READ</text:span>-Operation eine neue Textzeile von der Tastatur in den Puffer gelesen.</text:p>
      <text:p text:style-name="Text_20_body"><text:span text:style-name="Source_20_Text">READ(V1, ....,Vn);</text:span> entspricht:</text:p>
      <text:p text:style-name="Preformatted_20_Text">BEGIN READ(V1); READ(V2);.....;READ(Vn) END;</text:p>
      <text:p text:style-name="Preformatted_20_Text"/>
      <text:p text:style-name="Text_20_body">wobei <text:span text:style-name="Source_20_Text">V1</text:span>, <text:span text:style-name="Source_20_Text">V2</text:span>, usw. vom Typ <text:span text:style-name="Source_20_Text">CHARACTER</text:span>, <text:span text:style-name="Source_20_Text">STRING</text:span>, <text:span text:style-name="Source_20_Text">INTEGER</text:span> oder <text:span text:style-name="Source_20_Text">REAL</text:span> sein müssen.</text:p>
      <text:p text:style-name="Text_20_body">4 Fälle sind zu betrachten:</text:p>
      <text:p text:style-name="Text">1) <text:span text:style-name="Source_20_Text">V</text:span> ist vom <text:span text:style-name="Source_20_Text">CHARACTER</text:span>-Typ</text:p>
      <text:p text:style-name="Text_20_body">In diesem Fall liest <text:span text:style-name="Source_20_Text">READ (V)</text:span> nur ein Zeichen aus dem Eingabepuffer und weist es <text:span text:style-name="Source_20_Text">V</text:span> zu. Wenn das Textfenster über einer Zeilenmarkierung (<text:span text:style-name="Source_20_Text">CHR (13)</text:span>) liegt, liefert die Funktion <text:span text:style-name="Source_20_Text">EOLN</text:span> den Wert <text:span text:style-name="Source_20_Text">TRUE</text:span>, und eine neue Textzeile wird von der Tastatur gelesen. Wenn anschließend eine <text:span text:style-name="Source_20_Text">READ</text:span>-Operation ausgeführt wird, wird das Textfenster über den Beginn der neuen Zeile gelegt.</text:p>
      <text:p text:style-name="Text_20_body"><text:span text:style-name="Strong_20_Emphasis">Achtung!</text:span> Nach dem Start des Programms ist <text:span text:style-name="Source_20_Text">EOLN</text:span>=<text:span text:style-name="Source_20_Text">TRUE</text:span>, d.h. falls zuerst ein <text:span text:style-name="Source_20_Text">READ</text:span> eines <text:span text:style-name="Source_20_Text">CHARACTER</text:span>-Typ erfolgt, wird ein <text:span text:style-name="Source_20_Text">CHR(13)</text:span> übergeben und daraufhin eine neue Zeile von der Tastatur gelesen. Ein anschließendes <text:span text:style-name="Source_20_Text">READ</text:span> eines <text:span text:style-name="Source_20_Text">CHARACTER</text:span>s übergibt das erste Zeichen dieser Zeile, vorausgesetzt, sie ist nicht leer. Siehe auch unter <text:span text:style-name="Source_20_Text">READLN</text:span>.</text:p>
      <text:p text:style-name="Text"><text:soft-page-break/>2) <text:span text:style-name="Source_20_Text">V</text:span> ist vom <text:span text:style-name="Source_20_Text">STRING</text:span>-Typ</text:p>
      <text:p text:style-name="Text_20_body">Wird ein String mittels <text:span text:style-name="Source_20_Text">READ</text:span> gelesen, so werden so viele Zeichen eingelesen, wie bei der Stringdefinition als Länge angegeben wurden, bzw. so viele bis <text:span text:style-name="Source_20_Text">EOLN</text:span>=<text:span text:style-name="Source_20_Text">TRUE</text:span> ist. Falls der String durch <text:span text:style-name="Source_20_Text">READ</text:span> nicht gefüllt wird (d.h. falls das Zeilenende erreicht ist, bevor das Stringende erreicht ist), wird der Rest des Strings mit <text:span text:style-name="Source_20_Text">CHR(0)</text:span> aufgefüllt. Das ermöglicht dem Programmierer die Länge des eingelesenen Strings zu ermitteln.</text:p>
      <text:p text:style-name="Text_20_body">Die unter 1) gemachte "Achtung" - Bemerkung gilt auch hier.</text:p>
      <text:p text:style-name="Text">3) <text:span text:style-name="Source_20_Text">V</text:span> ist vom <text:span text:style-name="Source_20_Text">INTEGER</text:span>-Typ</text:p>
      <text:p text:style-name="Text_20_body">In diesem Fall wird eine Reihe von Zeichen eingelesen, die eine <text:span text:style-name="Source_20_Text">INTEGER</text:span>-Zahl darstellen. Alle vorausgehenden Leerzeichen und Zeilenende-Markierungen werden übergangen. (Das bedeutet, dass <text:span text:style-name="Source_20_Text">INTEGER</text:span>-Zahlen direkt eingelesen werden können). Wenn die eingelesene Zahl größer als <text:span text:style-name="Source_20_Text">MAXINT</text:span> (32767) ist, wird der Runtime-Fehler '<text:span text:style-name="Source_20_Text">Zahl zu groß</text:span>' ausgegeben und das Programm gestoppt. Wenn das erste eingelesene Zeichen (nachdem Leerzeichen und Zeilenende-Markierung übersprungen wurden) keine Ziffer oder Vorzeichen ist, wird der Fehler '<text:span text:style-name="Source_20_Text">Zahl erwartet</text:span>' angezeigt und das Programm abgebrochen.</text:p>
      <text:p text:style-name="Text">4) <text:span text:style-name="Source_20_Text">V</text:span> ist vom <text:span text:style-name="Source_20_Text">REAL</text:span>-Typ</text:p>
      <text:p text:style-name="Text_20_body">Hierbei wird eine Zeichenfolge eingelesen, die eine <text:span text:style-name="Source_20_Text">REAL</text:span>-Zahl darstellt. Alle führenden Leerzeichen und Zeilenende-Markierungen werden übergangen, und wie bei 3) muss das erste andere Zeichen eine Ziffer oder Vorzeichen sein. Wenn die Zahl zu groß oder zu klein ist, wird der Fehler '<text:span text:style-name="Source_20_Text">Ueberlauf</text:span>' angezeigt, wenn '<text:span text:style-name="Source_20_Text">E</text:span>' ohne nachfolgendes Vorzeichen oder Ziffer eingelesen wird, tritt Fehler '<text:span text:style-name="Source_20_Text">Exponent erwartet</text:span>' auf, und wenn ein Dezimalpunkt ohne nachfolgende Ziffer gelesen wird, kommt es zum Fehler '<text:span text:style-name="Source_20_Text">Zahl erwartet</text:span>'.</text:p>
      <text:h text:style-name="Heading_20_3" text:outline-level="3"><text:bookmark-start text:name="__RefHeading___Toc6621_1452676818"/><text:span text:style-name="Source_20_Text">READLN</text:span><text:bookmark-end text:name="__RefHeading___Toc6621_1452676818"/></text:h>
      <text:p text:style-name="Text_20_body"><text:span text:style-name="Source_20_Text">READLN(V1,V2,....,Vn);</text:span> entspricht:</text:p>
      <text:p text:style-name="Preformatted_20_Text">BEGIN READ(V1,V2,....,Vn); READLN END;</text:p>
      <text:p text:style-name="Preformatted_20_Text"/>
      <text:p text:style-name="Text_20_body"><text:span text:style-name="Source_20_Text">READLN</text:span> liest einen neuen Pufferinhalt von der Tastatur. Nach der Ausführung von <text:span text:style-name="Source_20_Text">READLN</text:span> wird <text:span text:style-name="Source_20_Text">EOLN</text:span> = <text:span text:style-name="Source_20_Text">FALSE</text:span>, es sei denn, die nächste Textzeile ist leer.</text:p>
      <text:p text:style-name="Text_20_body"><text:span text:style-name="Source_20_Text">READLN</text:span> kann verwendet werden, um die zu Beginn der Programmausführung vorhandene leere Zeile zu überspringen, d.h. es wird ein neuer Puffer gelesen. Diese Maßnahme ist nützlich, wenn zu Beginn eines Programms ein <text:span text:style-name="Source_20_Text">CHARACTER</text:span> eingelesen werden soll, aber nicht notwendig, wenn Zahlen (da Zeilenende-Markierungen übersprungen werden) oder Zeichen von späteren Zeilen eingelesen werden sollen.</text:p>
      <text:h text:style-name="Heading_20_3" text:outline-level="3"><text:bookmark-start text:name="__RefHeading___Toc6623_1452676818"/><text:soft-page-break/><text:span text:style-name="Source_20_Text">PAGE</text:span><text:bookmark-end text:name="__RefHeading___Toc6623_1452676818"/></text:h>
      <text:p text:style-name="Text_20_body">Die Prozedur <text:span text:style-name="Source_20_Text">PAGE</text:span> entspricht einem <text:span text:style-name="Source_20_Text">WRITE (</text:span><text:span text:style-name="Source_20_Text"><text:span text:style-name="T21">CHR(</text:span></text:span><text:span text:style-name="Source_20_Text">12</text:span><text:span text:style-name="Source_20_Text"><text:span text:style-name="T21">)</text:span></text:span><text:span text:style-name="Source_20_Text">);</text:span> und bewirkt ein Löschen des Bildschirmes.</text:p>
      <text:h text:style-name="Heading_20_3" text:outline-level="3"><text:bookmark-start text:name="__RefHeading___Toc6625_1452676818"/><text:span text:style-name="Source_20_Text">EOLN</text:span><text:bookmark-end text:name="__RefHeading___Toc6625_1452676818"/></text:h>
      <text:p text:style-name="Text_20_body"><text:span text:style-name="Source_20_Text">EOLN</text:span> ist eine boolsche Funktion, die <text:span text:style-name="Source_20_Text">TRUE</text:span> liefert, wenn das nächste zu lesende Zeichen eine Zeilenende-Markierung (<text:span text:style-name="Source_20_Text">CHR(13)</text:span>) ist, sonst ist sie <text:span text:style-name="Source_20_Text">FALSE</text:span>.</text:p>
      <text:h text:style-name="P66" text:outline-level="3"><text:bookmark-start text:name="__RefHeading___Toc6627_1452676818"/>KEYPRESSED<text:bookmark-end text:name="__RefHeading___Toc6627_1452676818"/></text:h>
      <text:p text:style-name="P17">Als Ergebnis wird eine Variable vom Typ <text:span text:style-name="Source_20_Text">BOOLEAN</text:span> übergeben. Wenn eine Taste gedrückt wurde, ist das Ergebnis <text:span text:style-name="Source_20_Text">TRUE</text:span>, sonst <text:span text:style-name="Source_20_Text">FALSE</text:span>.</text:p>
      <text:h text:style-name="P66" text:outline-level="3"><text:bookmark-start text:name="__RefHeading___Toc6629_1452676818"/>READKBD<text:bookmark-end text:name="__RefHeading___Toc6629_1452676818"/></text:h>
      <text:p text:style-name="P17">Diese Funktion liefert ein Zeichen vom Typ <text:span text:style-name="Source_20_Text">CHAR</text:span> von der Tastatur (wartet auf Tastenbetätigung).</text:p>
      <text:h text:style-name="Heading_20_2" text:outline-level="2"><text:bookmark-start text:name="__RefHeading___Toc77_1849558913"/>K<text:span text:style-name="T4">onvertierungsfunktionen</text:span><text:bookmark-end text:name="__RefHeading___Toc77_1849558913"/></text:h>
      <text:h text:style-name="Heading_20_3" text:outline-level="3"><text:bookmark-start text:name="__RefHeading___Toc6631_1452676818"/><text:span text:style-name="Source_20_Text">TRUNC (X)</text:span><text:bookmark-end text:name="__RefHeading___Toc6631_1452676818"/></text:h>
      <text:p text:style-name="Text_20_body">Der Parameter X muss vom Typ <text:span text:style-name="Source_20_Text">REAL</text:span> oder <text:span text:style-name="Source_20_Text">INTEGER</text:span> sein. Der übergebene Wert ist die größte <text:span text:style-name="Source_20_Text">INTEGER</text:span>-Zahl, die kleiner gleich <text:span text:style-name="Source_20_Text">X</text:span> ist, wenn <text:span text:style-name="Source_20_Text">X</text:span> positiv ist bzw. die kleinste <text:span text:style-name="Source_20_Text">INTEGER</text:span>-Zahl, die größer gleich <text:span text:style-name="Source_20_Text">X</text:span> ist, wenn <text:span text:style-name="Source_20_Text">X</text:span> negativ ist.</text:p>
      <table:table table:name="Tabelle10" table:style-name="Tabelle10">
        <table:table-column table:style-name="Tabelle10.A"/>
        <table:table-column table:style-name="Tabelle10.B"/>
        <table:table-row>
          <table:table-cell office:value-type="string">
            <text:p text:style-name="Table_20_Heading">Quelltext</text:p>
          </table:table-cell>
          <table:table-cell office:value-type="string">
            <text:p text:style-name="Table_20_Heading">Ergebnis</text:p>
          </table:table-cell>
        </table:table-row>
        <table:table-row>
          <table:table-cell office:value-type="string">
            <text:p text:style-name="Standard"><text:span text:style-name="Source_20_Text">TRUNC (-1.5)</text:span></text:p>
          </table:table-cell>
          <table:table-cell office:value-type="string">
            <text:p text:style-name="Standard"><text:span text:style-name="Source_20_Text">-1</text:span></text:p>
          </table:table-cell>
        </table:table-row>
        <table:table-row>
          <table:table-cell office:value-type="string">
            <text:p text:style-name="Standard"><text:span text:style-name="Source_20_Text">TRUNC (1.9)</text:span></text:p>
          </table:table-cell>
          <table:table-cell office:value-type="string">
            <text:p text:style-name="Standard"><text:span text:style-name="Source_20_Text">1</text:span></text:p>
          </table:table-cell>
        </table:table-row>
      </table:table>
      <text:p text:style-name="Standard"/>
      <text:h text:style-name="Heading_20_3" text:outline-level="3"><text:bookmark-start text:name="__RefHeading___Toc6633_1452676818"/><text:span text:style-name="Source_20_Text">ROUND (X)</text:span><text:bookmark-end text:name="__RefHeading___Toc6633_1452676818"/></text:h>
      <text:p text:style-name="Text_20_body"><text:span text:style-name="Source_20_Text">X</text:span> muss vom Typ <text:span text:style-name="Source_20_Text">REAL</text:span> sein. Die Funktion liefert die "nächstliegende" <text:span text:style-name="Source_20_Text">INTEGER</text:span>-Zahl entsprechend den normalen Rechnungsvorschriften.</text:p>
      <table:table table:name="Tabelle11" table:style-name="Tabelle11">
        <table:table-column table:style-name="Tabelle11.A"/>
        <table:table-column table:style-name="Tabelle11.B"/>
        <table:table-row>
          <table:table-cell office:value-type="string">
            <text:p text:style-name="Table_20_Heading">Quelltext</text:p>
          </table:table-cell>
          <table:table-cell office:value-type="string">
            <text:p text:style-name="Table_20_Heading">Ergebnis</text:p>
          </table:table-cell>
        </table:table-row>
        <table:table-row>
          <table:table-cell office:value-type="string">
            <text:p text:style-name="Standard"><text:span text:style-name="Source_20_Text">ROUND (-6,5)</text:span></text:p>
          </table:table-cell>
          <table:table-cell office:value-type="string">
            <text:p text:style-name="Standard"><text:span text:style-name="Source_20_Text">-6</text:span></text:p>
          </table:table-cell>
        </table:table-row>
        <table:table-row>
          <table:table-cell office:value-type="string">
            <text:p text:style-name="P9"><text:span text:style-name="Source_20_Text">ROUND (-6.51)</text:span></text:p>
          </table:table-cell>
          <table:table-cell office:value-type="string">
            <text:p text:style-name="P9"><text:span text:style-name="Source_20_Text">-</text:span><text:span text:style-name="Source_20_Text"><text:span text:style-name="T22">7</text:span></text:span></text:p>
          </table:table-cell>
        </table:table-row>
        <table:table-row>
          <table:table-cell office:value-type="string">
            <text:p text:style-name="P9"><text:span text:style-name="Source_20_Text">ROUND (11.7)</text:span></text:p>
          </table:table-cell>
          <table:table-cell office:value-type="string">
            <text:p text:style-name="P9"><text:span text:style-name="Source_20_Text">12</text:span></text:p>
          </table:table-cell>
        </table:table-row>
        <table:table-row>
          <table:table-cell office:value-type="string">
            <text:p text:style-name="P9"><text:span text:style-name="Source_20_Text">ROUND (23.5)</text:span></text:p>
          </table:table-cell>
          <table:table-cell office:value-type="string">
            <text:p text:style-name="P9"><text:span text:style-name="Source_20_Text">24</text:span></text:p>
          </table:table-cell>
        </table:table-row>
      </table:table>
      <text:p text:style-name="Standard"/>
      <text:h text:style-name="Heading_20_3" text:outline-level="3"><text:bookmark-start text:name="__RefHeading___Toc6635_1452676818"/><text:span text:style-name="Source_20_Text">ENTIER (X)</text:span><text:bookmark-end text:name="__RefHeading___Toc6635_1452676818"/></text:h>
      <text:p text:style-name="Text_20_body"><text:span text:style-name="Source_20_Text">X</text:span> muss <text:span text:style-name="Source_20_Text">REAL</text:span> oder <text:span text:style-name="Source_20_Text">INTEGER</text:span> sein. <text:span text:style-name="Source_20_Text">ENTIER</text:span> liefert die größte <text:span text:style-name="Source_20_Text">INTEGER</text:span>-Zahl, die kleiner gleich <text:span text:style-name="Source_20_Text">X</text:span> ist.</text:p>
      <table:table table:name="Tabelle12" table:style-name="Tabelle12">
        <table:table-column table:style-name="Tabelle12.A"/>
        <table:table-column table:style-name="Tabelle12.B"/>
        <text:soft-page-break/>
        <table:table-row>
          <table:table-cell office:value-type="string">
            <text:p text:style-name="Table_20_Heading">Quelltext</text:p>
          </table:table-cell>
          <table:table-cell office:value-type="string">
            <text:p text:style-name="Table_20_Heading">Ergebnis</text:p>
          </table:table-cell>
        </table:table-row>
        <table:table-row>
          <table:table-cell office:value-type="string">
            <text:p text:style-name="P9"><text:span text:style-name="Source_20_Text">ENTIER (-6.5)</text:span></text:p>
          </table:table-cell>
          <table:table-cell office:value-type="string">
            <text:p text:style-name="P9"><text:span text:style-name="Source_20_Text">-7</text:span></text:p>
          </table:table-cell>
        </table:table-row>
        <table:table-row>
          <table:table-cell office:value-type="string">
            <text:p text:style-name="P9"><text:span text:style-name="Source_20_Text">ENTIER (11.7)</text:span></text:p>
          </table:table-cell>
          <table:table-cell office:value-type="string">
            <text:p text:style-name="P9"><text:span text:style-name="Source_20_Text">11</text:span></text:p>
          </table:table-cell>
        </table:table-row>
      </table:table>
      <text:p text:style-name="Standard"/>
      <text:h text:style-name="Heading_20_3" text:outline-level="3"><text:bookmark-start text:name="__RefHeading___Toc6637_1452676818"/><text:span text:style-name="Source_20_Text">ORD (X)</text:span><text:bookmark-end text:name="__RefHeading___Toc6637_1452676818"/></text:h>
      <text:p text:style-name="Text_20_body"><text:span text:style-name="Source_20_Text">X</text:span> kann jeder skalare Typ außer <text:span text:style-name="Source_20_Text">REAL</text:span> sein. Der übergebene Wert ist eine <text:span text:style-name="Source_20_Text">INTEGER</text:span>-Zahl <text:span text:style-name="T11">–</text:span> die Ordnungszahl von <text:span text:style-name="Source_20_Text">X</text:span> innerhalb der Menge (<text:span text:style-name="Source_20_Text">SET</text:span>), die den Typ von <text:span text:style-name="Source_20_Text">X</text:span> festlegt.</text:p>
      <text:p text:style-name="Text_20_body">Wenn <text:span text:style-name="Source_20_Text">X</text:span> vom <text:span text:style-name="Source_20_Text">INTEGER</text:span>-Typ ist, ist <text:span text:style-name="Source_20_Text">ORD(x)</text:span>=<text:span text:style-name="Source_20_Text">x</text:span>; das sollte normalerweise vermieden werden.</text:p>
      <table:table table:name="Tabelle13" table:style-name="Tabelle13">
        <table:table-column table:style-name="Tabelle13.A"/>
        <table:table-column table:style-name="Tabelle13.B"/>
        <table:table-row>
          <table:table-cell office:value-type="string">
            <text:p text:style-name="Table_20_Heading">Quelltext</text:p>
          </table:table-cell>
          <table:table-cell office:value-type="string">
            <text:p text:style-name="Table_20_Heading">Ergebnis</text:p>
          </table:table-cell>
        </table:table-row>
        <table:table-row>
          <table:table-cell office:value-type="string">
            <text:p text:style-name="Standard"><text:span text:style-name="Source_20_Text">ORD ('a')</text:span></text:p>
          </table:table-cell>
          <table:table-cell office:value-type="string">
            <text:p text:style-name="Standard"><text:span text:style-name="Source_20_Text">97</text:span></text:p>
          </table:table-cell>
        </table:table-row>
      </table:table>
      <text:p text:style-name="Standard"/>
      <text:h text:style-name="Heading_20_3" text:outline-level="3"><text:bookmark-start text:name="__RefHeading___Toc6639_1452676818"/><text:span text:style-name="Source_20_Text">CHR(X)</text:span><text:bookmark-end text:name="__RefHeading___Toc6639_1452676818"/></text:h>
      <text:p text:style-name="Text_20_body"><text:span text:style-name="Source_20_Text">X</text:span> muss <text:span text:style-name="Source_20_Text">INTEGER</text:span> sein. <text:span text:style-name="Source_20_Text">CHR</text:span> liefert einen <text:span text:style-name="Source_20_Text">CHARACTER</text:span>, der dem ASCII-Wert von <text:span text:style-name="Source_20_Text">X</text:span> entspricht.</text:p>
      <table:table table:name="Tabelle14" table:style-name="Tabelle14">
        <table:table-column table:style-name="Tabelle14.A"/>
        <table:table-column table:style-name="Tabelle14.B"/>
        <table:table-row>
          <table:table-cell office:value-type="string">
            <text:p text:style-name="Table_20_Heading">Quelltext</text:p>
          </table:table-cell>
          <table:table-cell office:value-type="string">
            <text:p text:style-name="Table_20_Heading">Ergebnis</text:p>
          </table:table-cell>
        </table:table-row>
        <table:table-row>
          <table:table-cell office:value-type="string">
            <text:p text:style-name="Standard"><text:span text:style-name="Source_20_Text">CHR (49)</text:span></text:p>
          </table:table-cell>
          <table:table-cell office:value-type="string">
            <text:p text:style-name="Standard"><text:span text:style-name="Source_20_Text">'1'</text:span></text:p>
          </table:table-cell>
        </table:table-row>
        <table:table-row>
          <table:table-cell office:value-type="string">
            <text:p text:style-name="Standard"><text:span text:style-name="Source_20_Text">CHR (91)</text:span></text:p>
          </table:table-cell>
          <table:table-cell office:value-type="string">
            <text:p text:style-name="Standard"><text:span text:style-name="Source_20_Text">'['</text:span></text:p>
          </table:table-cell>
        </table:table-row>
      </table:table>
      <text:p text:style-name="Standard"/>
      <text:h text:style-name="Heading_20_2" text:outline-level="2"><text:bookmark-start text:name="__RefHeading___Toc79_1849558913"/>A<text:span text:style-name="T4">rithmetische Funktionen</text:span><text:bookmark-end text:name="__RefHeading___Toc79_1849558913"/></text:h>
      <text:p text:style-name="Text_20_body">In diesem Abschnitt muss der Parameter <text:span text:style-name="Source_20_Text">X</text:span> immer vom Typ <text:span text:style-name="Source_20_Text">REAL</text:span> oder <text:span text:style-name="Source_20_Text">INTEGER</text:span> sein.</text:p>
      <text:h text:style-name="Heading_20_3" text:outline-level="3"><text:bookmark-start text:name="__RefHeading___Toc6641_1452676818"/><text:span text:style-name="Source_20_Text">ABS(X)</text:span><text:bookmark-end text:name="__RefHeading___Toc6641_1452676818"/></text:h>
      <text:p text:style-name="Text_20_body">liefert den Absolutwert von <text:span text:style-name="Source_20_Text">X</text:span> (d.h. <text:span text:style-name="Source_20_Text">ABS(-4.5)</text:span> = 4.5) Das Ergebnis ist vom gleichem Typ wie <text:span text:style-name="Source_20_Text">X</text:span>.</text:p>
      <text:h text:style-name="Heading_20_3" text:outline-level="3"><text:bookmark-start text:name="__RefHeading___Toc6643_1452676818"/><text:span text:style-name="Source_20_Text">SQR(X)</text:span><text:bookmark-end text:name="__RefHeading___Toc6643_1452676818"/></text:h>
      <text:p text:style-name="Text_20_body">liefert den Wert <text:span text:style-name="Source_20_Text">X*X</text:span>, d.h. das Quadrat von <text:span text:style-name="Source_20_Text">X</text:span>. Das Resultat ist vom gleichen Typ wie <text:span text:style-name="Source_20_Text">X</text:span>.</text:p>
      <text:h text:style-name="Heading_20_3" text:outline-level="3"><text:bookmark-start text:name="__RefHeading___Toc6645_1452676818"/><text:span text:style-name="Source_20_Text">SQRT(X)</text:span><text:bookmark-end text:name="__RefHeading___Toc6645_1452676818"/></text:h>
      <text:p text:style-name="Text_20_body">liefert die Wurzel aus <text:span text:style-name="Source_20_Text">X</text:span>. Das Resultat ist immer vom Typ <text:span text:style-name="Source_20_Text">REAL</text:span>. Ein '<text:span text:style-name="Source_20_Text">mathematischer Fehler</text:span>' tritt auf, wenn <text:span text:style-name="Source_20_Text">X</text:span> negativ ist.</text:p>
      <text:h text:style-name="Heading_20_3" text:outline-level="3"><text:bookmark-start text:name="__RefHeading___Toc6647_1452676818"/><text:span text:style-name="Source_20_Text">FRAC(X)</text:span><text:bookmark-end text:name="__RefHeading___Toc6647_1452676818"/></text:h>
      <text:p text:style-name="Text_20_body">liefert den gebrochenen Anteil von <text:span text:style-name="Source_20_Text">X</text:span>.</text:p>
      <table:table table:name="Tabelle15" table:style-name="Tabelle15">
        <table:table-column table:style-name="Tabelle15.A"/>
        <table:table-column table:style-name="Tabelle15.B"/>
        <table:table-row>
          <table:table-cell office:value-type="string">
            <text:p text:style-name="Table_20_Heading">Quelltext</text:p>
          </table:table-cell>
          <table:table-cell office:value-type="string">
            <text:p text:style-name="Table_20_Heading">Ergebnis</text:p>
          </table:table-cell>
        </table:table-row>
        <table:table-row>
          <table:table-cell office:value-type="string">
            <text:p text:style-name="Standard"><text:span text:style-name="Source_20_Text">FRAC (X)</text:span></text:p>
          </table:table-cell>
          <table:table-cell office:value-type="string">
            <text:p text:style-name="Standard"><text:span text:style-name="Source_20_Text">X - ENTIER(X)</text:span></text:p>
          </table:table-cell>
        </table:table-row>
        <table:table-row>
          <table:table-cell office:value-type="string">
            <text:p text:style-name="Standard"><text:span text:style-name="Source_20_Text">FRAC (1.5)</text:span></text:p>
          </table:table-cell>
          <table:table-cell office:value-type="string">
            <text:p text:style-name="Standard"><text:span text:style-name="Source_20_Text">0.5</text:span></text:p>
          </table:table-cell>
        </table:table-row>
        <table:table-row>
          <table:table-cell office:value-type="string">
            <text:p text:style-name="Standard"><text:span text:style-name="Source_20_Text">FRAC (-12.56)</text:span></text:p>
          </table:table-cell>
          <table:table-cell office:value-type="string">
            <text:p text:style-name="Standard"><text:span text:style-name="Source_20_Text">0.44</text:span></text:p>
          </table:table-cell>
        </table:table-row>
      </table:table>
      <text:p text:style-name="Standard"/>
      <text:h text:style-name="Heading_20_3" text:outline-level="3"><text:bookmark-start text:name="__RefHeading___Toc6649_1452676818"/><text:soft-page-break/><text:span text:style-name="Source_20_Text">SIN(X)</text:span><text:bookmark-end text:name="__RefHeading___Toc6649_1452676818"/></text:h>
      <text:p text:style-name="P10">liefert den Sinus von <text:span text:style-name="Source_20_Text">X</text:span>. <text:span text:style-name="Source_20_Text">X</text:span> wird im Bogenmaß (radian) angegeben. Das Resultat ist immer <text:span text:style-name="Source_20_Text">REAL</text:span>.</text:p>
      <text:h text:style-name="Heading_20_3" text:outline-level="3"><text:bookmark-start text:name="__RefHeading___Toc6651_1452676818"/><text:span text:style-name="Source_20_Text">COS(X)</text:span><text:bookmark-end text:name="__RefHeading___Toc6651_1452676818"/></text:h>
      <text:p text:style-name="P11">liefert den Cosinus von <text:span text:style-name="Source_20_Text">X</text:span>, weiter wie <text:span text:style-name="Source_20_Text">SIN</text:span></text:p>
      <text:h text:style-name="Heading_20_3" text:outline-level="3"><text:bookmark-start text:name="__RefHeading___Toc6653_1452676818"/><text:span text:style-name="Source_20_Text">TAN(X)</text:span><text:bookmark-end text:name="__RefHeading___Toc6653_1452676818"/></text:h>
      <text:p text:style-name="Text_20_body">liefert den Tangens von <text:span text:style-name="Source_20_Text">X</text:span>, weiter wie <text:span text:style-name="Source_20_Text">SIN</text:span></text:p>
      <text:h text:style-name="Heading_20_3" text:outline-level="3"><text:bookmark-start text:name="__RefHeading___Toc6655_1452676818"/><text:span text:style-name="Source_20_Text">ARCTAN(X)</text:span><text:bookmark-end text:name="__RefHeading___Toc6655_1452676818"/></text:h>
      <text:p text:style-name="Text_20_body">liefert den Winkel im Bogenmaß, dessen Tangens gleich <text:span text:style-name="Source_20_Text">X</text:span> ist. <text:s/>Das Ergebnis ist <text:span text:style-name="Source_20_Text">REAL</text:span>.</text:p>
      <text:h text:style-name="Heading_20_3" text:outline-level="3"><text:bookmark-start text:name="__RefHeading___Toc6657_1452676818"/><text:span text:style-name="Source_20_Text">EXP(X)</text:span><text:bookmark-end text:name="__RefHeading___Toc6657_1452676818"/></text:h>
      <text:p text:style-name="Text_20_body">liefert den Wert e<text:span text:style-name="T23">X</text:span> (mit e=2.71828). Das Resultat ist <text:span text:style-name="Source_20_Text">REAL</text:span>.</text:p>
      <text:h text:style-name="Heading_20_3" text:outline-level="3"><text:bookmark-start text:name="__RefHeading___Toc6659_1452676818"/><text:span text:style-name="Source_20_Text">LN(X)</text:span><text:bookmark-end text:name="__RefHeading___Toc6659_1452676818"/></text:h>
      <text:p text:style-name="Text_20_body">liefert den natürlichen Logarithmus von <text:span text:style-name="Source_20_Text">X</text:span>. Das Resultat ist <text:span text:style-name="Source_20_Text">REAL</text:span>. Wenn <text:span text:style-name="Source_20_Text">X</text:span> kleiner gleich Null ist, kommt es zum Fehler '<text:span text:style-name="Source_20_Text">mathematischer Fehler</text:span>'.</text:p>
      <text:h text:style-name="P65" text:outline-level="2"><text:bookmark-start text:name="__RefHeading___Toc81_1849558913"/>Dynamischer Speicher<text:bookmark-end text:name="__RefHeading___Toc81_1849558913"/></text:h>
      <text:h text:style-name="Heading_20_3" text:outline-level="3"><text:bookmark-start text:name="__RefHeading___Toc6661_1452676818"/><text:span text:style-name="Source_20_Text">NEW(p)</text:span><text:bookmark-end text:name="__RefHeading___Toc6661_1452676818"/></text:h>
      <text:p text:style-name="Text_20_body">Mittels <text:span text:style-name="Source_20_Text">NEW(p)</text:span> wird dynamischen Variablen Speicherplatz zugewiesen. <text:span text:style-name="Source_20_Text">p</text:span> ist eine Zeiger-Variable, und nachdem <text:span text:style-name="Source_20_Text">NEW(p)</text:span> ausgeführt wurde, enthält <text:span text:style-name="Source_20_Text">p</text:span> die Adresse der neu zugewiesenen dynamischen Variablen. Der Typ der dynamischen Variablen ist der gleiche Typ wie der der Zeiger-Variablen <text:span text:style-name="Source_20_Text">p</text:span>, und dies kann jeder Typ sein. Um auf die dynamische Variable zuzugreifen, wird <text:span text:style-name="T24">p </text:span>benutzt. Um den Speicherplatz wieder freizugeben, werden die Prozeduren <text:span text:style-name="Source_20_Text">MARK</text:span> &amp; <text:span text:style-name="Source_20_Text">RELEASE</text:span> benutzt (s. unten).</text:p>
      <text:h text:style-name="Heading_20_3" text:outline-level="3"><text:bookmark-start text:name="__RefHeading___Toc6663_1452676818"/><text:span text:style-name="Source_20_Text">MARK(v</text:span><text:span text:style-name="Source_20_Text"><text:span text:style-name="T25">1</text:span></text:span><text:span text:style-name="Source_20_Text">)</text:span><text:bookmark-end text:name="__RefHeading___Toc6663_1452676818"/></text:h>
      <text:p text:style-name="Text_20_body">Die Prozedur sichert den Zustand der Menge ("heap") der dynamischen Variablen in der Zeigervariablen <text:span text:style-name="Source_20_Text">v</text:span><text:span text:style-name="Source_20_Text"><text:span text:style-name="T25">1</text:span></text:span>. Der Zustand der Menge, wie sie zum Zeitpunkt der Ausführung von <text:span text:style-name="Source_20_Text">MARK</text:span> vorlag, kann durch die Prozedur <text:span text:style-name="Source_20_Text">RELEASE</text:span> (s. unte<text:span text:style-name="T25">n</text:span>) wieder hergestellt werden. Der Typ der Variablen, auf die <text:span text:style-name="Source_20_Text">v1</text:span> zeigt, ist gleichgültig, da <text:span text:style-name="Source_20_Text">v</text:span><text:span text:style-name="Source_20_Text"><text:span text:style-name="T25">1</text:span></text:span> nur mit <text:span text:style-name="Source_20_Text">MARK</text:span> &amp; <text:span text:style-name="Source_20_Text">RELEASE</text:span> verwendet werden darf, <text:span text:style-name="Emphasis">niemals mit </text:span><text:span text:style-name="Source_20_Text"><text:span text:style-name="T13">NEW</text:span></text:span>.</text:p>
      <text:h text:style-name="Heading_20_3" text:outline-level="3"><text:bookmark-start text:name="__RefHeading___Toc6665_1452676818"/><text:soft-page-break/><text:span text:style-name="Source_20_Text">RELEASE(v</text:span><text:span text:style-name="Source_20_Text"><text:span text:style-name="T25">1</text:span></text:span><text:span text:style-name="Source_20_Text">)</text:span><text:bookmark-end text:name="__RefHeading___Toc6665_1452676818"/></text:h>
      <text:p text:style-name="Text_20_body">Durch diese Prozedur wird vom Ende des Bereichs der dynamischen Variablen her Speicherplatz für dynamische Variable freigegeben. Es wird wieder der Zustand hergestellt, der zum Zeitpunkt der Ausführung von <text:span text:style-name="Source_20_Text">MARK(v</text:span><text:span text:style-name="Source_20_Text"><text:span text:style-name="T25">1</text:span></text:span><text:span text:style-name="Source_20_Text">)</text:span> bestand, d.h. alle später erzeugten dynamischen Variablen werden zerstört.</text:p>
      <text:h text:style-name="Heading_20_2" text:outline-level="2"><text:bookmark-start text:name="__RefHeading___Toc6667_1452676818"/>Systemnahe Routinen<text:bookmark-end text:name="__RefHeading___Toc6667_1452676818"/></text:h>
      <text:h text:style-name="Heading_20_3" text:outline-level="3"><text:bookmark-start text:name="__RefHeading___Toc6669_1452676818"/><text:span text:style-name="Source_20_Text">INLINE(C1,C2,C3,.....)</text:span><text:bookmark-end text:name="__RefHeading___Toc6669_1452676818"/></text:h>
      <text:p text:style-name="Text_20_body">Diese Prozedur erlaubt das Einfügen von Z-80 Maschinencode in das Pascal-Programm. Die Werte (<text:span text:style-name="Source_20_Text">C1 MOD 256</text:span>, <text:span text:style-name="Source_20_Text">C2 MOD 256</text:span>,...) werden an dieser Stelle (Adresse, an der sich der Compiler gerade befindet) in das Objekt-Programm einfügt. <text:span text:style-name="Source_20_Text">C1</text:span>, <text:span text:style-name="Source_20_Text">C2</text:span>, <text:span text:style-name="Source_20_Text">C3</text:span>, usw. sind <text:span text:style-name="Source_20_Text">INTEGER</text:span>-Konstanten.</text:p>
      <text:h text:style-name="Heading_20_3" text:outline-level="3"><text:bookmark-start text:name="__RefHeading___Toc6671_1452676818"/><text:span text:style-name="Source_20_Text">USER(V)</text:span><text:bookmark-end text:name="__RefHeading___Toc6671_1452676818"/></text:h>
      <text:p text:style-name="P13"><text:span text:style-name="Source_20_Text">V</text:span> ist ein <text:span text:style-name="Source_20_Text">INTEGER</text:span>-Argument. Die Prozedur bewirkt den Aufruf eines Maschinenprogramms an der Adresse <text:span text:style-name="Source_20_Text">V</text:span>. Da KC-PASCAL <text:span text:style-name="Source_20_Text">INTEGER</text:span>-Zahlen in Zweierkomplement-Form bearbeitet, müssen Adressen, die größer als 7FFFh (32767) sind, als negative Zahlen eingegeben werden. Z.B.: </text:p>
      <text:p text:style-name="P13">0C000H ist -16384 und somit bewirkt <text:span text:style-name="Source_20_Text">USER(-16384)</text:span> einen Aufruf an der Speicherstelle 0C000H.</text:p>
      <text:p text:style-name="Standard">Wenn Konstanten verwendet werden, um Aufrufe zu erzeugen, ist es also einfacher, hexadezimale Zahlen zu verwenden. Die aufgerufene Routine muss mit einem Z-80 RET-Befehl (0C9H) enden und darf den Wert im IX-Register nicht verändern.</text:p>
      <text:h text:style-name="Heading_20_3" text:outline-level="3"><text:bookmark-start text:name="__RefHeading___Toc6673_1452676818"/><text:span text:style-name="Source_20_Text">HALT</text:span><text:bookmark-end text:name="__RefHeading___Toc6673_1452676818"/></text:h>
      <text:p text:style-name="P12">Die Prozedur stoppt die Programmausführung mit der Meldung '<text:span text:style-name="Source_20_Text">Halt bei PC=XXXX</text:span>', wobei <text:span text:style-name="Source_20_Text"><text:span text:style-name="T25">XXXX</text:span></text:span> die hexadezimale Adresse darstellt, an der das <text:span text:style-name="Source_20_Text">HALT</text:span> ausgegeben wurde. Zusammen mit dem Compilerlisting kann <text:span text:style-name="Source_20_Text">HALT</text:span> verwendet werden, um festzustellen, welcher von zwei oder mehr Programmzweigen durchlaufen wurde, es wird also normalerweise bei der Fehlersuche benutzt.</text:p>
      <text:h text:style-name="Heading_20_3" text:outline-level="3"><text:bookmark-start text:name="__RefHeading___Toc6675_1452676818"/><text:span text:style-name="Source_20_Text">POKE(X,V)</text:span><text:bookmark-end text:name="__RefHeading___Toc6675_1452676818"/></text:h>
      <text:p text:style-name="Standard"><text:span text:style-name="Source_20_Text">POKE</text:span> schreibt den Ausdruck <text:span text:style-name="Source_20_Text">V</text:span> angefangen von der Adresse <text:span text:style-name="Source_20_Text">X</text:span> in den Speicher. <text:span text:style-name="Source_20_Text">X</text:span> ist vom <text:span text:style-name="Source_20_Text">INTEGER</text:span>-Typ und <text:span text:style-name="Source_20_Text">V</text:span> kann von jedem Typ außer <text:span text:style-name="Source_20_Text">SET</text:span> sein.</text:p>
      <text:p text:style-name="Text">Beispiele:</text:p>
      <text:p text:style-name="Text_20_body"><text:span text:style-name="Source_20_Text"><text:s/>POKE(#6000,'A')</text:span> schreibt #41 an Adresse #6000</text:p>
      <text:p text:style-name="Text_20_body"><text:span text:style-name="Source_20_Text"><text:s/>POKE (-16384,3.6E3)</text:span> schreibt 00 0B 80 70 (in Hex) ab Adresse #C000</text:p>
      <text:h text:style-name="P66" text:outline-level="3"><text:bookmark-start text:name="__RefHeading___Toc6677_1452676818"/><text:soft-page-break/><text:span text:style-name="Source_20_Text">PEEK(X,T)</text:span><text:bookmark-end text:name="__RefHeading___Toc6677_1452676818"/></text:h>
      <text:p text:style-name="P17"><text:span text:style-name="Source_20_Text">X</text:span> stellt eine Speicheradresse als <text:span text:style-name="Source_20_Text">INTEGER</text:span>-Zahl dar. <text:span text:style-name="Source_20_Text">T</text:span> ist der Typ, den die Funktion liefern soll (jeder Typ ist möglich). <text:span text:style-name="Source_20_Text">PEEK</text:span> wird benutzt, um Daten aus dem Speicher zu lesen. Bei allen <text:span text:style-name="Source_20_Text">PEEK</text:span>- und <text:span text:style-name="Source_20_Text">POKE</text:span>-Operationen werden Daten in der KC-PASCAL Darstellung gelesen bzw. geschrieben.</text:p>
      <text:p text:style-name="P17"><text:span text:style-name="T28">z</text:span>. B.: Wenn der Speicher ab der Adresse <text:span text:style-name="Source_20_Text">#6000</text:span> die HEX-Bytes <text:span text:style-name="Source_20_Text">50 61 73 63 61 6C</text:span> enthält, liefern verschiedene Peeks:</text:p>
      <table:table table:name="Tabelle16" table:style-name="Tabelle16">
        <table:table-column table:style-name="Tabelle16.A"/>
        <table:table-column table:style-name="Tabelle16.B"/>
        <table:table-row>
          <table:table-cell office:value-type="string">
            <text:p text:style-name="P16">Quellcode</text:p>
          </table:table-cell>
          <table:table-cell office:value-type="string">
            <text:p text:style-name="P16">Ergebnis</text:p>
          </table:table-cell>
        </table:table-row>
        <table:table-row>
          <table:table-cell office:value-type="string">
            <text:p text:style-name="P15"><text:span text:style-name="Source_20_Text">WRITE(PEEK(#6000,ARRAY[1..6] OF CHAR))</text:span></text:p>
          </table:table-cell>
          <table:table-cell office:value-type="string">
            <text:p text:style-name="P15"><text:span text:style-name="Source_20_Text">'PASCAL'</text:span></text:p>
          </table:table-cell>
        </table:table-row>
        <table:table-row>
          <table:table-cell office:value-type="string">
            <text:p text:style-name="P15"><text:span text:style-name="Source_20_Text">WRITE(PEEK(#6000,CHAR))</text:span></text:p>
          </table:table-cell>
          <table:table-cell office:value-type="string">
            <text:p text:style-name="P15"><text:span text:style-name="Source_20_Text">'P'</text:span></text:p>
          </table:table-cell>
        </table:table-row>
        <table:table-row>
          <table:table-cell office:value-type="string">
            <text:p text:style-name="P15"><text:span text:style-name="Source_20_Text">WRITE(PEEK(#6000,INTEGER))</text:span></text:p>
          </table:table-cell>
          <table:table-cell office:value-type="string">
            <text:p text:style-name="P15"><text:span text:style-name="Source_20_Text">24912</text:span></text:p>
          </table:table-cell>
        </table:table-row>
        <table:table-row>
          <table:table-cell office:value-type="string">
            <text:p text:style-name="P15"><text:span text:style-name="Source_20_Text">WRITE(PEEK(#6000,REAL))</text:span></text:p>
          </table:table-cell>
          <table:table-cell office:value-type="string">
            <text:p text:style-name="P15"><text:span text:style-name="Source_20_Text">2.46227E+29</text:span></text:p>
          </table:table-cell>
        </table:table-row>
      </table:table>
      <text:p text:style-name="P15"/>
      <text:h text:style-name="P66" text:outline-level="3"><text:bookmark-start text:name="__RefHeading___Toc6679_1452676818"/><text:span text:style-name="Source_20_Text">OUT(P,C)</text:span><text:bookmark-end text:name="__RefHeading___Toc6679_1452676818"/></text:h>
      <text:p text:style-name="P17">Diese Prozedur spricht unmittelbar den Z-80-Output-Port an, ohne dass <text:span text:style-name="Source_20_Text">INLINE</text:span> benutzt werden muss. Der Wert des <text:span text:style-name="Source_20_Text">INTEGER</text:span>-Parameters <text:span text:style-name="Source_20_Text">P</text:span> wird in das BC-Register und der <text:span text:style-name="Source_20_Text">CHARACTER</text:span>-Parameter <text:span text:style-name="Source_20_Text">C</text:span> in das A-Register geladen, dann wird der Assembler-Befehl <text:span text:style-name="Source_20_Text">OUT(C), A</text:span> ausgeführt.</text:p>
      <text:p text:style-name="P17">z.B.: <text:span text:style-name="Source_20_Text">OUT(l,'A')</text:span> gibt das Zeichen '<text:span text:style-name="Source_20_Text">A</text:span>' an den Z-80 Port <text:span text:style-name="Source_20_Text">l</text:span> aus.</text:p>
      <text:h text:style-name="P66" text:outline-level="3"><text:bookmark-start text:name="__RefHeading___Toc6681_1452676818"/><text:span text:style-name="Source_20_Text">INP(P)</text:span><text:bookmark-end text:name="__RefHeading___Toc6681_1452676818"/></text:h>
      <text:p text:style-name="P17">Mittels <text:span text:style-name="Source_20_Text">INP</text:span> läßt sich der Z80-Input-Port (U880) direkt (ohne Benutzung von <text:span text:style-name="Source_20_Text">INLINE</text:span>) ansprechen. Der Wert von <text:span text:style-name="Source_20_Text">P</text:span> wird ins BC-Register geladen. Das <text:span text:style-name="Source_20_Text">CHARACTER</text:span>-Resultat wird dann durch Ausführung des Assembler-Befehls <text:span text:style-name="Source_20_Text">IN A,(C)</text:span> erhalten.</text:p>
      <text:h text:style-name="Heading_20_2" text:outline-level="2"><text:bookmark-start text:name="__RefHeading___Toc6683_1452676818"/>Datei-Routinen<text:bookmark-end text:name="__RefHeading___Toc6683_1452676818"/></text:h>
      <text:h text:style-name="P66" text:outline-level="3"><text:bookmark-start text:name="__RefHeading___Toc6685_1452676818"/><text:span text:style-name="Source_20_Text">TOUT(NAME,START,SIZE)</text:span><text:bookmark-end text:name="__RefHeading___Toc6685_1452676818"/></text:h>
      <text:p text:style-name="P14">Mit <text:span text:style-name="Source_20_Text">TOUT</text:span> werden Variablen auf Band gespeichert. Der <text:span text:style-name="Source_20_Text">NAME</text:span> ist vom Typ <text:span text:style-name="Source_20_Text">ARRAY[1...8] OF CHAR</text:span>. Es werden <text:span text:style-name="Source_20_Text">SIZE</text:span> (=Anzahl) Bytes aus dem Speicher, angefangen von Adresse <text:span text:style-name="Source_20_Text">START</text:span>, abgespeichert. Diese beiden Parameter sind vom Typ <text:span text:style-name="Source_20_Text">INTEGER</text:span>. Um z.B. die Variable <text:span text:style-name="Source_20_Text">V</text:span> unter dem Namen '<text:span text:style-name="Source_20_Text">VAR</text:span>' zu speichern, ist zu schreiben:</text:p>
      <text:p text:style-name="Preformatted_20_Text">TOUT('VAR',ADDR(V),SIZE(V))</text:p>
      <text:p text:style-name="Preformatted_20_Text"/>
      <text:p text:style-name="Text_20_body">Die Benutzung von konkreten Speicheradressen ermöglicht dem Programmierer mehr Flexibilität als nur die Möglichkeiten, Arrays zu speichern. Wenn ein System beispielsweise mit mehreren Bildschirminhalten (memory mapped screen) arbeitet, können ganze Bildschirminhalte unmittelbar gesichert werden.</text:p>
      <text:h text:style-name="Heading_20_3" text:outline-level="3"><text:bookmark-start text:name="__RefHeading___Toc6687_1452676818"/><text:soft-page-break/><text:span text:style-name="Source_20_Text">TIN(NAME, START)</text:span><text:bookmark-end text:name="__RefHeading___Toc6687_1452676818"/></text:h>
      <text:p text:style-name="Text_20_body">Mit dieser Prozedur können durch <text:span text:style-name="Source_20_Text">TOUT</text:span> gesicherte Variablen usw. wieder geladen werden. Für die Typen von <text:span text:style-name="Source_20_Text">NAME</text:span> und <text:span text:style-name="Source_20_Text">START</text:span> gilt das oben gesagte. Das Band wird nach dem File mit dem Namen <text:span text:style-name="Source_20_Text">NAME</text:span> abgesucht ('<text:span text:style-name="Source_20_Text">?</text:span>' für beliebige Zeichen ist zugelassen), welches dann ab der Adresse <text:span text:style-name="Source_20_Text">START</text:span> eingelesen wird. Die Anzahl der zu ladenden Bytes wird vom Band entnommen (entspricht den gesicherten). </text:p>
      <text:p text:style-name="Text_20_body"><text:span text:style-name="T26">Beispiel: </text:span>Um die mit <text:span text:style-name="Source_20_Text">TOUT</text:span> gesicherte Variable zu laden schreibt man:</text:p>
      <text:p text:style-name="Preformatted_20_Text">TIN('VAR',ADDR(V))</text:p>
      <text:p text:style-name="Preformatted_20_Text"/>
      <text:p text:style-name="Text_20_body">Da Quelltexte (source files), die durch den Editor gesichert wurden, das gleiche Aufzeichnungsformat haben, wie es auch von <text:span text:style-name="Source_20_Text">TOUT</text:span> benutzt wird, können mit <text:span text:style-name="Source_20_Text">TIN</text:span> Quelltexte in <text:span text:style-name="Source_20_Text">ARRAY </text:span><text:span text:style-name="Source_20_Text"><text:span text:style-name="T26">OF</text:span></text:span><text:span text:style-name="Source_20_Text"> CHAR</text:span> geladen werden, um sie weiter zuverarbeiten.</text:p>
      <text:h text:style-name="Heading_20_2" text:outline-level="2"><text:bookmark-start text:name="__RefHeading___Toc83_1849558913"/>Manipulation von INTEGER-Zahlen<text:bookmark-end text:name="__RefHeading___Toc83_1849558913"/></text:h>
      <text:h text:style-name="Heading_20_3" text:outline-level="3"><text:bookmark-start text:name="__RefHeading___Toc6689_1452676818"/><text:span text:style-name="Source_20_Text">HI(I)</text:span><text:bookmark-end text:name="__RefHeading___Toc6689_1452676818"/></text:h>
      <text:p text:style-name="Text_20_body">Das Ergebnis der Funktion liefert den Wert des höherwertigen Byte der <text:span text:style-name="Source_20_Text">INTEGER</text:span>-Zahl <text:span text:style-name="Source_20_Text">I</text:span> (Ergebnistyp ist <text:span text:style-name="Source_20_Text">INTEGER</text:span>).</text:p>
      <text:h text:style-name="Heading_20_3" text:outline-level="3"><text:bookmark-start text:name="__RefHeading___Toc6691_1452676818"/><text:span text:style-name="Source_20_Text">LO(I)</text:span><text:bookmark-end text:name="__RefHeading___Toc6691_1452676818"/></text:h>
      <text:p text:style-name="Text_20_body">Das Ergebnis dieser Funktion liefert den Wert des niederwertigen Byte der <text:span text:style-name="Source_20_Text">INTEGER</text:span>-Zahl <text:span text:style-name="Source_20_Text">I</text:span> (Ergebnistyp ist <text:span text:style-name="Source_20_Text">INTEGER</text:span>)</text:p>
      <text:h text:style-name="Heading_20_3" text:outline-level="3"><text:bookmark-start text:name="__RefHeading___Toc6693_1452676818"/><text:span text:style-name="Source_20_Text">SWAP(I)</text:span><text:bookmark-end text:name="__RefHeading___Toc6693_1452676818"/></text:h>
      <text:p text:style-name="Text_20_body">Mit dieser Funktion werden High-Byte und Low-Byte der <text:span text:style-name="Source_20_Text">INTEGER</text:span>-Zahl <text:span text:style-name="Source_20_Text">I</text:span> vertauscht.</text:p>
      <text:h text:style-name="Heading_20_3" text:outline-level="3"><text:bookmark-start text:name="__RefHeading___Toc6695_1452676818"/><text:span text:style-name="Source_20_Text">SHL(I, N)</text:span><text:bookmark-end text:name="__RefHeading___Toc6695_1452676818"/></text:h>
      <text:p text:style-name="Text_20_body">Die <text:span text:style-name="Source_20_Text">INTEGER</text:span>-Zahl <text:span text:style-name="Source_20_Text">I</text:span> wird um <text:span text:style-name="Source_20_Text">N</text:span> (Typ <text:span text:style-name="Source_20_Text">INTEGER</text:span>) Bitstellen bitweise nach links verschoben. Das Ergebnis ist vom Typ <text:span text:style-name="Source_20_Text">INTEGER</text:span>.</text:p>
      <text:h text:style-name="Heading_20_3" text:outline-level="3"><text:bookmark-start text:name="__RefHeading___Toc6697_1452676818"/><text:span text:style-name="Source_20_Text">SHR(I, N)</text:span><text:bookmark-end text:name="__RefHeading___Toc6697_1452676818"/></text:h>
      <text:p text:style-name="P21">Die <text:span text:style-name="Source_20_Text">INTEGER</text:span>-Zahl <text:span text:style-name="Source_20_Text">I</text:span> wird um <text:span text:style-name="Source_20_Text">N</text:span> (Typ <text:span text:style-name="Source_20_Text">INTEGER</text:span>) Bitstellen bitweise nach rechts verschoben. Das Ergebnis ist vom Typ <text:span text:style-name="Source_20_Text">INTEGER</text:span>.</text:p>
      <text:h text:style-name="Heading_20_3" text:outline-level="3"><text:bookmark-start text:name="__RefHeading___Toc6699_1452676818"/><text:span text:style-name="Source_20_Text">BAND(A, B)</text:span><text:bookmark-end text:name="__RefHeading___Toc6699_1452676818"/></text:h>
      <text:p text:style-name="Text_20_body">Die <text:span text:style-name="Source_20_Text">INTEGER</text:span>-Zahl <text:span text:style-name="Source_20_Text">A</text:span> wird mit der <text:span text:style-name="Source_20_Text">INTEGER</text:span>-Zahl <text:span text:style-name="Source_20_Text">B</text:span> bitweise UND-verknüpft. Das Ergebnis ist vom Typ <text:span text:style-name="Source_20_Text">INTEGER</text:span>.</text:p>
      <text:h text:style-name="Heading_20_3" text:outline-level="3"><text:bookmark-start text:name="__RefHeading___Toc6701_1452676818"/><text:soft-page-break/><text:span text:style-name="Source_20_Text">BOR(A, B)</text:span><text:bookmark-end text:name="__RefHeading___Toc6701_1452676818"/></text:h>
      <text:p text:style-name="Text_20_body">Die <text:span text:style-name="Source_20_Text">INTEGER</text:span>-Zahl <text:span text:style-name="Source_20_Text">A</text:span> wird mit der <text:span text:style-name="Source_20_Text">INTEGER</text:span>-Zahl <text:span text:style-name="Source_20_Text">B</text:span> bitweise ODER-verknüpft. Das Ergebnis ist vom Typ <text:span text:style-name="Source_20_Text">INTEGER</text:span>.</text:p>
      <text:h text:style-name="Heading_20_3" text:outline-level="3"><text:bookmark-start text:name="__RefHeading___Toc6703_1452676818"/><text:span text:style-name="Source_20_Text">BXOR(A, B)</text:span><text:bookmark-end text:name="__RefHeading___Toc6703_1452676818"/></text:h>
      <text:p text:style-name="P22">Die <text:span text:style-name="Source_20_Text">INTEGER</text:span>-Zahl <text:span text:style-name="Source_20_Text">A</text:span> wird mit der <text:span text:style-name="Source_20_Text">INTEGER</text:span>-Zahl <text:span text:style-name="Source_20_Text">B</text:span> EXCLUSIV-ODER-verknüpft. Das Ergebnis ist vom Typ <text:span text:style-name="Source_20_Text">INTEGER</text:span>.</text:p>
      <text:h text:style-name="Heading_20_2" text:outline-level="2"><text:bookmark-start text:name="__RefHeading___Toc85_1849558913"/>Graphikprozeduren<text:bookmark-end text:name="__RefHeading___Toc85_1849558913"/></text:h>
      <text:h text:style-name="Heading_20_3" text:outline-level="3"><text:bookmark-start text:name="__RefHeading___Toc6705_1452676818"/><text:span text:style-name="Source_20_Text">GOTOXY(X, Y)</text:span><text:bookmark-end text:name="__RefHeading___Toc6705_1452676818"/></text:h>
      <text:p text:style-name="Text_20_body"><text:span text:style-name="Source_20_Text">X</text:span> und <text:span text:style-name="Source_20_Text">Y</text:span> sind <text:span text:style-name="Source_20_Text">INTEGER</text:span>-Variablen. Der Cursor (für <text:span text:style-name="Source_20_Text">WRITE</text:span> und <text:span text:style-name="Source_20_Text">WRITELN</text:span>) wird auf die Spalte <text:span text:style-name="Source_20_Text">X</text:span> und die Zeile <text:span text:style-name="Source_20_Text">Y</text:span> eingestellt.</text:p>
      <text:h text:style-name="Heading_20_3" text:outline-level="3"><text:bookmark-start text:name="__RefHeading___Toc6707_1452676818"/><text:span text:style-name="Source_20_Text">SETC(V, W)</text:span> [nur KC85/2 und KC85/3]<text:bookmark-end text:name="__RefHeading___Toc6707_1452676818"/></text:h>
      <text:p text:style-name="Text_20_body"><text:span text:style-name="Source_20_Text">V</text:span> und <text:span text:style-name="Source_20_Text">W</text:span> sind <text:span text:style-name="Source_20_Text">INTEGER</text:span>-Variablen. <text:span text:style-name="Source_20_Text">V</text:span> bestimmt die Vordergrundfarbe (Schrift, Punkte usw.) von 0 <text:span text:style-name="T27">bis </text:span>15 und <text:span text:style-name="Source_20_Text">W</text:span> die Hintergrundfarbe von 0 <text:span text:style-name="T27">bis </text:span>7 (siehe Handbücher KC85/2 und KC85/3).</text:p>
      <text:h text:style-name="Heading_20_3" text:outline-level="3"><text:bookmark-start text:name="__RefHeading___Toc6709_1452676818"/><text:span text:style-name="Source_20_Text">GETC(X, Y)</text:span> [nur KC85/2 und KC85/3]<text:bookmark-end text:name="__RefHeading___Toc6709_1452676818"/></text:h>
      <text:p text:style-name="P23"><text:span text:style-name="Source_20_Text">X</text:span> und <text:span text:style-name="Source_20_Text">Y</text:span> sind <text:span text:style-name="Source_20_Text">INTEGER</text:span>-Variablen. Mit dieser Funktion kann die Farbe im Punkt <text:span text:style-name="Source_20_Text">X,Y</text:span> des Pixel-Bildspeicher bestimmt werden. Das Ergebnis der Funktion ist vom Typ <text:span text:style-name="Source_20_Text">INTEGER</text:span>.</text:p>
      <text:h text:style-name="Heading_20_3" text:outline-level="3"><text:bookmark-start text:name="__RefHeading___Toc6711_1452676818"/><text:span text:style-name="Source_20_Text">PLOT(X, Y)</text:span> [nur KC85/2 und KC85/3]<text:bookmark-end text:name="__RefHeading___Toc6711_1452676818"/></text:h>
      <text:p text:style-name="P23"><text:span text:style-name="Source_20_Text">X</text:span> und <text:span text:style-name="Source_20_Text">Y</text:span> sind <text:span text:style-name="Source_20_Text">INTEGER</text:span>-Variablen. Der Bildpunkt an der Position <text:span text:style-name="Source_20_Text">X,Y</text:span> wird entsprechend der voreingestellten Farbinformation gesetzt.</text:p>
      <text:h text:style-name="Heading_20_3" text:outline-level="3"><text:bookmark-start text:name="__RefHeading___Toc6713_1452676818"/><text:span text:style-name="Source_20_Text">CLRPLOT(X, Y)</text:span> [nur KC85/2 und KC85/3]<text:bookmark-end text:name="__RefHeading___Toc6713_1452676818"/></text:h>
      <text:p text:style-name="P23"><text:span text:style-name="Source_20_Text">X</text:span> und <text:span text:style-name="Source_20_Text">Y</text:span> sind <text:span text:style-name="Source_20_Text">INTEGER</text:span>-Variablen. Der Bildpunkt an der Position <text:span text:style-name="Source_20_Text">X,Y</text:span> wird gelöscht (auf aktuelle Hintergrundfarbe gesetzt).</text:p>
      <text:h text:style-name="Heading_20_3" text:outline-level="3"><text:bookmark-start text:name="__RefHeading___Toc6715_1452676818"/><text:span text:style-name="Source_20_Text">LINEPLOT(X1, Y1, X2, Y2)</text:span> [nur KC85/3]<text:bookmark-end text:name="__RefHeading___Toc6715_1452676818"/></text:h>
      <text:p text:style-name="Text_20_body"><text:span text:style-name="Source_20_Text">X1</text:span>, <text:span text:style-name="Source_20_Text">X2</text:span>, <text:span text:style-name="Source_20_Text">Y1</text:span> und <text:span text:style-name="Source_20_Text">Y2</text:span> sind <text:span text:style-name="Source_20_Text">INTEGER</text:span>-Variablen. Es wird eine Linie vom Punkt <text:span text:style-name="Source_20_Text">X1,Y1</text:span> zum Punkt <text:span text:style-name="Source_20_Text">X2,Y2</text:span> mit der zuletzt eingestellten Farbe (s. <text:span text:style-name="Source_20_Text">SETC</text:span>) gezogen.</text:p>
      <text:h text:style-name="Heading_20_3" text:outline-level="3"><text:bookmark-start text:name="__RefHeading___Toc6717_1452676818"/><text:span text:style-name="Source_20_Text">CIRCLE(XM, YM, R)</text:span> [nur KC85/3]<text:bookmark-end text:name="__RefHeading___Toc6717_1452676818"/></text:h>
      <text:p text:style-name="Text_20_body"><text:span text:style-name="Source_20_Text">XM</text:span>, <text:span text:style-name="Source_20_Text">YM</text:span> und <text:span text:style-name="Source_20_Text">R</text:span> sind <text:span text:style-name="Source_20_Text">INTEGER</text:span>-Variablen. Um den Punkt <text:span text:style-name="Source_20_Text">XM,YM</text:span> wird ein Kreis mit dem Radius <text:span text:style-name="Source_20_Text">R</text:span> gezogen (die zuletzt eingestellte Farbe wird verwendet).</text:p>
      <text:h text:style-name="Heading_20_2" text:outline-level="2"><text:bookmark-start text:name="__RefHeading___Toc87_1849558913"/><text:soft-page-break/>Weitere vordefinierte Funktionen<text:bookmark-end text:name="__RefHeading___Toc87_1849558913"/></text:h>
      <text:h text:style-name="Heading_20_3" text:outline-level="3"><text:bookmark-start text:name="__RefHeading___Toc6719_1452676818"/><text:span text:style-name="Source_20_Text">RANDOM</text:span><text:bookmark-end text:name="__RefHeading___Toc6719_1452676818"/></text:h>
      <text:p text:style-name="Text_20_body">Das Ergebnis der Funktion ist eine <text:span text:style-name="Source_20_Text">INTEGER</text:span>-Pseudo-Zufallszahl von 0 <text:span text:style-name="T27">bis </text:span>255.</text:p>
      <text:h text:style-name="Heading_20_3" text:outline-level="3"><text:bookmark-start text:name="__RefHeading___Toc6721_1452676818"/><text:span text:style-name="Source_20_Text">SUCC(X)</text:span><text:bookmark-end text:name="__RefHeading___Toc6721_1452676818"/></text:h>
      <text:p text:style-name="Text_20_body"><text:span text:style-name="Source_20_Text">X</text:span> kann jeder skalare Typ außer <text:span text:style-name="Source_20_Text">REAL</text:span> sein. <text:span text:style-name="Source_20_Text">SUCC(X)</text:span> liefert den Nachfolger von <text:span text:style-name="Source_20_Text">X</text:span>.</text:p>
      <text:p text:style-name="Text_20_body"><text:span text:style-name="Source_20_Text">SUCC('A')</text:span> ergibt <text:span text:style-name="Source_20_Text">'B'</text:span>.</text:p>
      <text:p text:style-name="Text_20_body"><text:span text:style-name="Source_20_Text">SUCC('5')</text:span> ergibt <text:span text:style-name="Source_20_Text">'6'</text:span>.</text:p>
      <text:h text:style-name="Heading_20_3" text:outline-level="3"><text:bookmark-start text:name="__RefHeading___Toc6723_1452676818"/><text:span text:style-name="Source_20_Text">PRED(X)</text:span><text:bookmark-end text:name="__RefHeading___Toc6723_1452676818"/></text:h>
      <text:p text:style-name="Text_20_body"><text:span text:style-name="Source_20_Text">PRED</text:span> liefert den Vorgänger von <text:span text:style-name="Source_20_Text">X</text:span>.</text:p>
      <text:p text:style-name="Text_20_body"><text:span text:style-name="Source_20_Text">PRED('j')</text:span> ergibt <text:span text:style-name="Source_20_Text">'i'</text:span>.</text:p>
      <text:p text:style-name="Text_20_body"><text:span text:style-name="Source_20_Text">PRED(TRUE)</text:span> ergibt <text:span text:style-name="Source_20_Text">FALSE</text:span>.</text:p>
      <text:h text:style-name="Heading_20_3" text:outline-level="3"><text:bookmark-start text:name="__RefHeading___Toc6725_1452676818"/><text:span text:style-name="Source_20_Text">ODD(X)</text:span><text:bookmark-end text:name="__RefHeading___Toc6725_1452676818"/></text:h>
      <text:p text:style-name="Text_20_body"><text:span text:style-name="Source_20_Text">X</text:span> muss vom <text:span text:style-name="Source_20_Text">INTEGER</text:span>-Typ sein. <text:span text:style-name="Source_20_Text">ODD</text:span> liefert das bool<text:span text:style-name="T27">e</text:span>sche Resultat <text:span text:style-name="Source_20_Text">TRUE</text:span>, wenn <text:span text:style-name="Source_20_Text">X</text:span> ungerade ist und <text:span text:style-name="Source_20_Text">FALSE</text:span>, wenn <text:span text:style-name="Source_20_Text">X</text:span> gerade ist.</text:p>
      <text:h text:style-name="Heading_20_3" text:outline-level="3"><text:bookmark-start text:name="__RefHeading___Toc6727_1452676818"/><text:span text:style-name="Source_20_Text">ADDR(V)</text:span><text:bookmark-end text:name="__RefHeading___Toc6727_1452676818"/></text:h>
      <text:p text:style-name="Text_20_body"><text:span text:style-name="Source_20_Text">V</text:span> ist ein Variablen-Name beliebigen Typs. Die Funktion liefert die Speicheradresse der Variablen <text:span text:style-name="Source_20_Text">V</text:span> als <text:span text:style-name="Source_20_Text">INTEGER</text:span>-Zahl.</text:p>
      <text:h text:style-name="Heading_20_3" text:outline-level="3"><text:bookmark-start text:name="__RefHeading___Toc6729_1452676818"/><text:span text:style-name="Source_20_Text">SIZE(V)</text:span><text:bookmark-end text:name="__RefHeading___Toc6729_1452676818"/></text:h>
      <text:p text:style-name="Text_20_body"><text:span text:style-name="Source_20_Text">V</text:span> ist eine Variable. Das <text:span text:style-name="Source_20_Text">INTEGER</text:span>-Resultat stellt die Anzahl der Bytes dar, die durch diese Variable belegt werden.</text:p>
      <text:h text:style-name="Heading_20_1" text:outline-level="1"><text:bookmark-start text:name="__RefHeading___Toc89_1849558913"/>Kommentare und Compiler-Steuerzeichen<text:bookmark-end text:name="__RefHeading___Toc89_1849558913"/></text:h>
      <text:h text:style-name="Heading_20_2" text:outline-level="2"><text:bookmark-start text:name="__RefHeading___Toc91_1849558913"/>Kommentare<text:bookmark-end text:name="__RefHeading___Toc91_1849558913"/></text:h>
      <text:p text:style-name="Standard">Ein Kommentar kann überall zwischen zwei reservierten Worten, Zahlen, Namen oder Spezialsymbolen eingefügt werden. Ein Kommentar beginnt mit dem Zeichen '{' oder dem Zeichenpaar '(*'. Außer, wenn das nächste Zeichen ein '$' ist, werden alle Zeichen bis zum nächsten '}' oder '*)' ignoriert. Wird ein '$' gefunden, erwartet der Compiler eine Folge von Compiler-Steuerzeichen (s. unten). Die auf diese Steuerzeichen folgenden Zeichen werden übersprungen bis '}' oder '*)' gefunden wird.</text:p>
      <text:h text:style-name="Heading_20_2" text:outline-level="2"><text:bookmark-start text:name="__RefHeading___Toc93_1849558913"/>C<text:span text:style-name="T3">ompiler-Steuerzeichen</text:span><text:bookmark-end text:name="__RefHeading___Toc93_1849558913"/></text:h>
      <text:p text:style-name="Text_20_body"><draw:g text:anchor-type="paragraph" draw:z-index="15" draw:name="Gruppenobjekt 19" draw:style-name="gr1"><draw:custom-shape draw:style-name="gr37" draw:text-style-name="P79" svg:width="2.25cm" svg:height="1.001cm" svg:x="6.673cm" svg:y="1.09cm"><text:p text:style-name="P78"><text:span text:style-name="T72">lette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71" svg:width="1.001cm" svg:height="1.001cm" svg:x="4.673cm" svg:y="1.09cm"><text:p text:style-name="P70"><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1" svg:width="1.001cm" svg:height="1.001cm" svg:x="7.922cm" svg:y="2.589cm"><text:p text:style-name="P70"><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2" draw:text-style-name="P71" svg:width="1.001cm" svg:height="0.999cm" svg:x="9.922cm" svg:y="0.34cm"><text:p text:style-name="P70"><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1" svg:width="1.001cm" svg:height="1.001cm" svg:x="9.922cm" svg:y="1.839cm"><text:p text:style-name="P70"><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3" draw:text-style-name="P74" svg:x1="9.422cm" svg:y1="0.836cm" svg:x2="9.922cm" svg:y2="0.836cm"><text:p/></draw:line><draw:line draw:style-name="gr104" draw:text-style-name="P74" svg:x1="9.422cm" svg:y1="2.338cm" svg:x2="9.922cm" svg:y2="2.338cm"><text:p/></draw:line><draw:line draw:style-name="gr6" draw:text-style-name="P74" svg:x1="9.422cm" svg:y1="0.836cm" svg:x2="9.422cm" svg:y2="2.336cm"><text:p/></draw:line><draw:line draw:style-name="gr105" draw:text-style-name="P74" svg:x1="11.174cm" svg:y1="2.34cm" svg:x2="11.174cm" svg:y2="1.59cm"><text:p/></draw:line><draw:line draw:style-name="gr106" draw:text-style-name="P74" svg:x1="11.174cm" svg:y1="0.836cm" svg:x2="11.174cm" svg:y2="1.586cm"><text:p/></draw:line><draw:line draw:style-name="gr6" draw:text-style-name="P74" svg:x1="10.922cm" svg:y1="0.836cm" svg:x2="11.172cm" svg:y2="0.836cm"><text:p/></draw:line><draw:line draw:style-name="gr6" draw:text-style-name="P74" svg:x1="10.922cm" svg:y1="2.338cm" svg:x2="11.172cm" svg:y2="2.338cm"><text:p/></draw:line><draw:line draw:style-name="gr107" draw:text-style-name="P74" svg:x1="8.922cm" svg:y1="1.59cm" svg:x2="12.922cm" svg:y2="1.59cm"><text:p/></draw:line><draw:line draw:style-name="gr108" draw:text-style-name="P74" svg:x1="2.922cm" svg:y1="1.59cm" svg:x2="4.672cm" svg:y2="1.59cm"><text:p/></draw:line><draw:line draw:style-name="gr109" draw:text-style-name="P74" svg:x1="5.672cm" svg:y1="1.59cm" svg:x2="6.672cm" svg:y2="1.59cm"><text:p/></draw:line><draw:line draw:style-name="gr6" draw:text-style-name="P74" svg:x1="11.672cm" svg:y1="1.59cm" svg:x2="11.672cm" svg:y2="3.09cm"><text:p/></draw:line><draw:line draw:style-name="gr110" draw:text-style-name="P74" svg:x1="11.672cm" svg:y1="3.09cm" svg:x2="8.922cm" svg:y2="3.09cm"><text:p/></draw:line><draw:line draw:style-name="gr6" draw:text-style-name="P74" svg:x1="7.923cm" svg:y1="3.09cm" svg:x2="5.923cm" svg:y2="3.09cm"><text:p/></draw:line><draw:line draw:style-name="gr111" draw:text-style-name="P74" svg:x1="5.923cm" svg:y1="3.09cm" svg:x2="5.923cm" svg:y2="1.59cm"><text:p/></draw:line></draw:g></text:p>
      <text:p text:style-name="Text_20_body">Alle Compiler-Steuerungen können selektiv eingesetzt, d.h. im Programm ein- und ausgeschalte<text:span text:style-name="T29">t</text:span> werden. Somit können fehlerfreie Programmteile beschleunigt und zusammengedrängt werden, indem die entsprechenden Tests in unverschachtelten Programmteilen abgeschaltet werden.</text:p>
      <text:h text:style-name="Heading_20_3" text:outline-level="3"><text:bookmark-start text:name="__RefHeading___Toc6731_1452676818"/>Steuerzeichen <text:span text:style-name="Source_20_Text">L</text:span><text:bookmark-end text:name="__RefHeading___Toc6731_1452676818"/></text:h>
      <text:p text:style-name="Text_20_body">Steuert das Listen von Programmtext und Objektcode-Adressen beim Compilieren.</text:p>
      <table:table table:name="Tabelle17" table:style-name="Tabelle17">
        <table:table-column table:style-name="Tabelle17.A"/>
        <table:table-row>
          <table:table-cell office:value-type="string">
            <text:p text:style-name="Standard">Bei <text:span text:style-name="Source_20_Text">L+</text:span> wird ein vollständiges Listing ausgegeben.</text:p>
          </table:table-cell>
        </table:table-row>
        <table:table-row>
          <table:table-cell office:value-type="string">
            <text:p text:style-name="Standard">Bei <text:span text:style-name="Source_20_Text">L-</text:span> werden nur die fehlerhaften Zeilen gelistet.</text:p>
          </table:table-cell>
        </table:table-row>
        <table:table-row>
          <table:table-cell office:value-type="string">
            <text:p text:style-name="Standard"/>
          </table:table-cell>
        </table:table-row>
      </table:table>
      <text:p text:style-name="Text_20_body">Vorgabewert ist <text:span text:style-name="Source_20_Text">L+</text:span>.</text:p>
      <text:h text:style-name="Heading_20_3" text:outline-level="3"><text:bookmark-start text:name="__RefHeading___Toc6733_1452676818"/>Steuerzeichen <text:span text:style-name="Source_20_Text">O</text:span><text:bookmark-end text:name="__RefHeading___Toc6733_1452676818"/></text:h>
      <text:p text:style-name="Text_20_body">Legt fest, ob bestimmte Überlauftests gemacht werden. <text:span text:style-name="Source_20_Text">INTEGER</text:span>-Multiplikationen und Divisionen und alle arithmetischen <text:span text:style-name="Source_20_Text">REAL</text:span>-Operationen werden immer auf Überlauf getestet.</text:p>
      <table:table table:name="Tabelle18" table:style-name="Tabelle18">
        <table:table-column table:style-name="Tabelle18.A"/>
        <table:table-row>
          <table:table-cell office:value-type="string">
            <text:p text:style-name="Standard">Bei <text:span text:style-name="Source_20_Text">O+</text:span> werden außerdem die <text:span text:style-name="Source_20_Text">INTEGER</text:span>-Addition und -Subtraktion getestet.</text:p>
          </table:table-cell>
        </table:table-row>
        <table:table-row>
          <table:table-cell office:value-type="string">
            <text:p text:style-name="Standard">Bei <text:span text:style-name="Source_20_Text">O-</text:span> nicht.</text:p>
          </table:table-cell>
        </table:table-row>
        <table:table-row>
          <table:table-cell office:value-type="string">
            <text:p text:style-name="Standard"/>
          </table:table-cell>
        </table:table-row>
      </table:table>
      <text:p text:style-name="Text_20_body">Vorgabewert ist <text:span text:style-name="Source_20_Text">O+</text:span>.</text:p>
      <text:h text:style-name="Heading_20_3" text:outline-level="3"><text:bookmark-start text:name="__RefHeading___Toc6735_1452676818"/><text:soft-page-break/>Steuerzeichen <text:span text:style-name="Source_20_Text">C</text:span><text:bookmark-end text:name="__RefHeading___Toc6735_1452676818"/></text:h>
      <text:p text:style-name="P24">Legt fest, ob während der Ausführung des Object-Codes Tastaturüberprüfungen durchgeführt werden.</text:p>
      <text:p text:style-name="P24">Bei <text:span text:style-name="Source_20_Text">C+</text:span> wird die Programmausführung nach Betätigen von <text:span text:style-name="Source_20_Text">EDIT</text:span> mit der Meldung '<text:span text:style-name="Source_20_Text">Halt</text:span>' angehalten. Dieser Test wird am Beginn aller Schleifen, Prozeduren und Funktionen gemacht. <text:s/>Damit kann der Benutzer bei der Fehlersuche überprüfen, welche Schleifen usw. nicht ordnungsgemäß beendet werden (Endlosschleife).</text:p>
      <text:p text:style-name="P24">Bei <text:span text:style-name="Source_20_Text">C-</text:span> werden obige Tests nicht durchgeführt und das Programm läuft somit schneller.</text:p>
      <text:p text:style-name="Text_20_body">Vorgabewert ist <text:span text:style-name="Source_20_Text">C+</text:span>.</text:p>
      <text:h text:style-name="Heading_20_3" text:outline-level="3"><text:bookmark-start text:name="__RefHeading___Toc6737_1452676818"/>Steuerzeichen <text:span text:style-name="Source_20_Text">P</text:span><text:bookmark-end text:name="__RefHeading___Toc6737_1452676818"/></text:h>
      <text:p text:style-name="Text_20_body">Mit diesem Steuerzeichen wird der Drucker parallel zum Bildschirm geschalte<text:span text:style-name="T30">t</text:span>. Wird das Steuerzeichen wiederholt verwendet, so wird der Drucker wieder ausgeschalte<text:span text:style-name="T30">t</text:span>. Nach dem Compilieren wird der Drucker immer deaktiviert.</text:p>
      <text:p text:style-name="P55">Abweichend zum Syntaxdiagramm darf nach <text:span text:style-name="T6">P</text:span> kein <text:span text:style-name="T6">+</text:span> oder <text:span text:style-name="T6">–</text:span> stehen, sonst bricht an dieser Stelle das Lesen weiterer Compiler-Steuerzeichen ab.</text:p>
      <text:h text:style-name="Heading_20_3" text:outline-level="3"><text:bookmark-start text:name="__RefHeading___Toc6739_1452676818"/>Steuerzeichen <text:span text:style-name="Source_20_Text">S</text:span><text:bookmark-end text:name="__RefHeading___Toc6739_1452676818"/></text:h>
      <text:p text:style-name="P24">Legt fest, ob Stack-Tests durchgeführt werden.</text:p>
      <text:p text:style-name="P24">Bei <text:span text:style-name="Source_20_Text">S+</text:span> wird am Beginn jeder Prozedur und jedes Funktionsrufes getestet, ob der Stack in diesem Block vermutlich überlaufen wird. Wenn der Stack droht, den Bereich der dynamischen Variablen oder das Programm zu zerstören, wird die Meldung '<text:span text:style-name="Source_20_Text">&gt;&gt; RAM bei PC=XXXX</text:span>' ausgegeben und das Programm abgebrochen. Wenn innerhalb einer Prozedur ein großer Stackbereich benötigt wird, kann das Programm abstürzen. Benötigt andererseits eine Funktion sehr wenig Stack, während sie rekursiv arbeitet, ist es u.U. unnötig, diesen Test durchzuführen.</text:p>
      <text:p text:style-name="Text_20_body">Bei <text:span text:style-name="Source_20_Text">S-</text:span> wird kein Stack-Test durchgeführt.</text:p>
      <text:p text:style-name="Text_20_body">Vorgabewert ist <text:span text:style-name="Source_20_Text">S+</text:span>.</text:p>
      <text:h text:style-name="Heading_20_3" text:outline-level="3"><text:bookmark-start text:name="__RefHeading___Toc6741_1452676818"/>Steuerzeichen <text:span text:style-name="Source_20_Text">A</text:span><text:bookmark-end text:name="__RefHeading___Toc6741_1452676818"/></text:h>
      <text:p text:style-name="Text_20_body">Legt fest, ob getestet wird, dass Feldindizes in dem durch die Felddeklaration festgelegten Bereich liegen.</text:p>
      <text:p text:style-name="Text_20_body">Bei <text:span text:style-name="Source_20_Text">A+</text:span> wird die Bereichsüberschreitung die Meldung '<text:span text:style-name="Source_20_Text">Index zu hoch</text:span>' oder '<text:span text:style-name="Source_20_Text">Index zu niedrig</text:span>' ausgegeben und das Programm gestoppt.</text:p>
      <text:p text:style-name="Text_20_body">Bei <text:span text:style-name="Source_20_Text">A-</text:span> wird dieser Test nicht durchgeführt.</text:p>
      <text:p text:style-name="Text_20_body">Vorgabewert ist <text:span text:style-name="Source_20_Text">A+</text:span>.</text:p>
      <text:h text:style-name="Heading_20_3" text:outline-level="3"><text:bookmark-start text:name="__RefHeading___Toc6743_1452676818"/><text:soft-page-break/>Steuerzeichen <text:span text:style-name="Source_20_Text">I</text:span><text:bookmark-end text:name="__RefHeading___Toc6743_1452676818"/></text:h>
      <text:p text:style-name="Text_20_body">Bei der Benutzung der 16 bit-Zweierkomplement-<text:span text:style-name="Source_20_Text">INTEGER</text:span>-Arithmetik entsteht ein Überlauf bei der Ausführung von <text:span text:style-name="Source_20_Text">&gt;</text:span>, <text:span text:style-name="Source_20_Text">&lt;</text:span>, <text:span text:style-name="Source_20_Text">&gt;=</text:span> oder <text:span text:style-name="Source_20_Text">&lt;=</text:span>, wenn sich die Argumente um mehr als <text:span text:style-name="Source_20_Text">MAXINT</text:span> (32767) unterscheiden. In diesem Fall wäre das Ergebnis des Vergleichs falsch. Sollen solche Zahlen nicht verglichen werden, hat das keine weiteren Folgen. <text:span text:style-name="Source_20_Text">I+</text:span> sichert aber auch bei einem solchen Vergleich ein richtiges Ergebnis. Eine ähnliche Situation kann auch beim Vergleich von <text:span text:style-name="Source_20_Text">REAL</text:span>-Zahlen entstehen, wenn diese größer, mehr als etwa 3.4E38, werden. <text:span text:style-name="T30">Dann wird</text:span> ein Überlauf-Fehler ausgegeben.</text:p>
      <text:p text:style-name="Text_20_body">Bei <text:span text:style-name="Source_20_Text">I-</text:span> wird obige Korrektur nicht durchgeführt.</text:p>
      <text:p text:style-name="Text_20_body">Vorgabewert <text:span text:style-name="Source_20_Text">I-</text:span>.</text:p>
      <text:h text:style-name="Heading_20_1" text:outline-level="1"><text:bookmark-start text:name="__RefHeading___Toc95_1849558913"/>Der eingebaute Editor<text:bookmark-end text:name="__RefHeading___Toc95_1849558913"/></text:h>
      <text:h text:style-name="Heading_20_2" text:outline-level="2"><text:bookmark-start text:name="__RefHeading___Toc97_1849558913"/>Einführung<text:bookmark-end text:name="__RefHeading___Toc97_1849558913"/></text:h>
      <text:p text:style-name="Text_20_body">Der mitgelieferte Editor ist ein einfacher zeilenorientierter Editor, der ein einfaches, schnelles und wirksames Editieren der Programme erlaubt.</text:p>
      <text:p text:style-name="Text_20_body">Eine Eingabezeile kann maximal 80 Zeichen umfassen, weitere Zeichen werden ignoriert. Mit <text:span text:style-name="Source_20_Text">ENTER</text:span> wird der editierte Text in einer kompakten Form im Quelltextspeicher abgelegt. Die Zahl der führenden Leerzeichen einer Zeile wird in einem Byte am Anfang dieser Zeile abgespeichert. Alle reservierten KC-PASCAL-Wörter werden als Token ebenfalls in einem Byte abgespeichert. Der Editor wird nach dem Laden von KC-PASCAL automatisch aufgerufen und zeigt je nach Version etwa folgende Meldung:</text:p>
      <text:p text:style-name="Preformatted_20_Text">****** PASCAL V4.4X ******</text:p>
      <text:p text:style-name="Preformatted_20_Text"><text:s text:c="2"/>Bearb. von +++ AMXX +++</text:p>
      <text:p text:style-name="Preformatted_20_Text"><text:s text:c="4"/>(Version XXXXXX)</text:p>
      <text:p text:style-name="Preformatted_20_Text"/>
      <text:p text:style-name="Text_20_body">gefolgt vom Zeichen '<text:span text:style-name="Source_20_Text">+</text:span>' (Editor-Prompt) an.</text:p>
      <text:p text:style-name="Text_20_body">Dabei gibt X, bzw. XXXXXX die jeweilige Versionsbezeichnung je nach Gerätetyp und Erstellungsjahr an.</text:p>
      <text:p text:style-name="Text_20_body">Im folgenden ist die Eingabe einer Kommandozeile des Formates:</text:p>
      <text:p text:style-name="Preformatted_20_Text">C N1, N2, S1, S2</text:p>
      <text:p text:style-name="Preformatted_20_Text"/>
      <text:p text:style-name="Text_20_body">gefolgt von '<text:span text:style-name="Source_20_Text">ENTER</text:span>' möglich, wobei</text:p>
      <text:p text:style-name="Standard"/>
      <table:table table:name="Tabelle19" table:style-name="Tabelle19">
        <table:table-column table:style-name="Tabelle19.A"/>
        <table:table-column table:style-name="Tabelle19.B"/>
        <table:table-row>
          <table:table-cell office:value-type="string">
            <text:p text:style-name="P18"><text:span text:style-name="Source_20_Text">C</text:span></text:p>
          </table:table-cell>
          <table:table-cell office:value-type="string">
            <text:p text:style-name="Standard">das auszuführende Kommando</text:p>
          </table:table-cell>
        </table:table-row>
        <table:table-row>
          <table:table-cell office:value-type="string">
            <text:p text:style-name="Standard"><text:span text:style-name="Source_20_Text">N1</text:span> und <text:span text:style-name="Source_20_Text">N2</text:span></text:p>
          </table:table-cell>
          <table:table-cell office:value-type="string">
            <text:p text:style-name="Standard">Zahlen im Bereich 1 bis 32767 (Ausnahme '<text:span text:style-name="Source_20_Text">Z</text:span>')</text:p>
          </table:table-cell>
        </table:table-row>
        <table:table-row>
          <table:table-cell office:value-type="string">
            <text:p text:style-name="Standard"><text:span text:style-name="Source_20_Text">S1</text:span> und <text:span text:style-name="Source_20_Text">S2</text:span></text:p>
          </table:table-cell>
          <table:table-cell office:value-type="string">
            <text:p text:style-name="Standard"><text:span text:style-name="Source_20_Text">STRING OF CHAR</text:span> mit einer maximalen Länge von 20</text:p>
          </table:table-cell>
        </table:table-row>
        <table:table-row>
          <table:table-cell office:value-type="string">
            <text:p text:style-name="Standard"/>
          </table:table-cell>
          <table:table-cell office:value-type="string">
            <text:p text:style-name="Standard"/>
          </table:table-cell>
        </table:table-row>
      </table:table>
      <text:p text:style-name="Text_20_body">darstellen.</text:p>
      <text:p text:style-name="Standard"/>
      <text:p text:style-name="P19">Das Komma wird benutzt, um die einzelnen Argumente zu trennen (kann durch das <text:span text:style-name="Source_20_Text">S</text:span>-Kommando verändert werden). Außer innerhalb der Strings werden Leerzeichen ignoriert. Keines der Argumente ist obligatorisch, aber einige Kommandos (z.B. das '<text:span text:style-name="Source_20_Text">D</text:span>'elete-Kommando) werden nicht ausgeführt, ohne dass <text:span text:style-name="Source_20_Text">N1</text:span> und <text:span text:style-name="Source_20_Text">N2</text:span> spezifiziert werden. Wird ein Argument nicht eingegeben, nimmt der Editor das zuletzt an dieser Stelle eingegebene. Die Werte von <text:span text:style-name="Source_20_Text">N1</text:span> und <text:span text:style-name="Source_20_Text">N2</text:span> werden anfangs auf 10 gesetzt, die Strings sind leer. Wird eine unzulässige Zeile, wie <text:span text:style-name="Source_20_Text">F-1,100,HELLO</text:span> eingeben, wird die Zeile ignoriert und '<text:span text:style-name="Source_20_Text">Pardon?</text:span>' ausgegeben. Diese Fehlermeldung wird auch ausgegeben, wenn die Länge von <text:span text:style-name="Source_20_Text">S2</text:span> 20 übersteigt. Wenn <text:span text:style-name="Source_20_Text">S1</text:span> länger als 20 ist, werden die überzähligen Zeichen ignoriert. Editier-Kommandos können als Groß- oder Kleinbuchstaben eingegeben werden.</text:p>
      <text:h text:style-name="Heading_20_2" text:outline-level="2"><text:bookmark-start text:name="__RefHeading___Toc99_1849558913"/><text:soft-page-break/>Editierkommandos<text:bookmark-end text:name="__RefHeading___Toc99_1849558913"/></text:h>
      <text:h text:style-name="Heading_20_3" text:outline-level="3"><text:bookmark-start text:name="__RefHeading___Toc101_1849558913"/>Text einfügen<text:bookmark-end text:name="__RefHeading___Toc101_1849558913"/></text:h>
      <text:p text:style-name="Text_20_body">Text kann in das Textfile eingefügt werden, indem man eine Zeilennummer, gefolgt von mindestens einem Leerzeichen und dem gewünschten Text eingibt, oder indem man das <text:span text:style-name="Source_20_Text">I</text:span>-Kommando benutzt. (Wenn eine Zeilennummer gefolgt von '<text:span text:style-name="Source_20_Text">ENTER</text:span>', d.h. ohne nachfolgenden Text eingegeben wird, wird sie aus dem Textfile gelöscht, falls sie existiert).</text:p>
      <text:p text:style-name="Text_20_body">Beim Eingeben von Text können die eingangs beschriebenen Steuertasten verwendet werden. Der Text wird immer erst in einen Eingabepuffer eingegeben. Ist dieser voll, wird das Eingeben weiterer Zeichen verhindert.</text:p>
      <text:h text:style-name="Heading_20_4" text:outline-level="4"><text:bookmark-start text:name="__RefHeading___Toc6745_1452676818"/>Kommando <text:span text:style-name="Source_20_Text">I n,m</text:span><text:bookmark-end text:name="__RefHeading___Toc6745_1452676818"/></text:h>
      <text:p text:style-name="Standard"><text:span text:style-name="Source_20_Text">I</text:span> ruft den automatischen Einfüge-Modus auf. Die Zeilennummern werden, beginnend mit <text:span text:style-name="Source_20_Text">n</text:span> und mit einem Inkrement von <text:span text:style-name="Source_20_Text">m</text:span>, automatisch erzeugt und angezeigt. Der gewünschte Text kann unter Benutzung der Steuerkommandos hinter der angezeigten Zeilennummer eingegeben und mit <text:span text:style-name="Source_20_Text">ENTER</text:span> abgeschlossen werden. Durch <text:span text:style-name="Source_20_Text">BREAK</text:span> kann man den Einfüge-Modus wieder verlassen. Wenn eine eingegebene Zeile die gleiche Zeilennummer wie eine bereits existierende besitzt, wird die alte (nach <text:span text:style-name="Source_20_Text">ENTER</text:span>) gelöscht und durch die neu eingegebene ersetzt.</text:p>
      <text:p text:style-name="Standard">Wenn die automatische Inkrementierung eine Zeilennummer größer als 32767 erzeugen würde, wird der Einfüge-Modus automatisch verlassen. Wenn beim Eingeben von Text das Ende einer Bildschirmzeile erreicht wird, ohne dass der Textpuffer voll ist (80 Zeichen), wird der Bildschirm gerollt und auf der folgenden Zeile kann weiterer Text eingegeben werden. Der Text wird automatisch eingerückt, so dass die Zeilennummern vom Text abgehoben sind.</text:p>
      <text:h text:style-name="Heading_20_3" text:outline-level="3"><text:bookmark-start text:name="__RefHeading___Toc103_1849558913"/>Text anzeigen<text:bookmark-end text:name="__RefHeading___Toc103_1849558913"/></text:h>
      <text:p text:style-name="Text_20_body">Der Text kann mittels des <text:span text:style-name="Source_20_Text">L</text:span>-Kommandos durchgesehen werden. Die Anzahl der auf einmal gelisteten Zeilen kann durch das <text:span text:style-name="Source_20_Text">K</text:span>-Kommando festgelegt werden.</text:p>
      <text:h text:style-name="Heading_20_4" text:outline-level="4"><text:bookmark-start text:name="__RefHeading___Toc6747_1452676818"/>Kommando <text:span text:style-name="Source_20_Text">L n,m</text:span> (List)<text:bookmark-end text:name="__RefHeading___Toc6747_1452676818"/></text:h>
      <text:p text:style-name="Text_20_body">Listet den Text von Zeilennummer <text:span text:style-name="Source_20_Text">n</text:span> bis <text:span text:style-name="Source_20_Text">m</text:span>. Der Vorgabewert für <text:span text:style-name="Source_20_Text">n</text:span> ist immer 1 und der für <text:span text:style-name="Source_20_Text">m</text:span> immer 32767, d.h. er wird nicht von vorher eingegebenen Argumenten übernommen. Um den gesamten Textspeicher zu listen, kann also einfach '<text:span text:style-name="Source_20_Text">L</text:span>' benutzt werden. Die Zeilen werden auf dem Bildschirm mit einem linken Rand ausgegeben, so dass die Zeilennummer deutlich erkennbar ist. Wenn die durch das <text:span text:style-name="Source_20_Text">K</text:span>-Kommando bestimmte Zeilenzahl ausgegeben und <text:span text:style-name="Source_20_Text">m</text:span> noch nicht erreicht ist, wird das Listen unterbrochen. <text:span text:style-name="Source_20_Text">BREAK</text:span> bewirkt die Rückkehr zur Editor-Hauptschleife, jede andere Taste setzt das Listen fort.</text:p>
      <text:h text:style-name="Heading_20_4" text:outline-level="4"><text:bookmark-start text:name="__RefHeading___Toc6749_1452676818"/>Kommando <text:span text:style-name="Source_20_Text">K n</text:span><text:bookmark-end text:name="__RefHeading___Toc6749_1452676818"/></text:h>
      <text:p text:style-name="Text_20_body">Legt die Zahl der Zeilen fest, bis das Listen anhält. Der Wert (<text:span text:style-name="Source_20_Text">n MOD 256</text:span>) wird berechnet und gespeichert.</text:p>
      <text:p text:style-name="Text_20_body"><text:soft-page-break/>Vorgabewert ist <text:span text:style-name="Source_20_Text">n</text:span>=15.</text:p>
      <text:h text:style-name="Heading_20_3" text:outline-level="3"><text:bookmark-start text:name="__RefHeading___Toc105_1849558913"/>Text <text:span text:style-name="T2">e</text:span>ditieren<text:bookmark-end text:name="__RefHeading___Toc105_1849558913"/></text:h>
      <text:p text:style-name="Text_20_body">Verschiedene Kommandos ermöglichen es, einen erzeugten Text zu verändern, zu löschen, zu verschieben und neu zu nummerieren.</text:p>
      <text:h text:style-name="Heading_20_4" text:outline-level="4"><text:bookmark-start text:name="__RefHeading___Toc6751_1452676818"/>Kommando <text:span text:style-name="Source_20_Text">D n,m</text:span> (Delete)<text:bookmark-end text:name="__RefHeading___Toc6751_1452676818"/></text:h>
      <text:p text:style-name="Text_20_body">Alle Zeilen von <text:span text:style-name="Source_20_Text">n</text:span> bis <text:span text:style-name="Source_20_Text">m</text:span> werden aus dem Textfile gelöscht. Wenn <text:span text:style-name="Source_20_Text">m</text:span> &lt; <text:span text:style-name="Source_20_Text">n</text:span> ist oder weniger als 2 Argumente eingegeben wurden, wird nichts unternommen, der Text also vor versehentlich falschen Eingaben geschützt. Eine einzelne Zeile kann durch <text:span text:style-name="Source_20_Text">m</text:span> = <text:span text:style-name="Source_20_Text">n</text:span> gelöscht werden. Das kann aber auch durch einfaches Eingeben der Zeilennummer gefolgt von <text:span text:style-name="Source_20_Text">ENTER</text:span> erreicht werden.</text:p>
      <text:h text:style-name="Heading_20_4" text:outline-level="4"><text:bookmark-start text:name="__RefHeading___Toc6753_1452676818"/>Kommando <text:span text:style-name="Source_20_Text">M n,m</text:span> (Move)<text:bookmark-end text:name="__RefHeading___Toc6753_1452676818"/></text:h>
      <text:p text:style-name="Text_20_body">Die Textzeile <text:span text:style-name="Source_20_Text">n</text:span> wird auf die Textzeile <text:span text:style-name="Source_20_Text">m</text:span> kopiert und löscht evtl. dort stehenden Text. Die alte Zeile <text:span text:style-name="Source_20_Text">n</text:span> wird nicht gelöscht! Somit kann eine Textzeile an eine andere Position des Textfiles gesetzt werden. Falls eine Zeilennummer <text:span text:style-name="Source_20_Text">n</text:span> nicht existiert, geschieht nichts.</text:p>
      <text:h text:style-name="Heading_20_4" text:outline-level="4"><text:bookmark-start text:name="__RefHeading___Toc6755_1452676818"/>Kommando <text:span text:style-name="Source_20_Text">N n,m</text:span> (Renumber)<text:bookmark-end text:name="__RefHeading___Toc6755_1452676818"/></text:h>
      <text:p text:style-name="Text_20_body">Durch <text:span text:style-name="Source_20_Text">N</text:span> wird dass Textfile neu durchnummeriert. Die neue erste Zeilennummer ist <text:span text:style-name="Source_20_Text">n</text:span>, der Abstand <text:span text:style-name="Source_20_Text">m</text:span>. Sowohl <text:span text:style-name="Source_20_Text">m</text:span> als auch <text:span text:style-name="Source_20_Text">n</text:span> müssen angegeben werden. Wenn die Neunummerierung eine Zeilennummer größer als 32767 erzeugen müsste, wird die alte Nummerierung beibehalten.</text:p>
      <text:h text:style-name="Heading_20_4" text:outline-level="4"><text:bookmark-start text:name="__RefHeading___Toc6757_1452676818"/>Kommando <text:span text:style-name="Source_20_Text">F n,m,f,s</text:span> (Find)<text:bookmark-end text:name="__RefHeading___Toc6757_1452676818"/></text:h>
      <text:p text:style-name="Text_20_body">Der Text im Zeilenbereich <text:span text:style-name="Source_20_Text">n</text:span> &lt; x &lt; <text:span text:style-name="Source_20_Text">m</text:span> wird nach dem String <text:span text:style-name="Source_20_Text">f</text:span> durchsucht. Wird <text:span text:style-name="Source_20_Text">f</text:span> gefunden, so wird die entsprechende Zeile angezeigt und der Edit-Modus (s. unten) aufgerufen. Weitere Kommandos im Edit-Modus können verwendet werden, um nach einem weiteren Vorkommen von <text:span text:style-name="Source_20_Text">f</text:span> im definierten Zeilenbereich zu suchen oder um den gerade gefundenen String <text:span text:style-name="Source_20_Text">f</text:span> durch den String <text:span text:style-name="Source_20_Text">s</text:span> zu ersetzen und dann nach einem weiteren Auftreten von <text:span text:style-name="Source_20_Text">f</text:span> zu suchen (s. auch unten). Beachten Sie, dass der Zeilenbereich und die Strings durch vorhergehende andere Kommandos gesetzt sein können, so dass die Suche u. U. nur durch '<text:span text:style-name="Source_20_Text">F</text:span>' initiiert werden kann.</text:p>
      <text:h text:style-name="Heading_20_4" text:outline-level="4"><text:bookmark-start text:name="__RefHeading___Toc6759_1452676818"/>Kommando <text:span text:style-name="Source_20_Text">E n</text:span> (Edit)<text:bookmark-end text:name="__RefHeading___Toc6759_1452676818"/></text:h>
      <text:p text:style-name="Text_20_body">Die Zeile mit der Nummer <text:span text:style-name="Source_20_Text">n</text:span> wird editiert. Falls <text:span text:style-name="Source_20_Text">n</text:span> nicht existiert, geschieht nichts. Anderenfalls wird die Zeile in einen Puffer kopiert und auf dem Bildschirm angezeigt. Die Zeilennummer wird darunter nochmals angezeigt und der Edit-Modus aufgerufen. Alle nachfolgenden Handlungen finden im Puffer, nicht im eigentlichen Text statt. Somit kann der ursprüngliche Zustand jederzeit wieder hergestellt werden. In diesem Modus stellt man sich einen Zeiger vor, der sich, beginnend vom ersten Zeichen, durch die Zeile bewegt.</text:p>
      <text:p text:style-name="Text_20_body"/>
      <text:p text:style-name="Text_20_body"><text:soft-page-break/>Folgende Sub-Kommandos werden zum Editieren der Zeile benutzt:</text:p>
      <table:table table:name="Tabelle20" table:style-name="Tabelle20">
        <table:table-column table:style-name="Tabelle20.A"/>
        <table:table-column table:style-name="Tabelle20.B"/>
        <table:table-row>
          <table:table-cell office:value-type="string">
            <text:p text:style-name="P20"><text:span text:style-name="Source_20_Text">→</text:span></text:p>
          </table:table-cell>
          <table:table-cell office:value-type="string">
            <text:p text:style-name="Standard">bewegt den Text-Zeiger ein Zeichen weiter</text:p>
          </table:table-cell>
        </table:table-row>
        <table:table-row>
          <table:table-cell office:value-type="string">
            <text:p text:style-name="Standard"><text:span text:style-name="Source_20_Text">←</text:span></text:p>
          </table:table-cell>
          <table:table-cell office:value-type="string">
            <text:p text:style-name="Standard">bewegt den Text-Zeiger ein Zeichen zurück (höchstens bis zum ersten Zeichen der Zeile)</text:p>
          </table:table-cell>
        </table:table-row>
        <table:table-row>
          <table:table-cell office:value-type="string">
            <text:p text:style-name="Standard"><text:span text:style-name="Source_20_Text">^</text:span></text:p>
          </table:table-cell>
          <table:table-cell office:value-type="string">
            <text:p text:style-name="Standard">bewegt den Text-Zeiger zur nächsten TAB-Position, (aber höchstens bis zum Zeilenende)</text:p>
          </table:table-cell>
        </table:table-row>
        <table:table-row>
          <table:table-cell office:value-type="string">
            <text:p text:style-name="Standard"><text:span text:style-name="Source_20_Text">ENTER</text:span></text:p>
          </table:table-cell>
          <table:table-cell office:value-type="string">
            <text:p text:style-name="Standard">die editierte Zeile wird so übernommen</text:p>
          </table:table-cell>
        </table:table-row>
        <table:table-row>
          <table:table-cell office:value-type="string">
            <text:p text:style-name="Standard"><text:span text:style-name="Source_20_Text">Q</text:span></text:p>
          </table:table-cell>
          <table:table-cell office:value-type="string">
            <text:p text:style-name="Standard">(QUIT) bricht das Editieren ab, d.h. belässt die Zeile in ihrem alten Zustand (vor dem Aufruf des Edit-Modus)</text:p>
          </table:table-cell>
        </table:table-row>
        <table:table-row>
          <table:table-cell office:value-type="string">
            <text:p text:style-name="Standard"><text:span text:style-name="Source_20_Text">R</text:span></text:p>
          </table:table-cell>
          <table:table-cell office:value-type="string">
            <text:p text:style-name="Standard">("RELOAD") lädt den Textpuffer nochmals mit der alten Version der Zeile, d.h. macht alle Änderungen rückgängig</text:p>
          </table:table-cell>
        </table:table-row>
        <table:table-row>
          <table:table-cell office:value-type="string">
            <text:p text:style-name="Standard"><text:span text:style-name="Source_20_Text">L</text:span></text:p>
          </table:table-cell>
          <table:table-cell office:value-type="string">
            <text:p text:style-name="Standard">("LIST") listet den Rest der editierten Zeile, d.h. die Zeile rechts von der gegenwärtigen Zeigerposition. Der Edit-Modus bleibt bestehen und der Zeiger wird wieder an den Beginn der Zeile gesetzt.</text:p>
          </table:table-cell>
        </table:table-row>
        <table:table-row>
          <table:table-cell office:value-type="string">
            <text:p text:style-name="Standard"><text:span text:style-name="Source_20_Text">K</text:span></text:p>
          </table:table-cell>
          <table:table-cell office:value-type="string">
            <text:p text:style-name="Standard">("KILL") löscht das Zeichen an der aktuellen Zeigerposition</text:p>
          </table:table-cell>
        </table:table-row>
        <table:table-row>
          <table:table-cell office:value-type="string">
            <text:p text:style-name="Standard"><text:span text:style-name="Source_20_Text">Z</text:span></text:p>
          </table:table-cell>
          <table:table-cell office:value-type="string">
            <text:p text:style-name="Standard">löscht alle Zeichen ab (und einschließlich) der aktuellen Zeigerposition bis zum Ende der Zeile</text:p>
          </table:table-cell>
        </table:table-row>
        <table:table-row>
          <table:table-cell office:value-type="string">
            <text:p text:style-name="Standard"><text:span text:style-name="Source_20_Text">F</text:span></text:p>
          </table:table-cell>
          <table:table-cell office:value-type="string">
            <text:p text:style-name="Standard">("FIND") sucht das nächste Auftreten des vorher mit dem Kommando '<text:span text:style-name="Source_20_Text">F</text:span>' definierten Suchstring <text:span text:style-name="Source_20_Text">f</text:span> (s. oben). Dieses Subkommando schließt gleichzeitig das Editieren der gerade aufgerufenen Zeile ab (unter Beibehaltung aller Änderungen), falls der String <text:span text:style-name="Source_20_Text">f</text:span> in dieser Zeile nicht noch einmal auftritt. Wenn (im definierten Zeilenbereich), wird diese Zeile zum Editieren in den Puffer geladen und der Text-Zeiger auf den Beginn der Zeile gesetzt.</text:p>
          </table:table-cell>
        </table:table-row>
        <table:table-row>
          <table:table-cell office:value-type="string">
            <text:p text:style-name="Standard"><text:span text:style-name="Source_20_Text">S</text:span></text:p>
          </table:table-cell>
          <table:table-cell office:value-type="string">
            <text:p text:style-name="Standard">("SUBSTITUTE") ersetzt den eben gefundenen String <text:span text:style-name="Source_20_Text">f</text:span> durch den vorher definierten Austauschstring <text:span text:style-name="Source_20_Text">s</text:span> und führt dann automatisch das Sub-Kommando '<text:span text:style-name="Source_20_Text">F</text:span>' aus, d.h. sucht nach dem nächsten Auftreten von <text:span text:style-name="Source_20_Text">f</text:span>. '<text:span text:style-name="Source_20_Text">S</text:span>' wird also zusammen mit '<text:span text:style-name="Source_20_Text">F</text:span>' benutzt, um sich durch Textfile hindurchzuarbeiten und jeden String <text:span text:style-name="Source_20_Text">f</text:span> nach Belieben gegen String <text:span text:style-name="Source_20_Text">s</text:span> auszutauschen (weiter mit '<text:span text:style-name="Source_20_Text">S</text:span>') oder auch nicht (weiter mit '<text:span text:style-name="Source_20_Text">F</text:span>').</text:p>
          </table:table-cell>
        </table:table-row>
      </table:table>
      <text:p text:style-name="Standard"/>
      <text:p text:style-name="Text_20_body"><text:span text:style-name="Strong_20_Emphasis">Achtung</text:span></text:p>
      <text:p text:style-name="Text_20_body">Das Sub-Kommando '<text:span text:style-name="Source_20_Text">S</text:span>' darf nur unmittelbar nach einem '<text:span text:style-name="Source_20_Text">F</text:span>'-Sub-Kommando oder '<text:span text:style-name="Source_20_Text">S</text:span>'-Sub-Kommando benutzt werden.</text:p>
      <table:table table:name="Tabelle21" table:style-name="Tabelle21">
        <table:table-column table:style-name="Tabelle21.A"/>
        <table:table-column table:style-name="Tabelle21.B"/>
        <table:table-row>
          <table:table-cell office:value-type="string">
            <text:p text:style-name="Standard">I</text:p>
          </table:table-cell>
          <table:table-cell office:value-type="string">
            <text:p text:style-name="Standard">("INSERT") fügt Zeichen an der gegenwärtigen Zeigerposition ein. Dieser Sub-Modus wird beibehalten, bis man mit <text:span text:style-name="Source_20_Text">ENTER</text:span> in den normalen Edit-Modus zurückgekehrt. Der Zeiger weist dann auf die Position hinter dem letzten eingefügten Zeichen. In diesem Sub-Modus löscht <text:span text:style-name="Source_20_Text">DELETE</text:span> das Zeichen vor dem Zeiger aus dem Textpuffer, während '<text:span text:style-name="Source_20_Text">^</text:span>' den Zeiger bis zur nächsten TAB-Position vorrücken lässt, wobei Leerzeichen eingefügt werden.</text:p>
          </table:table-cell>
        </table:table-row>
        <table:table-row>
          <table:table-cell office:value-type="string">
            <text:p text:style-name="Standard">X</text:p>
          </table:table-cell>
          <table:table-cell office:value-type="string">
            <text:p text:style-name="Standard">setzt den Zeiger auf das Ende der Zeile und ruft automatisch den <text:span text:style-name="Source_20_Text">I</text:span>-Sub-Modus auf (s. oben)</text:p>
          </table:table-cell>
        </table:table-row>
        <table:table-row>
          <table:table-cell office:value-type="string">
            <text:p text:style-name="Standard">C</text:p>
          </table:table-cell>
          <table:table-cell office:value-type="string">
            <text:p text:style-name="Standard">("CHANGE") Das Zeichen an der aktuellen Zeigerposition wird durch das eingegebene überschrieben und der Zeiger eine Stelle weiter gerückt. Auch dieser Sub-Modus wird beibehalten, bis man durch Drücken von <text:span text:style-name="Source_20_Text">ENTER</text:span> in den normalen EDIT-Modus zurückkehrt. Der Zeiger weist dann auf die Position hinter dem letzten geänderten Zeichen. <text:span text:style-name="Source_20_Text">DELETE</text:span> bewegt den Zeiger in diesem Sub-Modus einfach ein Zeichen nach links. '<text:span text:style-name="Source_20_Text">→</text:span>' hat keine Wirkung.</text:p>
          </table:table-cell>
        </table:table-row>
      </table:table>
      <text:p text:style-name="Standard"><text:soft-page-break/></text:p>
      <text:h text:style-name="Heading_20_3" text:outline-level="3"><text:bookmark-start text:name="__RefHeading___Toc107_1849558913"/>Tonband-Kommandos<text:bookmark-end text:name="__RefHeading___Toc107_1849558913"/></text:h>
      <text:p text:style-name="Text_20_body">Der Text kann durch die Kommandos '<text:span text:style-name="Source_20_Text">P</text:span>' und '<text:span text:style-name="Source_20_Text">G</text:span>' auf Band gesichert bzw. vom Band geladen werden.</text:p>
      <text:h text:style-name="Heading_20_4" text:outline-level="4"><text:bookmark-start text:name="__RefHeading___Toc6761_1452676818"/>Kommando <text:span text:style-name="Source_20_Text">P n,m,s</text:span> (Put)<text:bookmark-end text:name="__RefHeading___Toc6761_1452676818"/></text:h>
      <text:p text:style-name="P25">Der Zeilenbereich <text:span text:style-name="Source_20_Text">n</text:span> &lt; x &lt; <text:span text:style-name="Source_20_Text">m</text:span> wird im KC-PASCAL-Format unter dem <text:span text:style-name="T31">Datei</text:span>name<text:span text:style-name="T31">n</text:span> <text:span text:style-name="Source_20_Text">s</text:span> auf Band gesichert. Beachten Sie, dass die Argumente durch vorhergehende Kommandos gesetzt sein können (s. "<text:span text:style-name="Source_20_Text">V</text:span>"). Vor Abschluss dieses Kommandos schalten Sie bitte den Kassettenrecorder auf Aufnahme.</text:p>
      <text:h text:style-name="Heading_20_4" text:outline-level="4"><text:bookmark-start text:name="__RefHeading___Toc6763_1452676818"/>Kommando <text:span text:style-name="Source_20_Text">G ,,s</text:span> (Get)<text:bookmark-end text:name="__RefHeading___Toc6763_1452676818"/></text:h>
      <text:p text:style-name="Text_20_body">Das Band wird nach einem File in KC-PASCAL-Format mit dem Namen <text:span text:style-name="Source_20_Text">s</text:span> abgesucht. Ist der richtige Filename gefunden, wird der Text in den Speicher geladen. Gefundene Files werden angezeigt. Fragezeichen im gesuchten Filenamen führen zum Überlesen des jeweiligen Zeichens im gesuchten File. Wird '<text:span text:style-name="Source_20_Text">????????</text:span>' eingegeben, wird das nächste File eingelesen, gleich welchen Namen es besitzt (Typ 'PAS' ist erforderlich). Das Einlesen kann durch <text:span text:style-name="Source_20_Text">BREAK</text:span> abgebrochen werden.</text:p>
      <text:p text:style-name="Text_20_body">Wenn bereits ein Textfile im Speicher vorhanden ist, wird das neu geladene File an das existierende Textfile angeh<text:span text:style-name="T31">ä</text:span>ng<text:span text:style-name="T31">t</text:span> und danach der gesamte Text, beginnend mit Zeilennummer 1 in 1er Schritten, neu durchnummeriert.</text:p>
      <text:h text:style-name="Heading_20_3" text:outline-level="3"><text:bookmark-start text:name="__RefHeading___Toc109_1849558913"/>Compilieren und Probelauf<text:bookmark-end text:name="__RefHeading___Toc109_1849558913"/></text:h>
      <text:h text:style-name="Heading_20_4" text:outline-level="4"><text:bookmark-start text:name="__RefHeading___Toc6765_1452676818"/>Kommando <text:span text:style-name="Source_20_Text">C n</text:span> (Compilieren)<text:bookmark-end text:name="__RefHeading___Toc6765_1452676818"/></text:h>
      <text:p text:style-name="Text_20_body">Der Text wird, beginnend mit Zeilennummer <text:span text:style-name="Source_20_Text">n</text:span>, compiliert. Wird keine Zeilennummer angegeben, beginnt die Compilierung mit der ersten existierenden Zeile. Bei fehlerfreier Übersetzung erfolgt die Abfrage '<text:span text:style-name="Source_20_Text">Lauf?</text:span>'. Bei Beantwortung mit '<text:span text:style-name="Source_20_Text">J</text:span>' wird das Programm ausgeführt.</text:p>
      <text:h text:style-name="Heading_20_4" text:outline-level="4"><text:bookmark-start text:name="__RefHeading___Toc6767_1452676818"/>Kommando <text:span text:style-name="Source_20_Text">R</text:span> (Run)<text:bookmark-end text:name="__RefHeading___Toc6767_1452676818"/></text:h>
      <text:p text:style-name="Text_20_body">Der eben erzeugte Objekt-Code wird gestartet, allerdings nur, wenn der Quelltext mittlerweile nicht erweitert wurde.</text:p>
      <text:h text:style-name="Heading_20_4" text:outline-level="4"><text:bookmark-start text:name="__RefHeading___Toc6769_1452676818"/>Kommando <text:span text:style-name="Source_20_Text">T n,m,s,</text:span><text:span text:style-name="Source_20_Text"><text:span text:style-name="T56">a</text:span></text:span> (Translate)<text:bookmark-end text:name="__RefHeading___Toc6769_1452676818"/></text:h>
      <text:p text:style-name="Text_20_body">Der Quelltext wird wiederum, beginnend mit Zeile <text:span text:style-name="Source_20_Text">n</text:span> (bzw. ab der ersten existierenden Zeile), bis Zeile <text:span text:style-name="Source_20_Text">m</text:span> (wenn angegeben) compiliert. War die Übersetzung erfolgreich, wird die Frage '<text:span text:style-name="Source_20_Text">Ok?</text:span>' ausgegeben. Antwortet man mit '<text:span text:style-name="Source_20_Text">J</text:span>', wird der erzeugten Objekt-Code an das Ende der Runtimes verschoben und zusammen mit diesen auf Band gespeichert (Dabei wird der Compiler zerstört!). Schalten Sie vor Beantworten der Frage mit '<text:span text:style-name="Source_20_Text">J</text:span>' ihr Magnetbandgerät auf Aufnahme. Als Filename wird '<text:span text:style-name="Source_20_Text">s</text:span>' verwendet, oder wenn nicht angegeben der letzte definierte Suchstring. Wird dieses File zu <text:soft-page-break/>einem späteren Zeitpunkt in den Rechner geladen, kann es als wie üblich unter dem Namen des zuletzt verwendeten String <text:span text:style-name="Source_20_Text">S1</text:span> wieder gestartet werden. Beachten Sie, dass sich der Objekt-Code nach der Antwort '<text:span text:style-name="Source_20_Text">J</text:span>' am Ende des Runtimes befindet, d.h. dass der Compiler nach Ausführung von '<text:span text:style-name="Source_20_Text">T</text:span>' neu geladen werden muss. Das bringt jedoch keine Probleme, da Sie ja wahrscheinlich nur ein vollständig ausgetestetes, fehlerfreies Programm mit '<text:span text:style-name="Source_20_Text">T</text:span>' übersetzen. <text:s/>Antwortet man auf die Frage '<text:span text:style-name="Source_20_Text">Ok?</text:span>' nicht mit '<text:span text:style-name="Source_20_Text">J</text:span>', sondern mit einer anderen Taste, wird der Objekt-Code nicht verschoben und die Steuerung an den Editor zurückgegeben.</text:p>
      <text:p text:style-name="P46"><text:span text:style-name="T56">Ab KC-PASCAL 5.2 kann mit dem optionalen vierten Parameter </text:span><text:span text:style-name="Source_20_Text">a</text:span><text:span text:style-name="T56"> der Autostart der generierten KCC-Datei aktiviert werden. Dazu muss an dieser Stelle eine 1 angegeben werden.</text:span></text:p>
      <text:h text:style-name="Heading_20_3" text:outline-level="3"><text:bookmark-start text:name="__RefHeading___Toc111_1849558913"/>Systemzellen<text:bookmark-end text:name="__RefHeading___Toc111_1849558913"/></text:h>
      <text:h text:style-name="P67" text:outline-level="4"><text:bookmark-start text:name="__RefHeading___Toc6771_1452676818"/>Kommando <text:span text:style-name="Source_20_Text">V</text:span> (Editorvariablen)<text:bookmark-end text:name="__RefHeading___Toc6771_1452676818"/></text:h>
      <text:p text:style-name="Text_20_body">Mit diesem Kommando werden die Editorvariablen in der Reihenfolge <text:span text:style-name="Source_20_Text">N1</text:span>, <text:span text:style-name="Source_20_Text">N2</text:span>, <text:span text:style-name="Source_20_Text">S1</text:span>, <text:span text:style-name="Source_20_Text">S2</text:span> angezeigt. Als Trennzeichen wird das aktuell vereinbarte verwendet. Damit kommen die aktuellen Zeilennummern und Suchstrings (auch für Tape-E/A) zur Anzeige.</text:p>
      <text:h text:style-name="Heading_20_4" text:outline-level="4"><text:bookmark-start text:name="__RefHeading___Toc6773_1452676818"/>Kommando X (Systemzellen)<text:bookmark-end text:name="__RefHeading___Toc6773_1452676818"/></text:h>
      <text:p text:style-name="Text_20_body">Es werden die Systemzellen in folgender Reihenfolge angezeigt:</text:p>
      <text:p text:style-name="Preformatted_20_Text">wwww xxxx yyyy zzzz</text:p>
      <text:p text:style-name="Preformatted_20_Text"/>
      <text:p text:style-name="Text_20_body">Dabei ist <text:span text:style-name="Source_20_Text">wwww</text:span> die Anfangsadresse des PASCAL-Quelltextes, <text:span text:style-name="Source_20_Text">xxxx</text:span> die Endadresse des Quelltextes, <text:span text:style-name="Source_20_Text">yyyy</text:span> die Endadresse des Arbeitsspeichers und <text:span text:style-name="Source_20_Text">zzzz</text:span> die Endadresse des Arbeitsspeichers für übersetzte Programme nach dem Kommando '<text:span text:style-name="Source_20_Text">T</text:span>'.</text:p>
      <text:h text:style-name="Heading_20_4" text:outline-level="4"><text:bookmark-start text:name="__RefHeading___Toc6775_1452676818"/>Kommando <text:span text:style-name="Source_20_Text">Z n,m</text:span> (Systemzellen stellen)<text:bookmark-end text:name="__RefHeading___Toc6775_1452676818"/></text:h>
      <text:p text:style-name="Text_20_body">Mit diesem Kommando können Sie die Endadresse des Arbeitsspeichers <text:span text:style-name="Source_20_Text">n</text:span> (s. <text:span text:style-name="Source_20_Text">xxxx</text:span> oben) und die Endadresse des Arbeitsspeichers <text:span text:style-name="Source_20_Text">m</text:span> für übersetzte Programm neu wählen. Damit ist es möglich, Speicherbereich für andere Aufgaben zu reservieren, aber auch die übersetzten Programme in Rechnersystemen mit weniger RAM laufen zu lassen. Die Adresseingabe erfolgt dezimal. Nach dem Kommando erfolgt ein Neustart des KC-PASCAL.</text:p>
      <text:p text:style-name="Text_20_body"><text:span text:style-name="Strong_20_Emphasis">ACHTUNG!</text:span></text:p>
      <text:p text:style-name="Text_20_body">Liegen die eingegebenen Werte nicht im RAM, im Compiler usw., hat das einen unweigerlichen Systemabsturz zur Folge. <text:s/>Nach Ausführen des Kommando '<text:span text:style-name="Source_20_Text">Z</text:span>' wird ein Kaltstart ausgeführt und vorhandener Quelltext gelöscht. Benutzen Sie dieses Kommando nur nach dem Kaltstart oder nachdem Sie Ihr Programm abgespeichert haben.</text:p>
      <text:h text:style-name="Heading_20_3" text:outline-level="3"><text:bookmark-start text:name="__RefHeading___Toc113_1849558913"/><text:soft-page-break/>Weitere Kommandos<text:bookmark-end text:name="__RefHeading___Toc113_1849558913"/></text:h>
      <text:h text:style-name="Heading_20_4" text:outline-level="4"><text:bookmark-start text:name="__RefHeading___Toc6777_1452676818"/>Kommando <text:span text:style-name="Source_20_Text">B</text:span> (Betriebssystem)<text:bookmark-end text:name="__RefHeading___Toc6777_1452676818"/></text:h>
      <text:p text:style-name="Text_20_body">Bewirkt eine Rückkehr zum Betriebssystem.</text:p>
      <text:h text:style-name="Heading_20_4" text:outline-level="4"><text:bookmark-start text:name="__RefHeading___Toc6779_1452676818"/>Kommando <text:span text:style-name="Source_20_Text">O n,m,s</text:span> (Tokenisieren)<text:bookmark-end text:name="__RefHeading___Toc6779_1452676818"/></text:h>
      <text:p text:style-name="Text_20_body">KC-PASCAL speichert alle reservierten Worte in tokenisierter Form (1 Byte) und führende Leerzeichen einer Zeile in einem weiteren Byte. Wenn Sie jedoch Text in vollständiger, ausgeschriebener Form vorliegen haben (vielleicht von einem anderen Editor oder z.B. TURBO-PASCAL-Quellprogramme), kann dieser mit dem Kommando <text:span text:style-name="Source_20_Text">O</text:span> tokenisiert werden. <text:span text:style-name="T32">D</text:span>er Text wird in der Quellform in einen Puffer gelesen und danach in tokenisierten Form zurück geschrieben. Das dauert u.U. eine gewisse Zeit. Dabei ist <text:span text:style-name="Source_20_Text">n</text:span> die erste neue Zeilennummer, die aus dem File mit Namen <text:span text:style-name="Source_20_Text">s</text:span> gebildet wird. Ist <text:span text:style-name="Source_20_Text">m</text:span> = 1, werden alle Buchstaben des File <text:span text:style-name="Source_20_Text">s</text:span> in Großbuchstaben gewandelt. Ist <text:span text:style-name="Source_20_Text">m</text:span> = 2, bleibt die ursprüngliche Schreibweise erhalten.</text:p>
      <text:p text:style-name="Text_20_body">Beachten Sie bitte, dass die Programmzeilen durch <text:span text:style-name="Source_20_Text">CR/LF</text:span> (0dh, 0ah) getrennt sein müssen und die Datei mit <text:span text:style-name="Source_20_Text">EOF</text:span> (01ah) enden muss (n-Mode bei WordStar bzw. TP). Weiterhin muss die Datei einen Vorblock (080h Byte) analog dem KC-Kassettenverfahren besitzen. Zur Tokenisierung von TURBO-PASCAL-Quellen sollten Sie die CP/M-Version von KC-PASCAL benutzen, da dabei beim Einlesen von Diskette automatisch eine Unterscheidung zwischen Quelltext und tokenisierter Form erfolgt und der Vorblock nicht benötigt wird. Die Länge des Quelltextes darf 16 KByte nicht übersteigen.</text:p>
      <text:h text:style-name="Heading_20_4" text:outline-level="4"><text:bookmark-start text:name="__RefHeading___Toc6781_1452676818"/>Kommando <text:span text:style-name="Source_20_Text">S ,,d</text:span> (Sep<text:span text:style-name="T32">a</text:span>rator-Delemiter)<text:bookmark-end text:name="__RefHeading___Toc6781_1452676818"/></text:h>
      <text:p text:style-name="Text_20_body">Dieses Kommando ermöglicht eine Abänderung des Trennzeichens, welches zur Abgrenzung der Argumente in der Kommandozeile benutzt wird. Als neues Trennzeichen wird das erste Zeichen des Strings <text:span text:style-name="Source_20_Text">d</text:span> benutzt. Nach dem Kaltstart wird das Komma benutzt. Beachten Sie, dass ein definiertes Trennzeichen solange benutzt werden muss (auch im '<text:span text:style-name="Source_20_Text">S</text:span>'-Kommando), bis ein neues definiert wurde.</text:p>
      <text:p text:style-name="Standard">Ein Leerzeichen darf nicht als Trennzeichen definiert werden.</text:p>
      <text:h text:style-name="Heading_20_1" text:outline-level="1"><text:bookmark-start text:name="__RefHeading___Toc115_1849558913"/>Fehlermeldungen<text:bookmark-end text:name="__RefHeading___Toc115_1849558913"/></text:h>
      <text:h text:style-name="Heading_20_2" text:outline-level="2"><text:bookmark-start text:name="__RefHeading___Toc117_1849558913"/>Compiler-Fehlermeldungen<text:bookmark-end text:name="__RefHeading___Toc117_1849558913"/></text:h>
      <table:table table:name="Tabelle22" table:style-name="Tabelle22">
        <table:table-column table:style-name="Tabelle22.A"/>
        <table:table-column table:style-name="Tabelle22.B"/>
        <table:table-row>
          <table:table-cell office:value-type="string">
            <text:p text:style-name="Standard">1.</text:p>
          </table:table-cell>
          <table:table-cell office:value-type="string">
            <text:p text:style-name="Standard">Zahl zu groß</text:p>
          </table:table-cell>
        </table:table-row>
        <table:table-row>
          <table:table-cell office:value-type="string">
            <text:p text:style-name="Standard">2.</text:p>
          </table:table-cell>
          <table:table-cell office:value-type="string">
            <text:p text:style-name="Standard"><text:span text:style-name="T33">S</text:span>emikolon wird erwartet</text:p>
          </table:table-cell>
        </table:table-row>
        <table:table-row>
          <table:table-cell office:value-type="string">
            <text:p text:style-name="Standard">3.</text:p>
          </table:table-cell>
          <table:table-cell office:value-type="string">
            <text:p text:style-name="Standard">Nichtdeklarierter Name</text:p>
          </table:table-cell>
        </table:table-row>
        <table:table-row>
          <table:table-cell office:value-type="string">
            <text:p text:style-name="Standard">4.</text:p>
          </table:table-cell>
          <table:table-cell office:value-type="string">
            <text:p text:style-name="Standard">Name wird erwartet</text:p>
          </table:table-cell>
        </table:table-row>
        <table:table-row>
          <table:table-cell office:value-type="string">
            <text:p text:style-name="Standard">5.</text:p>
          </table:table-cell>
          <table:table-cell office:value-type="string">
            <text:p text:style-name="Standard">In der Deklaration einer Konstanten muss '<text:span text:style-name="Source_20_Text">=</text:span>' und nicht '<text:span text:style-name="Source_20_Text">:=</text:span> ' verwendet werden.</text:p>
          </table:table-cell>
        </table:table-row>
        <table:table-row>
          <table:table-cell office:value-type="string">
            <text:p text:style-name="Standard">6.</text:p>
          </table:table-cell>
          <table:table-cell office:value-type="string">
            <text:p text:style-name="Standard">'<text:span text:style-name="Source_20_Text">=</text:span>' wird erwartet</text:p>
          </table:table-cell>
        </table:table-row>
        <table:table-row>
          <table:table-cell office:value-type="string">
            <text:p text:style-name="Standard">7.</text:p>
          </table:table-cell>
          <table:table-cell office:value-type="string">
            <text:p text:style-name="Standard">Eine Anweisung darf nicht mit diesem Namen beginnen.</text:p>
          </table:table-cell>
        </table:table-row>
        <table:table-row>
          <table:table-cell office:value-type="string">
            <text:p text:style-name="Standard">8.</text:p>
          </table:table-cell>
          <table:table-cell office:value-type="string">
            <text:p text:style-name="Standard">'<text:span text:style-name="Source_20_Text">:=</text:span>' wird erwartet</text:p>
          </table:table-cell>
        </table:table-row>
        <table:table-row>
          <table:table-cell office:value-type="string">
            <text:p text:style-name="Standard">9.</text:p>
          </table:table-cell>
          <table:table-cell office:value-type="string">
            <text:p text:style-name="Standard">'<text:span text:style-name="Source_20_Text">)</text:span>' wird erwartet</text:p>
          </table:table-cell>
        </table:table-row>
        <table:table-row>
          <table:table-cell office:value-type="string">
            <text:p text:style-name="Standard">10.</text:p>
          </table:table-cell>
          <table:table-cell office:value-type="string">
            <text:p text:style-name="Standard">Falscher Typ</text:p>
          </table:table-cell>
        </table:table-row>
        <table:table-row>
          <table:table-cell office:value-type="string">
            <text:p text:style-name="Standard">11.</text:p>
          </table:table-cell>
          <table:table-cell office:value-type="string">
            <text:p text:style-name="Standard">'<text:span text:style-name="Source_20_Text">.</text:span>' wird erwartet</text:p>
          </table:table-cell>
        </table:table-row>
        <table:table-row>
          <table:table-cell office:value-type="string">
            <text:p text:style-name="Standard">12.</text:p>
          </table:table-cell>
          <table:table-cell office:value-type="string">
            <text:p text:style-name="Standard">Ein Faktor wird erwartet.</text:p>
          </table:table-cell>
        </table:table-row>
        <table:table-row>
          <table:table-cell office:value-type="string">
            <text:p text:style-name="Standard">13.</text:p>
          </table:table-cell>
          <table:table-cell office:value-type="string">
            <text:p text:style-name="Standard">Eine Konstante wird erwartet.</text:p>
          </table:table-cell>
        </table:table-row>
        <table:table-row>
          <table:table-cell office:value-type="string">
            <text:p text:style-name="Standard">14.</text:p>
          </table:table-cell>
          <table:table-cell office:value-type="string">
            <text:p text:style-name="Standard">Dieser Name ist keine Konstante.</text:p>
          </table:table-cell>
        </table:table-row>
        <table:table-row>
          <table:table-cell office:value-type="string">
            <text:p text:style-name="Standard">15.</text:p>
          </table:table-cell>
          <table:table-cell office:value-type="string">
            <text:p text:style-name="Standard">'<text:span text:style-name="Source_20_Text">THEN</text:span>' wird erwartet</text:p>
          </table:table-cell>
        </table:table-row>
        <table:table-row>
          <table:table-cell office:value-type="string">
            <text:p text:style-name="Standard">16.</text:p>
          </table:table-cell>
          <table:table-cell office:value-type="string">
            <text:p text:style-name="Standard">'<text:span text:style-name="Source_20_Text">DO</text:span>' wird erwartet</text:p>
          </table:table-cell>
        </table:table-row>
        <table:table-row>
          <table:table-cell office:value-type="string">
            <text:p text:style-name="Standard">17.</text:p>
          </table:table-cell>
          <table:table-cell office:value-type="string">
            <text:p text:style-name="P26">'<text:span text:style-name="Source_20_Text">TO</text:span>' oder '<text:span text:style-name="Source_20_Text">DOWNTO</text:span>' wird erwartet</text:p>
          </table:table-cell>
        </table:table-row>
        <table:table-row>
          <table:table-cell office:value-type="string">
            <text:p text:style-name="Standard">18.</text:p>
          </table:table-cell>
          <table:table-cell office:value-type="string">
            <text:p text:style-name="Standard">'<text:span text:style-name="Source_20_Text">(</text:span>' wird erwartet</text:p>
          </table:table-cell>
        </table:table-row>
        <table:table-row>
          <table:table-cell office:value-type="string">
            <text:p text:style-name="Standard">19.</text:p>
          </table:table-cell>
          <table:table-cell office:value-type="string">
            <text:p text:style-name="Standard">Dieser Ausdrucktyp kann nicht geschrieben werden.</text:p>
          </table:table-cell>
        </table:table-row>
        <table:table-row>
          <table:table-cell office:value-type="string">
            <text:p text:style-name="Standard">20.</text:p>
          </table:table-cell>
          <table:table-cell office:value-type="string">
            <text:p text:style-name="Standard">'<text:span text:style-name="Source_20_Text">OF</text:span>' wird erwartet</text:p>
          </table:table-cell>
        </table:table-row>
        <table:table-row>
          <table:table-cell office:value-type="string">
            <text:p text:style-name="Standard">21.</text:p>
          </table:table-cell>
          <table:table-cell office:value-type="string">
            <text:p text:style-name="Standard">'<text:span text:style-name="Source_20_Text">,</text:span>' wird erwartet</text:p>
          </table:table-cell>
        </table:table-row>
        <table:table-row>
          <table:table-cell office:value-type="string">
            <text:p text:style-name="Standard">22.</text:p>
          </table:table-cell>
          <table:table-cell office:value-type="string">
            <text:p text:style-name="Standard">'<text:span text:style-name="Source_20_Text">:</text:span>' wird erwartet</text:p>
          </table:table-cell>
        </table:table-row>
        <table:table-row>
          <table:table-cell office:value-type="string">
            <text:p text:style-name="Standard">23.</text:p>
          </table:table-cell>
          <table:table-cell office:value-type="string">
            <text:p text:style-name="Standard">'<text:span text:style-name="Source_20_Text">PROGRAM</text:span>' wird erwartet</text:p>
          </table:table-cell>
        </table:table-row>
        <table:table-row>
          <table:table-cell office:value-type="string">
            <text:p text:style-name="Standard">24.</text:p>
          </table:table-cell>
          <table:table-cell office:value-type="string">
            <text:p text:style-name="Standard">Eine Variable wird erwartet, da der Parameter ein variabler Parameter ist.</text:p>
          </table:table-cell>
        </table:table-row>
        <table:table-row>
          <table:table-cell office:value-type="string">
            <text:p text:style-name="Standard">25.</text:p>
          </table:table-cell>
          <table:table-cell office:value-type="string">
            <text:p text:style-name="Standard">'<text:span text:style-name="Source_20_Text">BEGIN</text:span>' wird erwartet</text:p>
          </table:table-cell>
        </table:table-row>
        <table:table-row>
          <table:table-cell office:value-type="string">
            <text:p text:style-name="Standard">26.</text:p>
          </table:table-cell>
          <table:table-cell office:value-type="string">
            <text:p text:style-name="Standard">Bei diesem <text:span text:style-name="Source_20_Text">READ</text:span>-Aufruf wird eine Variable erwartet.</text:p>
          </table:table-cell>
        </table:table-row>
        <table:table-row>
          <table:table-cell office:value-type="string">
            <text:p text:style-name="Standard">27.</text:p>
          </table:table-cell>
          <table:table-cell office:value-type="string">
            <text:p text:style-name="Standard">Ausdrücke dieses Typs können nicht verglichen werden.</text:p>
          </table:table-cell>
        </table:table-row>
        <table:table-row>
          <table:table-cell office:value-type="string">
            <text:p text:style-name="Standard">28.</text:p>
          </table:table-cell>
          <table:table-cell office:value-type="string">
            <text:p text:style-name="Standard">Eine <text:span text:style-name="Source_20_Text">INTEGER</text:span>- oder <text:span text:style-name="Source_20_Text">REAL</text:span>-Zahl wird erwartet.</text:p>
          </table:table-cell>
        </table:table-row>
        <table:table-row>
          <table:table-cell office:value-type="string">
            <text:p text:style-name="Standard">29.</text:p>
          </table:table-cell>
          <table:table-cell office:value-type="string">
            <text:p text:style-name="Standard">Dieser Variablentyp kann nicht gelesen werden.</text:p>
          </table:table-cell>
        </table:table-row>
        <table:table-row>
          <table:table-cell office:value-type="string">
            <text:p text:style-name="Standard">30.</text:p>
          </table:table-cell>
          <table:table-cell office:value-type="string">
            <text:p text:style-name="Standard">Dieser Name ist kein Typ.</text:p>
          </table:table-cell>
        </table:table-row>
        <table:table-row>
          <table:table-cell office:value-type="string">
            <text:p text:style-name="Standard">31.</text:p>
          </table:table-cell>
          <table:table-cell office:value-type="string">
            <text:p text:style-name="Standard">Bei reellen Zahlen wird ein Exponent verlangt.</text:p>
          </table:table-cell>
        </table:table-row>
        <table:table-row>
          <table:table-cell office:value-type="string">
            <text:p text:style-name="Standard">32.</text:p>
          </table:table-cell>
          <table:table-cell office:value-type="string">
            <text:p text:style-name="Standard">Ein skalarer Ausdruck (kein numerischer) wird erwartet.</text:p>
          </table:table-cell>
        </table:table-row>
        <table:table-row>
          <table:table-cell office:value-type="string">
            <text:p text:style-name="Standard">33.</text:p>
          </table:table-cell>
          <table:table-cell office:value-type="string">
            <text:p text:style-name="Standard">Leerstrings sind nicht erlaubt, (<text:span text:style-name="Source_20_Text">CHR (0)</text:span>) benutzen.</text:p>
          </table:table-cell>
        </table:table-row>
        <table:table-row>
          <table:table-cell office:value-type="string">
            <text:p text:style-name="Standard">34.</text:p>
          </table:table-cell>
          <table:table-cell office:value-type="string">
            <text:p text:style-name="Standard">'<text:span text:style-name="Source_20_Text">[</text:span>' wird erwartet</text:p>
          </table:table-cell>
        </table:table-row>
        <table:table-row>
          <table:table-cell office:value-type="string">
            <text:p text:style-name="Standard">35.</text:p>
          </table:table-cell>
          <table:table-cell office:value-type="string">
            <text:p text:style-name="Standard">'<text:span text:style-name="Source_20_Text">]</text:span>' wird erwartet</text:p>
          </table:table-cell>
        </table:table-row>
        <table:table-row>
          <table:table-cell office:value-type="string">
            <text:p text:style-name="Standard">36.</text:p>
          </table:table-cell>
          <table:table-cell office:value-type="string">
            <text:p text:style-name="Standard">Ein Arrayindex muss vom Typ <text:span text:style-name="Source_20_Text">SCALAR</text:span> sein</text:p>
          </table:table-cell>
        </table:table-row>
        <table:table-row>
          <table:table-cell office:value-type="string">
            <text:p text:style-name="Standard">37.</text:p>
          </table:table-cell>
          <table:table-cell office:value-type="string">
            <text:p text:style-name="Standard">'<text:span text:style-name="Source_20_Text">..</text:span>' wird erwartet</text:p>
          </table:table-cell>
        </table:table-row>
        <table:table-row>
          <table:table-cell office:value-type="string">
            <text:p text:style-name="Standard">38.</text:p>
          </table:table-cell>
          <table:table-cell office:value-type="string">
            <text:p text:style-name="Standard">In der Deklaration eines <text:span text:style-name="Source_20_Text">ARRAY</text:span><text:span text:style-name="T33">s</text:span> wird '<text:span text:style-name="Source_20_Text">]</text:span>' oder '<text:span text:style-name="Source_20_Text">,</text:span>' verlangt</text:p>
          </table:table-cell>
        </table:table-row>
        <table:table-row>
          <table:table-cell office:value-type="string">
            <text:p text:style-name="Standard">39.</text:p>
          </table:table-cell>
          <table:table-cell office:value-type="string">
            <text:p text:style-name="Standard">Obergrenze ist größer als die untere.</text:p>
          </table:table-cell>
        </table:table-row>
        <table:table-row>
          <table:table-cell office:value-type="string">
            <text:p text:style-name="Standard">40.</text:p>
          </table:table-cell>
          <table:table-cell office:value-type="string">
            <text:p text:style-name="Standard">Das Set ist zu groß (größer als die 256 möglichen Elemente).</text:p>
          </table:table-cell>
        </table:table-row>
        <table:table-row>
          <table:table-cell office:value-type="string">
            <text:p text:style-name="Standard">41.</text:p>
          </table:table-cell>
          <table:table-cell office:value-type="string">
            <text:p text:style-name="Standard">Das Ergebnis der Funktion muss vom Typ Name sein.</text:p>
          </table:table-cell>
        </table:table-row>
        <text:soft-page-break/>
        <table:table-row>
          <table:table-cell office:value-type="string">
            <text:p text:style-name="Standard">42.</text:p>
          </table:table-cell>
          <table:table-cell office:value-type="string">
            <text:p text:style-name="Standard">Im Set wird '<text:span text:style-name="Source_20_Text">,</text:span>' oder '<text:span text:style-name="Source_20_Text"> </text:span>' erwartet.</text:p>
          </table:table-cell>
        </table:table-row>
        <table:table-row>
          <table:table-cell office:value-type="string">
            <text:p text:style-name="Standard">43.</text:p>
          </table:table-cell>
          <table:table-cell office:value-type="string">
            <text:p text:style-name="Standard">Im Set wird '<text:span text:style-name="Source_20_Text">..</text:span>' oder '<text:span text:style-name="Source_20_Text">]</text:span>' erwartet.</text:p>
          </table:table-cell>
        </table:table-row>
        <table:table-row>
          <table:table-cell office:value-type="string">
            <text:p text:style-name="Standard">44.</text:p>
          </table:table-cell>
          <table:table-cell office:value-type="string">
            <text:p text:style-name="Standard">Der Parameter muss vom Typ Name sein.</text:p>
          </table:table-cell>
        </table:table-row>
        <table:table-row>
          <table:table-cell office:value-type="string">
            <text:p text:style-name="Standard">45.</text:p>
          </table:table-cell>
          <table:table-cell office:value-type="string">
            <text:p text:style-name="Standard">Ein leeres Set kann nicht erster Faktor in einer Nicht-Zuweisungs-Anweisung sein.</text:p>
          </table:table-cell>
        </table:table-row>
        <table:table-row>
          <table:table-cell office:value-type="string">
            <text:p text:style-name="Standard">46.</text:p>
          </table:table-cell>
          <table:table-cell office:value-type="string">
            <text:p text:style-name="Standard">Ein Skalartyp (einschließlich realen Zahlen) wird erwartet.</text:p>
          </table:table-cell>
        </table:table-row>
        <table:table-row>
          <table:table-cell office:value-type="string">
            <text:p text:style-name="Standard">47.</text:p>
          </table:table-cell>
          <table:table-cell office:value-type="string">
            <text:p text:style-name="Standard">Ein Skalartyp (außer realen Zahlen) wird erwartet.</text:p>
          </table:table-cell>
        </table:table-row>
        <table:table-row>
          <table:table-cell office:value-type="string">
            <text:p text:style-name="Standard">48.</text:p>
          </table:table-cell>
          <table:table-cell office:value-type="string">
            <text:p text:style-name="Standard">Die Sets sind nicht verträglich.</text:p>
          </table:table-cell>
        </table:table-row>
        <table:table-row>
          <table:table-cell office:value-type="string">
            <text:p text:style-name="Standard">49.</text:p>
          </table:table-cell>
          <table:table-cell office:value-type="string">
            <text:p text:style-name="Standard">Sets können nicht mit '<text:span text:style-name="Source_20_Text">&lt;</text:span>' und '<text:span text:style-name="Source_20_Text">&gt;</text:span>' verglichen werden</text:p>
          </table:table-cell>
        </table:table-row>
        <table:table-row>
          <table:table-cell office:value-type="string">
            <text:p text:style-name="Standard">50.</text:p>
          </table:table-cell>
          <table:table-cell office:value-type="string">
            <text:p text:style-name="Standard">'<text:span text:style-name="Source_20_Text">FORWARD</text:span>', '<text:span text:style-name="Source_20_Text">LABEL</text:span>', '<text:span text:style-name="Source_20_Text">CONST</text:span>', '<text:span text:style-name="Source_20_Text">VAR</text:span>', '<text:span text:style-name="Source_20_Text">TYPE</text:span>' oder '<text:span text:style-name="Source_20_Text">BEGIN</text:span>' wird erwartet</text:p>
          </table:table-cell>
        </table:table-row>
        <table:table-row>
          <table:table-cell office:value-type="string">
            <text:p text:style-name="Standard">51.</text:p>
          </table:table-cell>
          <table:table-cell office:value-type="string">
            <text:p text:style-name="Standard">Hexadezimalziffer wird erwartet</text:p>
          </table:table-cell>
        </table:table-row>
        <table:table-row>
          <table:table-cell office:value-type="string">
            <text:p text:style-name="Standard">52.</text:p>
          </table:table-cell>
          <table:table-cell office:value-type="string">
            <text:p text:style-name="Standard">Sets können nicht ge<text:span text:style-name="Source_20_Text">POKE</text:span>d werden</text:p>
          </table:table-cell>
        </table:table-row>
        <table:table-row>
          <table:table-cell office:value-type="string">
            <text:p text:style-name="Standard">53.</text:p>
          </table:table-cell>
          <table:table-cell office:value-type="string">
            <text:p text:style-name="Standard">Das Array ist zu groß.</text:p>
          </table:table-cell>
        </table:table-row>
        <table:table-row>
          <table:table-cell office:value-type="string">
            <text:p text:style-name="Standard">54.</text:p>
          </table:table-cell>
          <table:table-cell office:value-type="string">
            <text:p text:style-name="Standard">Bei der Definition von <text:span text:style-name="Source_20_Text">RECORD</text:span>s wird '<text:span text:style-name="Source_20_Text">END</text:span>' oder '<text:span text:style-name="Source_20_Text">+</text:span>' erwartet.</text:p>
          </table:table-cell>
        </table:table-row>
        <table:table-row>
          <table:table-cell office:value-type="string">
            <text:p text:style-name="Standard">55.</text:p>
          </table:table-cell>
          <table:table-cell office:value-type="string">
            <text:p text:style-name="Standard">Ein Feldname wird erwartet.</text:p>
          </table:table-cell>
        </table:table-row>
        <table:table-row>
          <table:table-cell office:value-type="string">
            <text:p text:style-name="Standard">56.</text:p>
          </table:table-cell>
          <table:table-cell office:value-type="string">
            <text:p text:style-name="Standard">Nach '<text:span text:style-name="Source_20_Text">WITH</text:span>' wird eine Variable erwartet.</text:p>
          </table:table-cell>
        </table:table-row>
        <table:table-row>
          <table:table-cell office:value-type="string">
            <text:p text:style-name="Standard">57.</text:p>
          </table:table-cell>
          <table:table-cell office:value-type="string">
            <text:p text:style-name="Standard">Die Variable bei <text:span text:style-name="Source_20_Text">WITH</text:span> muss vom <text:span text:style-name="Source_20_Text">RECORD</text:span>-Typ sein.</text:p>
          </table:table-cell>
        </table:table-row>
        <table:table-row>
          <table:table-cell office:value-type="string">
            <text:p text:style-name="Standard">58.</text:p>
          </table:table-cell>
          <table:table-cell office:value-type="string">
            <text:p text:style-name="Standard">Der Feldname wurde nicht mit der <text:span text:style-name="Source_20_Text">WITH</text:span>-Anweisung in Verbindung gebracht.</text:p>
          </table:table-cell>
        </table:table-row>
        <table:table-row>
          <table:table-cell office:value-type="string">
            <text:p text:style-name="Standard">59.</text:p>
          </table:table-cell>
          <table:table-cell office:value-type="string">
            <text:p text:style-name="Standard">Nach '<text:span text:style-name="Source_20_Text">LABEL</text:span>' wird eine vorzeichenlose Integerzahl erwartet.</text:p>
          </table:table-cell>
        </table:table-row>
        <table:table-row>
          <table:table-cell office:value-type="string">
            <text:p text:style-name="Standard">60.</text:p>
          </table:table-cell>
          <table:table-cell office:value-type="string">
            <text:p text:style-name="Standard">Nach '<text:span text:style-name="Source_20_Text">GOTO</text:span>' wird eine vorzeichenlose Integerzahl erwartet.</text:p>
          </table:table-cell>
        </table:table-row>
        <table:table-row>
          <table:table-cell office:value-type="string">
            <text:p text:style-name="Standard">61.</text:p>
          </table:table-cell>
          <table:table-cell office:value-type="string">
            <text:p text:style-name="Standard">Diese Marke ist in einer falschen Programmebene.</text:p>
          </table:table-cell>
        </table:table-row>
        <table:table-row>
          <table:table-cell office:value-type="string">
            <text:p text:style-name="Standard">62.</text:p>
          </table:table-cell>
          <table:table-cell office:value-type="string">
            <text:p text:style-name="Standard">Marke ist nicht vereinbart.</text:p>
          </table:table-cell>
        </table:table-row>
        <table:table-row>
          <table:table-cell office:value-type="string">
            <text:p text:style-name="Standard">63.</text:p>
          </table:table-cell>
          <table:table-cell office:value-type="string">
            <text:p text:style-name="Standard">Der Parameter von <text:span text:style-name="Source_20_Text">SIZE</text:span> muss eine Variable sein.</text:p>
          </table:table-cell>
        </table:table-row>
        <table:table-row>
          <table:table-cell office:value-type="string">
            <text:p text:style-name="Standard">64.</text:p>
          </table:table-cell>
          <table:table-cell office:value-type="string">
            <text:p text:style-name="Standard">Auf Zeiger kann nur der Gleichheitstest angewandt werden.</text:p>
          </table:table-cell>
        </table:table-row>
        <table:table-row>
          <table:table-cell office:value-type="string">
            <text:p text:style-name="Standard">67.</text:p>
          </table:table-cell>
          <table:table-cell office:value-type="string">
            <text:p text:style-name="Standard">Der einzig zulässige <text:span text:style-name="Source_20_Text">WRITE</text:span>-Parameter für Integerzahlen mit zwei Doppelpunkten ist <text:span text:style-name="Source_20_Text">e:m:H</text:span>.</text:p>
          </table:table-cell>
        </table:table-row>
        <table:table-row>
          <table:table-cell office:value-type="string">
            <text:p text:style-name="Standard">68.</text:p>
          </table:table-cell>
          <table:table-cell office:value-type="string">
            <text:p text:style-name="Standard">Strings dürfen keine Zeilenende-Zeichen enthalten.</text:p>
          </table:table-cell>
        </table:table-row>
        <table:table-row>
          <table:table-cell office:value-type="string">
            <text:p text:style-name="Standard">69.</text:p>
          </table:table-cell>
          <table:table-cell office:value-type="string">
            <text:p text:style-name="Standard">Der Parameter von <text:span text:style-name="Source_20_Text">NEW</text:span>, <text:span text:style-name="Source_20_Text">MARK</text:span> oder <text:span text:style-name="Source_20_Text">RELEASE</text:span> muss eine Zeigervariable sein.</text:p>
          </table:table-cell>
        </table:table-row>
        <table:table-row>
          <table:table-cell office:value-type="string">
            <text:p text:style-name="Standard">70.</text:p>
          </table:table-cell>
          <table:table-cell office:value-type="string">
            <text:p text:style-name="Standard">Der Parameter von <text:span text:style-name="Source_20_Text">ADDR</text:span> muss eine Variable sein.</text:p>
          </table:table-cell>
        </table:table-row>
        <table:table-row>
          <table:table-cell office:value-type="string">
            <text:p text:style-name="Standard"/>
          </table:table-cell>
          <table:table-cell office:value-type="string">
            <text:p text:style-name="Standard"/>
          </table:table-cell>
        </table:table-row>
      </table:table>
      <text:h text:style-name="Heading_20_2" text:outline-level="2"><text:bookmark-start text:name="__RefHeading___Toc119_1849558913"/>Runtime-Fehlermeldungen<text:bookmark-end text:name="__RefHeading___Toc119_1849558913"/></text:h>
      <text:p text:style-name="Text_20_body">Tritt während des Programmlaufs ein Fehler auf, so wird eine der folgenden Meldungen gefolgt von '<text:span text:style-name="Source_20_Text">bei PC=XXXX</text:span>' ausgegeben, wobei <text:span text:style-name="Source_20_Text">XXXX</text:span> die Speicheradresse darstellt, an der der Fehler auftrat. Meist wird die Fehlerquelle offensichtlich sein, falls jedoch nicht, kann das Compiler-Listing zu Rate gezogen werden um festzustellen, an welcher Stelle des Programms der Fehler auftrat. <text:span text:style-name="Source_20_Text">XXXX</text:span> dient dann als Crossreferenz. Gelegentlich liefert das jedoch NICHT das richtige Resultat (Folgefehler).</text:p>
      <table:table table:name="Tabelle23" table:style-name="Tabelle23">
        <table:table-column table:style-name="Tabelle23.A"/>
        <table:table-column table:style-name="Tabelle23.B"/>
        <table:table-row>
          <table:table-cell office:value-type="string">
            <text:p text:style-name="Standard">1.</text:p>
          </table:table-cell>
          <table:table-cell office:value-type="string">
            <text:p text:style-name="Standard">Halt</text:p>
          </table:table-cell>
        </table:table-row>
        <table:table-row>
          <table:table-cell office:value-type="string">
            <text:p text:style-name="Standard">2.</text:p>
          </table:table-cell>
          <table:table-cell office:value-type="string">
            <text:p text:style-name="Standard">Ueberlauf</text:p>
          </table:table-cell>
        </table:table-row>
        <table:table-row>
          <table:table-cell office:value-type="string">
            <text:p text:style-name="Standard">3.</text:p>
          </table:table-cell>
          <table:table-cell office:value-type="string">
            <text:p text:style-name="Standard">&gt;&gt; RAM (außerhalb des RAM)</text:p>
          </table:table-cell>
        </table:table-row>
        <table:table-row>
          <table:table-cell office:value-type="string">
            <text:p text:style-name="Standard">4.</text:p>
          </table:table-cell>
          <table:table-cell office:value-type="string">
            <text:p text:style-name="Standard">/ durch Null (Division durch Null; kann auch bei DIV auftreten)</text:p>
          </table:table-cell>
        </table:table-row>
        <table:table-row>
          <table:table-cell office:value-type="string">
            <text:p text:style-name="Standard">5.</text:p>
          </table:table-cell>
          <table:table-cell office:value-type="string">
            <text:p text:style-name="Standard">Index zu niedrig</text:p>
          </table:table-cell>
        </table:table-row>
        <table:table-row>
          <table:table-cell office:value-type="string">
            <text:p text:style-name="Standard">6.</text:p>
          </table:table-cell>
          <table:table-cell office:value-type="string">
            <text:p text:style-name="Standard">Index zu hoch</text:p>
          </table:table-cell>
        </table:table-row>
        <table:table-row>
          <table:table-cell office:value-type="string">
            <text:p text:style-name="Standard">7.</text:p>
          </table:table-cell>
          <table:table-cell office:value-type="string">
            <text:p text:style-name="Standard">mathematischer Fehler (Fehler beim Aufruf einer mathematischen Routine)</text:p>
          </table:table-cell>
        </table:table-row>
        <text:soft-page-break/>
        <table:table-row>
          <table:table-cell office:value-type="string">
            <text:p text:style-name="Standard">8.</text:p>
          </table:table-cell>
          <table:table-cell office:value-type="string">
            <text:p text:style-name="Standard">Zahl zu groß</text:p>
          </table:table-cell>
        </table:table-row>
        <table:table-row>
          <table:table-cell office:value-type="string">
            <text:p text:style-name="Standard">9.</text:p>
          </table:table-cell>
          <table:table-cell office:value-type="string">
            <text:p text:style-name="Standard">Zahl erwartet</text:p>
          </table:table-cell>
        </table:table-row>
        <table:table-row>
          <table:table-cell office:value-type="string">
            <text:p text:style-name="Standard">10.</text:p>
          </table:table-cell>
          <table:table-cell office:value-type="string">
            <text:p text:style-name="Standard">Exponent erwartet</text:p>
          </table:table-cell>
        </table:table-row>
      </table:table>
      <text:p text:style-name="Text_20_body"/>
      <text:p text:style-name="Text_20_body">Laufzeit-Fehler stoppen die Programmausführung.</text:p>
      <text:h text:style-name="Heading_20_1" text:outline-level="1"><text:bookmark-start text:name="__RefHeading___Toc121_1849558913"/>Reservierte Worte und vordefinierte Namen<text:bookmark-end text:name="__RefHeading___Toc121_1849558913"/></text:h>
      <text:h text:style-name="Heading_20_2" text:outline-level="2"><text:bookmark-start text:name="__RefHeading___Toc123_1849558913"/>Reservierte Worte<text:bookmark-end text:name="__RefHeading___Toc123_1849558913"/></text:h>
      <table:table table:name="Tabelle24" table:style-name="Tabelle24">
        <table:table-column table:style-name="Tabelle24.A"/>
        <table:table-column table:style-name="Tabelle24.B"/>
        <table:table-column table:style-name="Tabelle24.C" table:number-columns-repeated="4"/>
        <table:table-column table:style-name="Tabelle24.G"/>
        <table:table-row>
          <table:table-cell office:value-type="string">
            <text:p text:style-name="Standard"><text:span text:style-name="Source_20_Text">AND</text:span></text:p>
          </table:table-cell>
          <table:table-cell office:value-type="string">
            <text:p text:style-name="Standard"><text:span text:style-name="Source_20_Text">ARRAY</text:span></text:p>
          </table:table-cell>
          <table:table-cell office:value-type="string">
            <text:p text:style-name="Standard"><text:span text:style-name="Source_20_Text">BEGIN</text:span></text:p>
          </table:table-cell>
          <table:table-cell office:value-type="string">
            <text:p text:style-name="Standard"><text:span text:style-name="Source_20_Text">CASE</text:span></text:p>
          </table:table-cell>
          <table:table-cell office:value-type="string">
            <text:p text:style-name="Standard"><text:span text:style-name="Source_20_Text">CONST</text:span></text:p>
          </table:table-cell>
          <table:table-cell office:value-type="string">
            <text:p text:style-name="Standard"><text:span text:style-name="Source_20_Text">DIV</text:span></text:p>
          </table:table-cell>
          <table:table-cell office:value-type="string">
            <text:p text:style-name="Standard"><text:span text:style-name="Source_20_Text">DO</text:span></text:p>
          </table:table-cell>
        </table:table-row>
        <table:table-row>
          <table:table-cell office:value-type="string">
            <text:p text:style-name="Standard"><text:span text:style-name="Source_20_Text">DOWNTO</text:span></text:p>
          </table:table-cell>
          <table:table-cell office:value-type="string">
            <text:p text:style-name="Standard"><text:span text:style-name="Source_20_Text">ELSE</text:span></text:p>
          </table:table-cell>
          <table:table-cell office:value-type="string">
            <text:p text:style-name="Standard"><text:span text:style-name="Source_20_Text">END</text:span></text:p>
          </table:table-cell>
          <table:table-cell office:value-type="string">
            <text:p text:style-name="Standard"><text:span text:style-name="Source_20_Text">FORWARD</text:span></text:p>
          </table:table-cell>
          <table:table-cell office:value-type="string">
            <text:p text:style-name="Standard"><text:span text:style-name="Source_20_Text">FUNCTION</text:span></text:p>
          </table:table-cell>
          <table:table-cell office:value-type="string">
            <text:p text:style-name="Standard"><text:span text:style-name="Source_20_Text">GOTO</text:span></text:p>
          </table:table-cell>
          <table:table-cell office:value-type="string">
            <text:p text:style-name="Standard"><text:span text:style-name="Source_20_Text">IF</text:span></text:p>
          </table:table-cell>
        </table:table-row>
        <table:table-row>
          <table:table-cell office:value-type="string">
            <text:p text:style-name="Standard"><text:span text:style-name="Source_20_Text">IN</text:span></text:p>
          </table:table-cell>
          <table:table-cell office:value-type="string">
            <text:p text:style-name="Standard"><text:span text:style-name="Source_20_Text">LABEL</text:span></text:p>
          </table:table-cell>
          <table:table-cell office:value-type="string">
            <text:p text:style-name="Standard"><text:span text:style-name="Source_20_Text">MOD</text:span></text:p>
          </table:table-cell>
          <table:table-cell office:value-type="string">
            <text:p text:style-name="Standard"><text:span text:style-name="Source_20_Text">NIL</text:span></text:p>
          </table:table-cell>
          <table:table-cell office:value-type="string">
            <text:p text:style-name="Standard"><text:span text:style-name="Source_20_Text">NOT</text:span></text:p>
          </table:table-cell>
          <table:table-cell office:value-type="string">
            <text:p text:style-name="Standard"><text:span text:style-name="Source_20_Text">OF</text:span></text:p>
          </table:table-cell>
          <table:table-cell office:value-type="string">
            <text:p text:style-name="Standard"><text:span text:style-name="Source_20_Text">OR</text:span></text:p>
          </table:table-cell>
        </table:table-row>
        <table:table-row>
          <table:table-cell office:value-type="string">
            <text:p text:style-name="Standard"><text:span text:style-name="Source_20_Text">PACKED</text:span></text:p>
          </table:table-cell>
          <table:table-cell office:value-type="string">
            <text:p text:style-name="Standard"><text:span text:style-name="Source_20_Text">PROCEDURE</text:span></text:p>
          </table:table-cell>
          <table:table-cell office:value-type="string">
            <text:p text:style-name="Standard"><text:span text:style-name="Source_20_Text">PROGRAM</text:span></text:p>
          </table:table-cell>
          <table:table-cell office:value-type="string">
            <text:p text:style-name="Standard"><text:span text:style-name="Source_20_Text">RECORD</text:span></text:p>
          </table:table-cell>
          <table:table-cell office:value-type="string">
            <text:p text:style-name="Standard"><text:span text:style-name="Source_20_Text">REPEAT</text:span></text:p>
          </table:table-cell>
          <table:table-cell office:value-type="string">
            <text:p text:style-name="Standard"><text:span text:style-name="Source_20_Text">SET</text:span></text:p>
          </table:table-cell>
          <table:table-cell office:value-type="string">
            <text:p text:style-name="Standard"><text:span text:style-name="Source_20_Text">THEN</text:span></text:p>
          </table:table-cell>
        </table:table-row>
        <table:table-row>
          <table:table-cell office:value-type="string">
            <text:p text:style-name="Standard"><text:span text:style-name="Source_20_Text">TO</text:span></text:p>
          </table:table-cell>
          <table:table-cell office:value-type="string">
            <text:p text:style-name="Standard"><text:span text:style-name="Source_20_Text">TYPE</text:span></text:p>
          </table:table-cell>
          <table:table-cell office:value-type="string">
            <text:p text:style-name="Standard"><text:span text:style-name="Source_20_Text">UNTIL</text:span></text:p>
          </table:table-cell>
          <table:table-cell office:value-type="string">
            <text:p text:style-name="Standard"><text:span text:style-name="Source_20_Text">VAR</text:span></text:p>
          </table:table-cell>
          <table:table-cell office:value-type="string">
            <text:p text:style-name="Standard"><text:span text:style-name="Source_20_Text">WHILE</text:span></text:p>
          </table:table-cell>
          <table:table-cell office:value-type="string">
            <text:p text:style-name="Standard"><text:span text:style-name="Source_20_Text">WITH</text:span></text:p>
          </table:table-cell>
          <table:table-cell office:value-type="string">
            <text:p text:style-name="Standard"><text:span text:style-name="Source_20_Text"/></text:p>
          </table:table-cell>
        </table:table-row>
        <table:table-row>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row>
      </table:table>
      <text:h text:style-name="Heading_20_2" text:outline-level="2"><text:bookmark-start text:name="__RefHeading___Toc125_1849558913"/>Spezialsymbole<text:bookmark-end text:name="__RefHeading___Toc125_1849558913"/></text:h>
      <text:p text:style-name="Text_20_body">Die folgenden Symbole werden in KC-PASCAL benutzt und haben eine bestimmte Bedeutung:</text:p>
      <table:table table:name="Tabelle25" table:style-name="Tabelle25">
        <table:table-column table:style-name="Tabelle25.A" table:number-columns-repeated="6"/>
        <table:table-row>
          <table:table-cell office:value-type="string">
            <text:p text:style-name="P27"><text:span text:style-name="Source_20_Text">+</text:span></text:p>
          </table:table-cell>
          <table:table-cell office:value-type="string">
            <text:p text:style-name="P27"><text:span text:style-name="Source_20_Text">-</text:span></text:p>
          </table:table-cell>
          <table:table-cell office:value-type="string">
            <text:p text:style-name="P27"><text:span text:style-name="Source_20_Text">*</text:span></text:p>
          </table:table-cell>
          <table:table-cell office:value-type="string">
            <text:p text:style-name="P27"><text:span text:style-name="Source_20_Text">/</text:span></text:p>
          </table:table-cell>
          <table:table-cell office:value-type="string">
            <text:p text:style-name="Standard"><text:span text:style-name="Source_20_Text"/></text:p>
          </table:table-cell>
          <table:table-cell office:value-type="string">
            <text:p text:style-name="Standard"><text:span text:style-name="Source_20_Text"/></text:p>
          </table:table-cell>
        </table:table-row>
        <table:table-row>
          <table:table-cell office:value-type="string">
            <text:p text:style-name="P27"><text:span text:style-name="Source_20_Text">=</text:span></text:p>
          </table:table-cell>
          <table:table-cell office:value-type="string">
            <text:p text:style-name="P27"><text:span text:style-name="Source_20_Text">&lt;&gt;</text:span></text:p>
          </table:table-cell>
          <table:table-cell office:value-type="string">
            <text:p text:style-name="P27"><text:span text:style-name="Source_20_Text">&lt;</text:span></text:p>
          </table:table-cell>
          <table:table-cell office:value-type="string">
            <text:p text:style-name="P27"><text:span text:style-name="Source_20_Text">&lt;</text:span><text:span text:style-name="Source_20_Text"><text:span text:style-name="T34">=</text:span></text:span></text:p>
          </table:table-cell>
          <table:table-cell office:value-type="string">
            <text:p text:style-name="P27"><text:span text:style-name="Source_20_Text"><text:span text:style-name="T34">&gt;=</text:span></text:span></text:p>
          </table:table-cell>
          <table:table-cell office:value-type="string">
            <text:p text:style-name="P27"><text:span text:style-name="Source_20_Text"><text:span text:style-name="T34">&gt;</text:span></text:span></text:p>
          </table:table-cell>
        </table:table-row>
        <table:table-row>
          <table:table-cell office:value-type="string">
            <text:p text:style-name="P27"><text:span text:style-name="Source_20_Text">(</text:span></text:p>
          </table:table-cell>
          <table:table-cell office:value-type="string">
            <text:p text:style-name="P27"><text:span text:style-name="Source_20_Text"><text:span text:style-name="T34">)</text:span></text:span></text:p>
          </table:table-cell>
          <table:table-cell office:value-type="string">
            <text:p text:style-name="P27"><text:span text:style-name="Source_20_Text"><text:span text:style-name="T34">[</text:span></text:span></text:p>
          </table:table-cell>
          <table:table-cell office:value-type="string">
            <text:p text:style-name="P27"><text:span text:style-name="Source_20_Text"><text:span text:style-name="T34">]</text:span></text:span></text:p>
          </table:table-cell>
          <table:table-cell office:value-type="string">
            <text:p text:style-name="Standard"><text:span text:style-name="Source_20_Text"/></text:p>
          </table:table-cell>
          <table:table-cell office:value-type="string">
            <text:p text:style-name="Standard"><text:span text:style-name="Source_20_Text"/></text:p>
          </table:table-cell>
        </table:table-row>
        <table:table-row>
          <table:table-cell office:value-type="string">
            <text:p text:style-name="Standard"><text:span text:style-name="Source_20_Text">{</text:span></text:p>
          </table:table-cell>
          <table:table-cell office:value-type="string">
            <text:p text:style-name="Standard"><text:span text:style-name="Source_20_Text"><text:span text:style-name="T34">}</text:span></text:span></text:p>
          </table:table-cell>
          <table:table-cell office:value-type="string">
            <text:p text:style-name="Standard"><text:span text:style-name="Source_20_Text"><text:span text:style-name="T34">(*</text:span></text:span></text:p>
          </table:table-cell>
          <table:table-cell office:value-type="string">
            <text:p text:style-name="Standard"><text:span text:style-name="Source_20_Text"><text:span text:style-name="T34">*)</text:span></text:span></text:p>
          </table:table-cell>
          <table:table-cell office:value-type="string">
            <text:p text:style-name="Standard"><text:span text:style-name="Source_20_Text"/></text:p>
          </table:table-cell>
          <table:table-cell office:value-type="string">
            <text:p text:style-name="Standard"><text:span text:style-name="Source_20_Text"/></text:p>
          </table:table-cell>
        </table:table-row>
        <table:table-row>
          <table:table-cell office:value-type="string">
            <text:p text:style-name="Standard"><text:span text:style-name="Source_20_Text">^</text:span></text:p>
          </table:table-cell>
          <table:table-cell office:value-type="string">
            <text:p text:style-name="Standard"><text:span text:style-name="Source_20_Text">:</text:span><text:span text:style-name="Source_20_Text"><text:span text:style-name="T34">=</text:span></text:span></text:p>
          </table:table-cell>
          <table:table-cell office:value-type="string">
            <text:p text:style-name="Standard"><text:span text:style-name="Source_20_Text"><text:span text:style-name="T34">.</text:span></text:span></text:p>
          </table:table-cell>
          <table:table-cell office:value-type="string">
            <text:p text:style-name="Standard"><text:span text:style-name="Source_20_Text"><text:span text:style-name="T34">,</text:span></text:span></text:p>
          </table:table-cell>
          <table:table-cell office:value-type="string">
            <text:p text:style-name="Standard"><text:span text:style-name="Source_20_Text"><text:span text:style-name="T34">;</text:span></text:span></text:p>
          </table:table-cell>
          <table:table-cell office:value-type="string">
            <text:p text:style-name="Standard"><text:span text:style-name="Source_20_Text"><text:span text:style-name="T34">:</text:span></text:span></text:p>
          </table:table-cell>
        </table:table-row>
        <table:table-row>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row>
      </table:table>
      <text:h text:style-name="Heading_20_2" text:outline-level="2"><text:bookmark-start text:name="__RefHeading___Toc127_1849558913"/>Vordefinierte Namen<text:bookmark-end text:name="__RefHeading___Toc127_1849558913"/></text:h>
      <text:p text:style-name="Text_20_body">Die folgenden Namen kann man sich als in einem das gesamte Programm umschließenden Block definiert denken. Demzufolge sind sie im gesamten Programm verfügbar, es sei denn, sie wurden durch den Programmierer innerhalb eines Block umdefiniert.</text:p>
      <text:p text:style-name="Standard"/>
      <table:table table:name="Tabelle26" table:style-name="Tabelle26">
        <table:table-column table:style-name="Tabelle26.A"/>
        <table:table-column table:style-name="Tabelle26.B"/>
        <table:table-row>
          <table:table-cell office:value-type="string">
            <text:p text:style-name="Standard"><text:span text:style-name="Source_20_Text">CONST</text:span></text:p>
          </table:table-cell>
          <table:table-cell office:value-type="string">
            <text:p text:style-name="Standard"><text:span text:style-name="Source_20_Text">MAXINT</text:span>=32767; (<text:span text:style-name="Source_20_Text">INTEGER</text:span>)<text:line-break/><text:span text:style-name="Source_20_Text">PI</text:span>=3.14159E+00; (<text:span text:style-name="Source_20_Text">REAL</text:span>)<text:line-break/><text:span text:style-name="Source_20_Text">TRUE</text:span>; (<text:span text:style-name="Source_20_Text">BOOLEAN</text:span>)<text:line-break/><text:span text:style-name="Source_20_Text">FALSE</text:span>; (<text:span text:style-name="Source_20_Text">BOOLEAN</text:span>)</text:p>
          </table:table-cell>
        </table:table-row>
        <table:table-row>
          <table:table-cell office:value-type="string">
            <text:p text:style-name="Standard"><text:span text:style-name="Source_20_Text">TYPE</text:span></text:p>
          </table:table-cell>
          <table:table-cell office:value-type="string">
            <text:p text:style-name="Standard"><text:span text:style-name="Source_20_Text">BOOLEAN=(FALSE,TRUE);</text:span><text:line-break/><text:span text:style-name="Source_20_Text">CHAR</text:span> (Erweiterter ASCII-Zeichensatz)<text:line-break/><text:span text:style-name="Source_20_Text">INTEGER=-MAXINT..MAXINT;</text:span><text:line-break/><text:span text:style-name="Source_20_Text">REAL</text:span> (Eine Untermenge der Realen Zahlen)</text:p>
          </table:table-cell>
        </table:table-row>
        <table:table-row>
          <table:table-cell office:value-type="string">
            <text:p text:style-name="Standard"><text:span text:style-name="Source_20_Text">PROCEDURE</text:span></text:p>
          </table:table-cell>
          <table:table-cell office:value-type="string">
            <text:p text:style-name="Standard"><text:span text:style-name="Source_20_Text">WRITE</text:span>; <text:span text:style-name="Source_20_Text">WRITELN</text:span>; <text:span text:style-name="Source_20_Text">READ</text:span>; <text:span text:style-name="Source_20_Text">READLN</text:span>; <text:span text:style-name="Source_20_Text">PAGE</text:span>; <text:span text:style-name="Source_20_Text">HALT</text:span>;<text:line-break/><text:span text:style-name="Source_20_Text">USER</text:span>; <text:span text:style-name="Source_20_Text">POKE</text:span>; <text:span text:style-name="Source_20_Text">INLINE</text:span>; <text:span text:style-name="Source_20_Text">OUT</text:span>; <text:span text:style-name="Source_20_Text">NEW</text:span>; <text:span text:style-name="Source_20_Text">MARK</text:span>; <text:span text:style-name="Source_20_Text">RELEASE</text:span>;<text:line-break/><text:span text:style-name="Source_20_Text">TIN</text:span>; <text:span text:style-name="Source_20_Text">TOUT</text:span>; <text:span text:style-name="Source_20_Text">GOTOXY</text:span>;</text:p>
          </table:table-cell>
        </table:table-row>
        <table:table-row>
          <table:table-cell office:value-type="string">
            <text:p text:style-name="Standard"><text:span text:style-name="Emphasis">nur KC85/2/3</text:span></text:p>
          </table:table-cell>
          <table:table-cell office:value-type="string">
            <text:p text:style-name="Standard"><text:span text:style-name="Source_20_Text">SETC</text:span>; <text:span text:style-name="Source_20_Text">GETC</text:span>; <text:span text:style-name="Source_20_Text">PLOT</text:span>; <text:span text:style-name="Source_20_Text">CLRPLOT</text:span></text:p>
          </table:table-cell>
        </table:table-row>
        <table:table-row>
          <table:table-cell office:value-type="string">
            <text:p text:style-name="Standard"><text:span text:style-name="Emphasis">nur KC85/3</text:span></text:p>
          </table:table-cell>
          <table:table-cell office:value-type="string">
            <text:p text:style-name="Standard"><text:span text:style-name="Source_20_Text">LINEPLOT</text:span>, <text:span text:style-name="Source_20_Text">CIRCLE</text:span></text:p>
          </table:table-cell>
        </table:table-row>
        <table:table-row>
          <table:table-cell office:value-type="string">
            <text:p text:style-name="Standard"><text:span text:style-name="Source_20_Text">FUNCTION</text:span></text:p>
          </table:table-cell>
          <table:table-cell office:value-type="string">
            <text:p text:style-name="Standard"><text:span text:style-name="Source_20_Text">ABS</text:span>; <text:span text:style-name="Source_20_Text">SQR</text:span>; <text:span text:style-name="Source_20_Text">ODD</text:span>; <text:span text:style-name="Source_20_Text">RANDOM</text:span>; <text:span text:style-name="Source_20_Text">ORD</text:span>; <text:span text:style-name="Source_20_Text">SUCC</text:span>; <text:span text:style-name="Source_20_Text">PRED</text:span>; <text:span text:style-name="Source_20_Text">EOLN</text:span>;<text:line-break/><text:span text:style-name="Source_20_Text">PEEK</text:span>; <text:span text:style-name="Source_20_Text">CHR</text:span>; <text:span text:style-name="Source_20_Text">SQRT</text:span>; <text:span text:style-name="Source_20_Text">ENTIER</text:span>; <text:span text:style-name="Source_20_Text">ROUND</text:span>; <text:span text:style-name="Source_20_Text">TRUNC</text:span>; <text:span text:style-name="Source_20_Text">FRAC</text:span>;<text:line-break/><text:span text:style-name="Source_20_Text">SIN</text:span>; <text:span text:style-name="Source_20_Text">COS</text:span>; <text:span text:style-name="Source_20_Text">TAN</text:span>; <text:span text:style-name="Source_20_Text">ARCTAN</text:span>; <text:span text:style-name="Source_20_Text">EXP</text:span>; <text:span text:style-name="Source_20_Text">LN</text:span>; <text:span text:style-name="Source_20_Text">ADDR</text:span>; <text:span text:style-name="Source_20_Text">SIZE</text:span>;<text:line-break/><text:span text:style-name="Source_20_Text">INP</text:span>; <text:span text:style-name="Source_20_Text">KEYPRESSED</text:span>; <text:span text:style-name="Source_20_Text">READKBD</text:span>; <text:span text:style-name="Source_20_Text">SWAP</text:span>; <text:span text:style-name="Source_20_Text">HI</text:span>; <text:span text:style-name="Source_20_Text">LO</text:span>; <text:span text:style-name="Source_20_Text">SHL</text:span>;<text:line-break/><text:span text:style-name="Source_20_Text">SHR</text:span>; <text:span text:style-name="Source_20_Text">BOR</text:span>; <text:span text:style-name="Source_20_Text">BAND</text:span>; <text:span text:style-name="Source_20_Text">BXOR</text:span></text:p>
          </table:table-cell>
        </table:table-row>
      </table:table>
      <text:h text:style-name="Heading_20_1" text:outline-level="1"><text:bookmark-start text:name="__RefHeading___Toc129_1849558913"/>Beispiele<text:bookmark-end text:name="__RefHeading___Toc129_1849558913"/></text:h>
      <text:h text:style-name="Heading_20_2" text:outline-level="2"><text:bookmark-start text:name="__RefHeading___Toc131_1849558913"/>Beispiel einer „<text:span text:style-name="Source_20_Text">DO</text:span> – <text:span text:style-name="Source_20_Text">WHILE</text:span> – Konstruktion“<text:bookmark-end text:name="__RefHeading___Toc131_1849558913"/></text:h>
      <text:p text:style-name="Preformatted_20_Text">10 PROGRAM DEMO;</text:p>
      <text:p text:style-name="Preformatted_20_Text">11 VAR</text:p>
      <text:p text:style-name="Preformatted_20_Text">12 <text:s/>I:INTEGER;</text:p>
      <text:p text:style-name="Preformatted_20_Text">13 BEGIN</text:p>
      <text:p text:style-name="Preformatted_20_Text">14 <text:s/>I:=1;</text:p>
      <text:p text:style-name="Preformatted_20_Text">15 <text:s/>WHILE I &lt; 10 DO</text:p>
      <text:p text:style-name="Preformatted_20_Text">16 <text:s/>BEGIN</text:p>
      <text:p text:style-name="Preformatted_20_Text">17 <text:s text:c="2"/>WRITE('DER WERT IST: '; I);</text:p>
      <text:p text:style-name="Preformatted_20_Text">18 <text:s text:c="2"/>WRITELN(' UND I*I IST: , I*I);</text:p>
      <text:p text:style-name="Preformatted_20_Text">19 <text:s text:c="2"/>I:=I+1;</text:p>
      <text:p text:style-name="Preformatted_20_Text">20 <text:s/>END;</text:p>
      <text:p text:style-name="Preformatted_20_Text">21 <text:s/>WRITELN('PROGRAMMENDE');</text:p>
      <text:p text:style-name="Preformatted_20_Text">22 END.</text:p>
      <text:h text:style-name="Heading_20_2" text:outline-level="2"><text:bookmark-start text:name="__RefHeading___Toc133_1849558913"/>Beispiel "Demonstration von Funktionen und Prozeduren"<text:bookmark-end text:name="__RefHeading___Toc133_1849558913"/></text:h>
      <text:p text:style-name="Preformatted_20_Text"><text:s/>10 PROGRAM FUT;</text:p>
      <text:p text:style-name="Preformatted_20_Text"><text:s/>20 VAR</text:p>
      <text:p text:style-name="Preformatted_20_Text"><text:s/>30 <text:s/>I,J:INTEGER;</text:p>
      <text:p text:style-name="Preformatted_20_Text"><text:s/>40 <text:s/>R:REAL;</text:p>
      <text:p text:style-name="Preformatted_20_Text"><text:s/>50 BEGIN</text:p>
      <text:p text:style-name="Preformatted_20_Text"><text:s/>60 <text:s/>WHILE I&lt;&gt;0 DO</text:p>
      <text:p text:style-name="Preformatted_20_Text"><text:s/>70 <text:s/>BEGIN</text:p>
      <text:p text:style-name="Preformatted_20_Text"><text:s/>80 <text:s text:c="2"/>WRITE('Werteingabe: ');</text:p>
      <text:p text:style-name="Preformatted_20_Text"><text:s/>90 <text:s text:c="2"/>READ(I);</text:p>
      <text:p text:style-name="Preformatted_20_Text">100 <text:s text:c="2"/>WRITELN('WERT =',I);</text:p>
      <text:p text:style-name="Preformatted_20_Text">110 <text:s text:c="2"/>WRITELN('SWAP =',SWAP(I));</text:p>
      <text:p text:style-name="Preformatted_20_Text">120 <text:s text:c="2"/>WRITELN('HI =',HI(I));</text:p>
      <text:p text:style-name="Preformatted_20_Text">130 <text:s text:c="2"/>WRITELN('LO =',L0(I));</text:p>
      <text:p text:style-name="Preformatted_20_Text">140 <text:s text:c="2"/>WRITELN('SHL =',SHL(I));</text:p>
      <text:p text:style-name="Preformatted_20_Text">150 <text:s text:c="2"/>WRITELN('SHR =',SHR(l));</text:p>
      <text:p text:style-name="Preformatted_20_Text">160 <text:s/>END;</text:p>
      <text:p text:style-name="Preformatted_20_Text">170 <text:s/>PAGE;</text:p>
      <text:p text:style-name="Preformatted_20_Text">180 <text:s/>R:=0;</text:p>
      <text:p text:style-name="Preformatted_20_Text">190 <text:s/>I:=1;</text:p>
      <text:p text:style-name="Preformatted_20_Text">200 <text:s/>WHILE I&lt;64 DO</text:p>
      <text:p text:style-name="Preformatted_20_Text">210 <text:s/>BEGIN</text:p>
      <text:p text:style-name="Preformatted_20_Text">220 <text:s text:c="2"/>GOTOXY(I, 8+ROUND(5*SIN(I/5)));</text:p>
      <text:p text:style-name="Preformatted_20_Text">230 <text:s text:c="2"/>WRITE('o');</text:p>
      <text:p text:style-name="Preformatted_20_Text">240 <text:s text:c="2"/>I=I+1;</text:p>
      <text:p text:style-name="Preformatted_20_Text">250 <text:s/>END;</text:p>
      <text:p text:style-name="Preformatted_20_Text">260 END.</text:p>
      <text:h text:style-name="Heading_20_2" text:outline-level="2"><text:bookmark-start text:name="__RefHeading___Toc135_1849558913"/>Beispiel "Erzeugen von Zufallszahlen"<text:bookmark-end text:name="__RefHeading___Toc135_1849558913"/></text:h>
      <text:p text:style-name="Preformatted_20_Text"><text:s/>10 PROGRAM RANDO<text:span text:style-name="T35">M</text:span>;</text:p>
      <text:p text:style-name="Preformatted_20_Text"><text:s/>20 VAR</text:p>
      <text:p text:style-name="Preformatted_20_Text"><text:s/>30 <text:s/>I, R: INTEGER;</text:p>
      <text:p text:style-name="Preformatted_20_Text"><text:s/>40 BEGIN</text:p>
      <text:p text:style-name="Preformatted_20_Text"><text:s/>50 <text:s/>I:=1;</text:p>
      <text:p text:style-name="Preformatted_20_Text"><text:s/>60 <text:s/>WHILE I &lt; 11 DO</text:p>
      <text:p text:style-name="Preformatted_20_Text"><text:soft-page-break/><text:s/>70 <text:s/>BEGIN</text:p>
      <text:p text:style-name="Preformatted_20_Text"><text:s/>80 <text:s text:c="2"/>R:=RANDO<text:span text:style-name="T36">M</text:span>;</text:p>
      <text:p text:style-name="Preformatted_20_Text"><text:s/>90 <text:s text:c="2"/>WRITELN('Wert ist: ' ,R);</text:p>
      <text:p text:style-name="Preformatted_20_Text">100 <text:s text:c="2"/>I:=I+1;</text:p>
      <text:p text:style-name="Preformatted_20_Text">110 <text:s/>END;</text:p>
      <text:p text:style-name="Preformatted_20_Text">120 END.</text:p>
      <text:h text:style-name="Heading_20_2" text:outline-level="2"><text:bookmark-start text:name="__RefHeading___Toc8710_133429051"/>Beispiel <text:span text:style-name="Source_20_Text"><text:span text:style-name="T51">TOUT</text:span></text:span> und <text:span text:style-name="Source_20_Text"><text:span text:style-name="T51">TIN</text:span></text:span><text:bookmark-end text:name="__RefHeading___Toc8710_133429051"/></text:h>
      <text:p text:style-name="Text_20_body">Das Prog<text:span text:style-name="T51">ramm eignet sich zum Test von </text:span><text:span text:style-name="Source_20_Text"><text:span text:style-name="T51">PasEx2</text:span></text:span><text:span text:style-name="T51"> </text:span><text:span text:style-name="T52">unter CAOS Version 4.6 und älter.</text:span><text:span text:style-name="T51"> Dazu wird aus </text:span><text:span text:style-name="T53">KC-</text:span><text:span text:style-name="T51">P</text:span><text:span text:style-name="T53">ASCAL</text:span><text:span text:style-name="T51"> heraus mit </text:span><text:span text:style-name="Source_20_Text"><text:span text:style-name="T51">T</text:span></text:span><text:span text:style-name="T51"> ein ausführbares Programm </text:span><text:span text:style-name="Source_20_Text"><text:span text:style-name="T51">GRUSS.</text:span></text:span><text:span text:style-name="Source_20_Text"><text:span text:style-name="T66">KCC</text:span></text:span><text:span text:style-name="T51"> generiert. Es ist nicht wichtig, ob danach erst </text:span><text:span text:style-name="Source_20_Text"><text:span text:style-name="T51">GRUSS.</text:span></text:span><text:span text:style-name="Source_20_Text"><text:span text:style-name="T66">KCC</text:span></text:span><text:span text:style-name="T51"> oder </text:span><text:span text:style-name="Source_20_Text"><text:span text:style-name="T51">PASEX2.KCC</text:span></text:span><text:span text:style-name="T51"> geladen wird, nur müssen beide im Speicher sein. Mit </text:span><text:span text:style-name="Source_20_Text"><text:span text:style-name="T51">PASDEV</text:span></text:span><text:span text:style-name="T51"> stellt man den gewünschten Massenspeicher ein und startet dann </text:span><text:span text:style-name="Source_20_Text"><text:span text:style-name="T51">GRUSS</text:span></text:span><text:span text:style-name="T51">.</text:span></text:p>
      <text:p text:style-name="P44">Um auf dem KC 85/4 im Hauptspeicher die geschriebenen und zurück gelesenen Daten ohne großen Aufwand mit dem Betriebssystemkommando <text:span text:style-name="Source_20_Text">DISPLAY</text:span> zu kontrollieren, kann man nach dem Start von Pascal den verwendeten Speicher mit <text:span text:style-name="Source_20_Text">Z 32766,32766</text:span> begrenzen.</text:p>
      <text:p text:style-name="P43">Nebenbei zeigt das Programm, wie mit <text:span text:style-name="Source_20_Text">READLN</text:span> und <text:span text:style-name="Source_20_Text">READ</text:span> die erste Zeichenkette gelesen wird.</text:p>
      <text:p text:style-name="Preformatted_20_Text"><text:s text:c="3"/>10 PROGRAM GRUSS;</text:p>
      <text:p text:style-name="Preformatted_20_Text"><text:s text:c="3"/>20 (* vor <text:span text:style-name="T52">dem Laden mit G</text:span>: Z 32766,32766 *)</text:p>
      <text:p text:style-name="Preformatted_20_Text"><text:s text:c="3"/>30 CONST</text:p>
      <text:p text:style-name="Preformatted_20_Text"><text:s text:c="3"/>40 <text:s/>datnam='GRUSSDAT';</text:p>
      <text:p text:style-name="Preformatted_20_Text"><text:s text:c="3"/>50 TYPE</text:p>
      <text:p text:style-name="Preformatted_20_Text"><text:s text:c="3"/>60 <text:s/>tMit=RECORD</text:p>
      <text:p text:style-name="Preformatted_20_Text"><text:s text:c="3"/>70 <text:s text:c="2"/>text:ARRAY[1..200] OF CHAR;</text:p>
      <text:p text:style-name="Preformatted_20_Text"><text:s text:c="3"/>80 <text:s text:c="2"/>jahr,mon,tag:INTEGER</text:p>
      <text:p text:style-name="Preformatted_20_Text"><text:s text:c="3"/>90 <text:s/>END;</text:p>
      <text:p text:style-name="Preformatted_20_Text"><text:s text:c="2"/>100 VAR</text:p>
      <text:p text:style-name="Preformatted_20_Text"><text:s text:c="2"/>110 <text:s/>ta:CHAR;</text:p>
      <text:p text:style-name="Preformatted_20_Text"><text:s text:c="2"/>120 <text:s/>gruss1,gruss2:tMit;</text:p>
      <text:p text:style-name="Preformatted_20_Text"><text:s text:c="2"/>130 </text:p>
      <text:p text:style-name="Preformatted_20_Text"><text:s text:c="2"/>140 BEGIN</text:p>
      <text:p text:style-name="Preformatted_20_Text"><text:s text:c="2"/>150 </text:p>
      <text:p text:style-name="Preformatted_20_Text"><text:s text:c="2"/>160 <text:s/>WITH gruss1 DO BEGIN</text:p>
      <text:p text:style-name="Preformatted_20_Text"><text:s text:c="2"/>170 <text:s text:c="2"/>WRITELN('Welches Datum haben wir heute?');</text:p>
      <text:p text:style-name="Preformatted_20_Text"><text:s text:c="2"/>180 <text:s text:c="2"/>WRITE('Tag <text:s/>: ');READ(tag);</text:p>
      <text:p text:style-name="Preformatted_20_Text"><text:s text:c="2"/>190 <text:s text:c="2"/>WRITE('Monat: ');READ(mon);</text:p>
      <text:p text:style-name="Preformatted_20_Text"><text:s text:c="2"/>200 <text:s text:c="2"/>WRITE('Jahr : ');READ(jahr);</text:p>
      <text:p text:style-name="Preformatted_20_Text"><text:s text:c="2"/>210 <text:s text:c="2"/>WRITELN('Schreiben Sie einen kurzen Gruss an');</text:p>
      <text:p text:style-name="Preformatted_20_Text"><text:s text:c="2"/>220 <text:s text:c="2"/>WRITELN('jemand wichtigen (max. 200 Zeichen):');</text:p>
      <text:p text:style-name="Preformatted_20_Text"><text:s text:c="2"/>230 <text:s text:c="2"/>IF EOLN THEN BEGIN</text:p>
      <text:p text:style-name="Preformatted_20_Text"><text:s text:c="2"/>240 <text:s text:c="3"/>READLN; READ(text); END</text:p>
      <text:p text:style-name="Preformatted_20_Text"><text:s text:c="2"/>250 <text:s text:c="2"/>ELSE</text:p>
      <text:p text:style-name="Preformatted_20_Text"><text:s text:c="2"/>260 <text:s text:c="3"/>READLN(text);</text:p>
      <text:p text:style-name="Preformatted_20_Text"><text:s text:c="2"/>270 <text:s/>END;</text:p>
      <text:p text:style-name="Preformatted_20_Text"><text:s text:c="2"/>280 </text:p>
      <text:p text:style-name="Preformatted_20_Text"><text:s text:c="2"/>290 <text:s/>WRITELN;</text:p>
      <text:p text:style-name="Preformatted_20_Text"><text:s text:c="2"/>300 <text:s/>WRITELN('Schreibe Datei ',datnam);</text:p>
      <text:p text:style-name="Preformatted_20_Text"><text:s text:c="2"/>310 <text:s/>WRITELN('ab Adr. ',ADDR(gruss1):4:H,' Laenge ',SIZE(gruss1):4:H);</text:p>
      <text:p text:style-name="Preformatted_20_Text"><text:s text:c="2"/>320 <text:s/>WRITELN('Wenn bereit, dann ENTER');</text:p>
      <text:p text:style-name="Preformatted_20_Text"><text:s text:c="2"/>330 <text:s/>ta:=READKBD;</text:p>
      <text:p text:style-name="Preformatted_20_Text"><text:s text:c="2"/>340 <text:s/>TOUT(datnam,ADDR(gruss1),SIZE(gruss1));</text:p>
      <text:p text:style-name="Preformatted_20_Text"><text:soft-page-break/><text:s text:c="2"/>350 </text:p>
      <text:p text:style-name="Preformatted_20_Text"><text:s text:c="2"/>360 <text:s/>WRITELN;</text:p>
      <text:p text:style-name="Preformatted_20_Text"><text:s text:c="2"/>370 <text:s/>WRITELN('Lese Datei ',datnam);</text:p>
      <text:p text:style-name="Preformatted_20_Text"><text:s text:c="2"/>380 <text:s/>WRITELN('ab Adr. ',ADDR(gruss2):4:H);</text:p>
      <text:p text:style-name="Preformatted_20_Text"><text:s text:c="2"/>390 <text:s/>WRITELN('Wenn bereit, dann ENTER');</text:p>
      <text:p text:style-name="Preformatted_20_Text"><text:s text:c="2"/>400 <text:s/>ta:=READKBD;</text:p>
      <text:p text:style-name="Preformatted_20_Text"><text:s text:c="2"/>410 <text:s/>TIN(datnam,ADDR(gruss2));</text:p>
      <text:p text:style-name="Preformatted_20_Text"><text:s text:c="2"/>420 <text:s/>WRITELN;</text:p>
      <text:p text:style-name="Preformatted_20_Text"><text:s text:c="2"/>430 <text:s/>WITH gruss2 DO BEGIN</text:p>
      <text:p text:style-name="Preformatted_20_Text"><text:s text:c="2"/>440 <text:s text:c="2"/>WRITELN('Gruss vom ',tag:2,'.',mon:2,'.',jahr);</text:p>
      <text:p text:style-name="Preformatted_20_Text"><text:s text:c="2"/>450 <text:s text:c="2"/>WRITELN(text);</text:p>
      <text:p text:style-name="Preformatted_20_Text"><text:s text:c="2"/>460 <text:s/>END;</text:p>
      <text:p text:style-name="Preformatted_20_Text"><text:s text:c="2"/>470 </text:p>
      <text:p text:style-name="Preformatted_20_Text"><text:s text:c="2"/>480 <text:s/>WRITELN;</text:p>
      <text:p text:style-name="Preformatted_20_Text"><text:s text:c="2"/>490 <text:s/>WRITELN('Bis bald!');</text:p>
      <text:p text:style-name="Preformatted_20_Text"><text:s text:c="2"/>500 END.</text:p>
      <text:p text:style-name="Preformatted_20_Text"/>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rotected="true">
            <text:p text:style-name="P1">Literaturverzeichnis</text:p>
          </text:index-title>
          <text:p text:style-name="P37">KCPascal: Mugler, Albrecht, KC-Pascal (Version 4.4), 1987, <text:a xlink:type="simple" xlink:href="http://kc85.info/index.php/download-topmenu/viewdownload/5-programmiersprachen/43-kc-pascal.html" text:style-name="Internet_20_link" text:visited-style-name="Internet_20_link"><text:span text:style-name="Internet_20_link">http://kc85.info/index.php/download-topmenu/viewdownload/5-programmiersprachen/43-kc-pascal.html</text:span></text:a></text:p>
          <text:p text:style-name="P37">Hisoft: , Memotech Hisoft Pascal User Guide, 1984, <text:a xlink:type="simple" xlink:href="https://www.cpcwiki.eu/imgs/6/64/Hisoft_Pascal_4T_Manual_%28English%29.pdf" text:style-name="Internet_20_link" text:visited-style-name="Internet_20_link"><text:span text:style-name="Internet_20_link">https://www.cpcwiki.eu/imgs/6/64/Hisoft_Pascal_4T_Manual_%28English%29.pdf</text:span></text:a></text:p>
        </text:index-body>
      </text:bibliography>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 Narrow" svg:font-family="'Liberation Sans Narrow'" style:font-family-generic="swiss"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marker draw:name="Linienspitzen_20_100" draw:display-name="Linienspitzen 100" svg:viewBox="0 0 20 20" svg:d="M0 20l10-20 10 20z"/>
    <draw:marker draw:name="Linienspitzen_20_101" draw:display-name="Linienspitzen 101" svg:viewBox="0 0 20 20" svg:d="M0 20l10-20 10 20z"/>
    <draw:marker draw:name="Linienspitzen_20_102" draw:display-name="Linienspitzen 102" svg:viewBox="0 0 20 20" svg:d="M0 20l10-20 10 20z"/>
    <draw:marker draw:name="Linienspitzen_20_103" draw:display-name="Linienspitzen 103" svg:viewBox="0 0 20 20" svg:d="M0 20l10-20 10 20z"/>
    <draw:marker draw:name="Linienspitzen_20_104" draw:display-name="Linienspitzen 104" svg:viewBox="0 0 20 20" svg:d="M0 20l10-20 10 20z"/>
    <draw:marker draw:name="Linienspitzen_20_105" draw:display-name="Linienspitzen 105" svg:viewBox="0 0 20 20" svg:d="M0 20l10-20 10 20z"/>
    <draw:marker draw:name="Linienspitzen_20_106" draw:display-name="Linienspitzen 106" svg:viewBox="0 0 20 20" svg:d="M0 20l10-20 10 20z"/>
    <draw:marker draw:name="Linienspitzen_20_107" draw:display-name="Linienspitzen 107" svg:viewBox="0 0 20 20" svg:d="M0 20l10-20 10 20z"/>
    <draw:marker draw:name="Linienspitzen_20_108" draw:display-name="Linienspitzen 108" svg:viewBox="0 0 20 20" svg:d="M0 20l10-20 10 20z"/>
    <draw:marker draw:name="Linienspitzen_20_109" draw:display-name="Linienspitzen 109" svg:viewBox="0 0 20 20" svg:d="M0 20l10-20 10 20z"/>
    <draw:marker draw:name="Linienspitzen_20_110" draw:display-name="Linienspitzen 110" svg:viewBox="0 0 20 20" svg:d="M0 20l10-20 10 20z"/>
    <draw:marker draw:name="Linienspitzen_20_111" draw:display-name="Linienspitzen 111" svg:viewBox="0 0 20 20" svg:d="M0 20l10-20 10 20z"/>
    <draw:marker draw:name="Linienspitzen_20_112" draw:display-name="Linienspitzen 112" svg:viewBox="0 0 20 20" svg:d="M0 20l10-20 10 20z"/>
    <draw:marker draw:name="Linienspitzen_20_113" draw:display-name="Linienspitzen 113" svg:viewBox="0 0 20 20" svg:d="M0 20l10-20 10 20z"/>
    <draw:marker draw:name="Linienspitzen_20_114" draw:display-name="Linienspitzen 114" svg:viewBox="0 0 20 20" svg:d="M0 20l10-20 10 20z"/>
    <draw:marker draw:name="Linienspitzen_20_115" draw:display-name="Linienspitzen 115" svg:viewBox="0 0 20 20" svg:d="M0 20l10-20 10 20z"/>
    <draw:marker draw:name="Linienspitzen_20_116" draw:display-name="Linienspitzen 116" svg:viewBox="0 0 20 20" svg:d="M0 20l10-20 10 20z"/>
    <draw:marker draw:name="Linienspitzen_20_117" draw:display-name="Linienspitzen 117" svg:viewBox="0 0 20 20" svg:d="M0 20l10-20 10 20z"/>
    <draw:marker draw:name="Linienspitzen_20_118" draw:display-name="Linienspitzen 118" svg:viewBox="0 0 20 20" svg:d="M0 20l10-20 10 20z"/>
    <draw:marker draw:name="Linienspitzen_20_119" draw:display-name="Linienspitzen 119" svg:viewBox="0 0 20 20" svg:d="M0 20l10-20 10 20z"/>
    <draw:marker draw:name="Linienspitzen_20_120" draw:display-name="Linienspitzen 120" svg:viewBox="0 0 20 20" svg:d="M0 20l10-20 10 20z"/>
    <draw:marker draw:name="Linienspitzen_20_121" draw:display-name="Linienspitzen 121" svg:viewBox="0 0 20 20" svg:d="M0 20l10-20 10 20z"/>
    <draw:marker draw:name="Linienspitzen_20_122" draw:display-name="Linienspitzen 122" svg:viewBox="0 0 20 20" svg:d="M0 20l10-20 10 20z"/>
    <draw:marker draw:name="Linienspitzen_20_123" draw:display-name="Linienspitzen 123" svg:viewBox="0 0 20 20" svg:d="M0 20l10-20 10 20z"/>
    <draw:marker draw:name="Linienspitzen_20_124" draw:display-name="Linienspitzen 124" svg:viewBox="0 0 20 20" svg:d="M0 20l10-20 10 20z"/>
    <draw:marker draw:name="Linienspitzen_20_125" draw:display-name="Linienspitzen 125" svg:viewBox="0 0 20 20" svg:d="M0 20l10-20 10 20z"/>
    <draw:marker draw:name="Linienspitzen_20_126" draw:display-name="Linienspitzen 126" svg:viewBox="0 0 20 20" svg:d="M0 20l10-20 10 20z"/>
    <draw:marker draw:name="Linienspitzen_20_127" draw:display-name="Linienspitzen 127" svg:viewBox="0 0 20 20" svg:d="M0 20l10-20 10 20z"/>
    <draw:marker draw:name="Linienspitzen_20_128" draw:display-name="Linienspitzen 128" svg:viewBox="0 0 20 20" svg:d="M0 20l10-20 10 20z"/>
    <draw:marker draw:name="Linienspitzen_20_129" draw:display-name="Linienspitzen 129" svg:viewBox="0 0 20 20" svg:d="M0 20l10-20 10 20z"/>
    <draw:marker draw:name="Linienspitzen_20_130" draw:display-name="Linienspitzen 130" svg:viewBox="0 0 20 20" svg:d="M0 20l10-20 10 20z"/>
    <draw:marker draw:name="Linienspitzen_20_131" draw:display-name="Linienspitzen 131" svg:viewBox="0 0 20 20" svg:d="M0 20l10-20 10 20z"/>
    <draw:marker draw:name="Linienspitzen_20_132" draw:display-name="Linienspitzen 132" svg:viewBox="0 0 20 20" svg:d="M0 20l10-20 10 20z"/>
    <draw:marker draw:name="Linienspitzen_20_133" draw:display-name="Linienspitzen 133" svg:viewBox="0 0 20 20" svg:d="M0 20l10-20 10 20z"/>
    <draw:marker draw:name="Linienspitzen_20_135" draw:display-name="Linienspitzen 135" svg:viewBox="0 0 20 20" svg:d="M0 20l10-20 10 20z"/>
    <draw:marker draw:name="Linienspitzen_20_136" draw:display-name="Linienspitzen 136" svg:viewBox="0 0 20 20" svg:d="M0 20l10-20 10 20z"/>
    <draw:marker draw:name="Linienspitzen_20_137" draw:display-name="Linienspitzen 137" svg:viewBox="0 0 20 20" svg:d="M0 20l10-20 10 20z"/>
    <draw:marker draw:name="Linienspitzen_20_138" draw:display-name="Linienspitzen 138" svg:viewBox="0 0 20 20" svg:d="M0 20l10-20 10 20z"/>
    <draw:marker draw:name="Linienspitzen_20_139" draw:display-name="Linienspitzen 139" svg:viewBox="0 0 20 20" svg:d="M0 20l10-20 10 20z"/>
    <draw:marker draw:name="Linienspitzen_20_14" draw:display-name="Linienspitzen 14" svg:viewBox="0 0 20 20" svg:d="M0 20l10-20 10 20z"/>
    <draw:marker draw:name="Linienspitzen_20_140" draw:display-name="Linienspitzen 140" svg:viewBox="0 0 20 20" svg:d="M0 20l10-20 10 20z"/>
    <draw:marker draw:name="Linienspitzen_20_141" draw:display-name="Linienspitzen 141" svg:viewBox="0 0 20 20" svg:d="M0 20l10-20 10 20z"/>
    <draw:marker draw:name="Linienspitzen_20_142" draw:display-name="Linienspitzen 142" svg:viewBox="0 0 20 20" svg:d="M0 20l10-20 10 20z"/>
    <draw:marker draw:name="Linienspitzen_20_143" draw:display-name="Linienspitzen 143" svg:viewBox="0 0 20 20" svg:d="M0 20l10-20 10 20z"/>
    <draw:marker draw:name="Linienspitzen_20_144" draw:display-name="Linienspitzen 144" svg:viewBox="0 0 20 20" svg:d="M0 20l10-20 10 20z"/>
    <draw:marker draw:name="Linienspitzen_20_145" draw:display-name="Linienspitzen 145" svg:viewBox="0 0 20 20" svg:d="M0 20l10-20 10 20z"/>
    <draw:marker draw:name="Linienspitzen_20_146" draw:display-name="Linienspitzen 146" svg:viewBox="0 0 20 20" svg:d="M0 20l10-20 10 20z"/>
    <draw:marker draw:name="Linienspitzen_20_147" draw:display-name="Linienspitzen 147" svg:viewBox="0 0 20 20" svg:d="M0 20l10-20 10 20z"/>
    <draw:marker draw:name="Linienspitzen_20_148" draw:display-name="Linienspitzen 148" svg:viewBox="0 0 20 20" svg:d="M0 20l10-20 10 20z"/>
    <draw:marker draw:name="Linienspitzen_20_149" draw:display-name="Linienspitzen 149" svg:viewBox="0 0 20 20" svg:d="M0 20l10-20 10 20z"/>
    <draw:marker draw:name="Linienspitzen_20_150" draw:display-name="Linienspitzen 150" svg:viewBox="0 0 20 20" svg:d="M0 20l10-20 10 20z"/>
    <draw:marker draw:name="Linienspitzen_20_151" draw:display-name="Linienspitzen 151" svg:viewBox="0 0 20 20" svg:d="M0 20l10-20 10 20z"/>
    <draw:marker draw:name="Linienspitzen_20_152" draw:display-name="Linienspitzen 152" svg:viewBox="0 0 20 20" svg:d="M0 20l10-20 10 20z"/>
    <draw:marker draw:name="Linienspitzen_20_153" draw:display-name="Linienspitzen 153" svg:viewBox="0 0 20 20" svg:d="M0 20l10-20 10 20z"/>
    <draw:marker draw:name="Linienspitzen_20_154" draw:display-name="Linienspitzen 154" svg:viewBox="0 0 20 20" svg:d="M0 20l10-20 10 20z"/>
    <draw:marker draw:name="Linienspitzen_20_155" draw:display-name="Linienspitzen 155" svg:viewBox="0 0 20 20" svg:d="M0 20l10-20 10 20z"/>
    <draw:marker draw:name="Linienspitzen_20_156" draw:display-name="Linienspitzen 156" svg:viewBox="0 0 20 20" svg:d="M0 20l10-20 10 20z"/>
    <draw:marker draw:name="Linienspitzen_20_157" draw:display-name="Linienspitzen 157" svg:viewBox="0 0 20 20" svg:d="M0 20l10-20 10 20z"/>
    <draw:marker draw:name="Linienspitzen_20_158" draw:display-name="Linienspitzen 158" svg:viewBox="0 0 20 20" svg:d="M0 20l10-20 10 20z"/>
    <draw:marker draw:name="Linienspitzen_20_159" draw:display-name="Linienspitzen 159" svg:viewBox="0 0 20 20" svg:d="M0 20l10-20 10 20z"/>
    <draw:marker draw:name="Linienspitzen_20_160" draw:display-name="Linienspitzen 160" svg:viewBox="0 0 20 20" svg:d="M0 20l10-20 10 20z"/>
    <draw:marker draw:name="Linienspitzen_20_161" draw:display-name="Linienspitzen 161" svg:viewBox="0 0 20 20" svg:d="M0 20l10-20 10 20z"/>
    <draw:marker draw:name="Linienspitzen_20_162" draw:display-name="Linienspitzen 162" svg:viewBox="0 0 20 20" svg:d="M0 20l10-20 10 20z"/>
    <draw:marker draw:name="Linienspitzen_20_163" draw:display-name="Linienspitzen 163" svg:viewBox="0 0 20 20" svg:d="M0 20l10-20 10 20z"/>
    <draw:marker draw:name="Linienspitzen_20_164" draw:display-name="Linienspitzen 164" svg:viewBox="0 0 20 20" svg:d="M0 20l10-20 10 20z"/>
    <draw:marker draw:name="Linienspitzen_20_165" draw:display-name="Linienspitzen 165" svg:viewBox="0 0 20 20" svg:d="M0 20l10-20 10 20z"/>
    <draw:marker draw:name="Linienspitzen_20_166" draw:display-name="Linienspitzen 166" svg:viewBox="0 0 20 20" svg:d="M0 20l10-20 10 20z"/>
    <draw:marker draw:name="Linienspitzen_20_167" draw:display-name="Linienspitzen 167" svg:viewBox="0 0 20 20" svg:d="M0 20l10-20 10 20z"/>
    <draw:marker draw:name="Linienspitzen_20_168" draw:display-name="Linienspitzen 168" svg:viewBox="0 0 20 20" svg:d="M0 20l10-20 10 20z"/>
    <draw:marker draw:name="Linienspitzen_20_169" draw:display-name="Linienspitzen 169" svg:viewBox="0 0 20 20" svg:d="M0 20l10-20 10 20z"/>
    <draw:marker draw:name="Linienspitzen_20_17" draw:display-name="Linienspitzen 17" svg:viewBox="0 0 20 20" svg:d="M0 20l10-20 10 20z"/>
    <draw:marker draw:name="Linienspitzen_20_170" draw:display-name="Linienspitzen 170" svg:viewBox="0 0 20 20" svg:d="M0 20l10-20 10 20z"/>
    <draw:marker draw:name="Linienspitzen_20_171" draw:display-name="Linienspitzen 171" svg:viewBox="0 0 20 20" svg:d="M0 20l10-20 10 20z"/>
    <draw:marker draw:name="Linienspitzen_20_172" draw:display-name="Linienspitzen 172" svg:viewBox="0 0 20 20" svg:d="M0 20l10-20 10 20z"/>
    <draw:marker draw:name="Linienspitzen_20_173" draw:display-name="Linienspitzen 173" svg:viewBox="0 0 20 20" svg:d="M0 20l10-20 10 20z"/>
    <draw:marker draw:name="Linienspitzen_20_174" draw:display-name="Linienspitzen 174" svg:viewBox="0 0 20 20" svg:d="M0 20l10-20 10 20z"/>
    <draw:marker draw:name="Linienspitzen_20_175" draw:display-name="Linienspitzen 175" svg:viewBox="0 0 20 20" svg:d="M0 20l10-20 10 20z"/>
    <draw:marker draw:name="Linienspitzen_20_176" draw:display-name="Linienspitzen 176" svg:viewBox="0 0 20 20" svg:d="M0 20l10-20 10 20z"/>
    <draw:marker draw:name="Linienspitzen_20_177" draw:display-name="Linienspitzen 177" svg:viewBox="0 0 20 20" svg:d="M0 20l10-20 10 20z"/>
    <draw:marker draw:name="Linienspitzen_20_178" draw:display-name="Linienspitzen 178" svg:viewBox="0 0 20 20" svg:d="M0 20l10-20 10 20z"/>
    <draw:marker draw:name="Linienspitzen_20_179" draw:display-name="Linienspitzen 179" svg:viewBox="0 0 20 20" svg:d="M0 20l10-20 10 20z"/>
    <draw:marker draw:name="Linienspitzen_20_180" draw:display-name="Linienspitzen 180" svg:viewBox="0 0 20 20" svg:d="M0 20l10-20 10 20z"/>
    <draw:marker draw:name="Linienspitzen_20_181" draw:display-name="Linienspitzen 181" svg:viewBox="0 0 20 20" svg:d="M0 20l10-20 10 20z"/>
    <draw:marker draw:name="Linienspitzen_20_182" draw:display-name="Linienspitzen 182" svg:viewBox="0 0 20 20" svg:d="M0 20l10-20 10 20z"/>
    <draw:marker draw:name="Linienspitzen_20_183" draw:display-name="Linienspitzen 183" svg:viewBox="0 0 20 20" svg:d="M0 20l10-20 10 20z"/>
    <draw:marker draw:name="Linienspitzen_20_184" draw:display-name="Linienspitzen 184" svg:viewBox="0 0 20 20" svg:d="M0 20l10-20 10 20z"/>
    <draw:marker draw:name="Linienspitzen_20_185" draw:display-name="Linienspitzen 185" svg:viewBox="0 0 20 20" svg:d="M0 20l10-20 10 20z"/>
    <draw:marker draw:name="Linienspitzen_20_186" draw:display-name="Linienspitzen 186" svg:viewBox="0 0 20 20" svg:d="M0 20l10-20 10 20z"/>
    <draw:marker draw:name="Linienspitzen_20_187" draw:display-name="Linienspitzen 187" svg:viewBox="0 0 20 20" svg:d="M0 20l10-20 10 20z"/>
    <draw:marker draw:name="Linienspitzen_20_188" draw:display-name="Linienspitzen 188" svg:viewBox="0 0 20 20" svg:d="M0 20l10-20 10 20z"/>
    <draw:marker draw:name="Linienspitzen_20_189" draw:display-name="Linienspitzen 189" svg:viewBox="0 0 20 20" svg:d="M0 20l10-20 10 20z"/>
    <draw:marker draw:name="Linienspitzen_20_19" draw:display-name="Linienspitzen 19" svg:viewBox="0 0 20 20" svg:d="M0 20l10-20 10 20z"/>
    <draw:marker draw:name="Linienspitzen_20_190" draw:display-name="Linienspitzen 190" svg:viewBox="0 0 20 20" svg:d="M0 20l10-20 10 20z"/>
    <draw:marker draw:name="Linienspitzen_20_191" draw:display-name="Linienspitzen 191" svg:viewBox="0 0 20 20" svg:d="M0 20l10-20 10 20z"/>
    <draw:marker draw:name="Linienspitzen_20_192" draw:display-name="Linienspitzen 192" svg:viewBox="0 0 20 20" svg:d="M0 20l10-20 10 20z"/>
    <draw:marker draw:name="Linienspitzen_20_193" draw:display-name="Linienspitzen 193" svg:viewBox="0 0 20 20" svg:d="M0 20l10-20 10 20z"/>
    <draw:marker draw:name="Linienspitzen_20_194" draw:display-name="Linienspitzen 194" svg:viewBox="0 0 20 20" svg:d="M0 20l10-20 10 20z"/>
    <draw:marker draw:name="Linienspitzen_20_195" draw:display-name="Linienspitzen 195" svg:viewBox="0 0 20 20" svg:d="M0 20l10-20 10 20z"/>
    <draw:marker draw:name="Linienspitzen_20_196" draw:display-name="Linienspitzen 196" svg:viewBox="0 0 20 20" svg:d="M0 20l10-20 10 20z"/>
    <draw:marker draw:name="Linienspitzen_20_197" draw:display-name="Linienspitzen 197" svg:viewBox="0 0 20 20" svg:d="M0 20l10-20 10 20z"/>
    <draw:marker draw:name="Linienspitzen_20_198" draw:display-name="Linienspitzen 198" svg:viewBox="0 0 20 20" svg:d="M0 20l10-20 10 20z"/>
    <draw:marker draw:name="Linienspitzen_20_199" draw:display-name="Linienspitzen 199" svg:viewBox="0 0 20 20" svg:d="M0 20l10-20 10 20z"/>
    <draw:marker draw:name="Linienspitzen_20_200" draw:display-name="Linienspitzen 200" svg:viewBox="0 0 20 20" svg:d="M0 20l10-20 10 20z"/>
    <draw:marker draw:name="Linienspitzen_20_201" draw:display-name="Linienspitzen 201" svg:viewBox="0 0 20 20" svg:d="M0 20l10-20 10 20z"/>
    <draw:marker draw:name="Linienspitzen_20_202" draw:display-name="Linienspitzen 202" svg:viewBox="0 0 20 20" svg:d="M0 20l10-20 10 20z"/>
    <draw:marker draw:name="Linienspitzen_20_203" draw:display-name="Linienspitzen 203" svg:viewBox="0 0 20 20" svg:d="M0 20l10-20 10 20z"/>
    <draw:marker draw:name="Linienspitzen_20_204" draw:display-name="Linienspitzen 204" svg:viewBox="0 0 20 20" svg:d="M0 20l10-20 10 20z"/>
    <draw:marker draw:name="Linienspitzen_20_206" draw:display-name="Linienspitzen 206" svg:viewBox="0 0 20 20" svg:d="M0 20l10-20 10 20z"/>
    <draw:marker draw:name="Linienspitzen_20_207" draw:display-name="Linienspitzen 207" svg:viewBox="0 0 20 20" svg:d="M0 20l10-20 10 20z"/>
    <draw:marker draw:name="Linienspitzen_20_208" draw:display-name="Linienspitzen 208" svg:viewBox="0 0 20 20" svg:d="M0 20l10-20 10 20z"/>
    <draw:marker draw:name="Linienspitzen_20_209" draw:display-name="Linienspitzen 209" svg:viewBox="0 0 20 20" svg:d="M0 20l10-20 10 20z"/>
    <draw:marker draw:name="Linienspitzen_20_21" draw:display-name="Linienspitzen 21" svg:viewBox="0 0 20 20" svg:d="M0 20l10-20 10 20z"/>
    <draw:marker draw:name="Linienspitzen_20_210" draw:display-name="Linienspitzen 210" svg:viewBox="0 0 20 20" svg:d="M0 20l10-20 10 20z"/>
    <draw:marker draw:name="Linienspitzen_20_211" draw:display-name="Linienspitzen 211" svg:viewBox="0 0 20 20" svg:d="M0 20l10-20 10 20z"/>
    <draw:marker draw:name="Linienspitzen_20_212" draw:display-name="Linienspitzen 212" svg:viewBox="0 0 20 20" svg:d="M0 20l10-20 10 20z"/>
    <draw:marker draw:name="Linienspitzen_20_213" draw:display-name="Linienspitzen 213" svg:viewBox="0 0 20 20" svg:d="M0 20l10-20 10 20z"/>
    <draw:marker draw:name="Linienspitzen_20_214" draw:display-name="Linienspitzen 214" svg:viewBox="0 0 20 20" svg:d="M0 20l10-20 10 20z"/>
    <draw:marker draw:name="Linienspitzen_20_215" draw:display-name="Linienspitzen 215" svg:viewBox="0 0 20 20" svg:d="M0 20l10-20 10 20z"/>
    <draw:marker draw:name="Linienspitzen_20_216" draw:display-name="Linienspitzen 216" svg:viewBox="0 0 20 20" svg:d="M0 20l10-20 10 20z"/>
    <draw:marker draw:name="Linienspitzen_20_217" draw:display-name="Linienspitzen 217" svg:viewBox="0 0 20 20" svg:d="M0 20l10-20 10 20z"/>
    <draw:marker draw:name="Linienspitzen_20_218" draw:display-name="Linienspitzen 218" svg:viewBox="0 0 20 20" svg:d="M0 20l10-20 10 20z"/>
    <draw:marker draw:name="Linienspitzen_20_219" draw:display-name="Linienspitzen 219" svg:viewBox="0 0 20 20" svg:d="M0 20l10-20 10 20z"/>
    <draw:marker draw:name="Linienspitzen_20_22" draw:display-name="Linienspitzen 22" svg:viewBox="0 0 20 20" svg:d="M0 20l10-20 10 20z"/>
    <draw:marker draw:name="Linienspitzen_20_220" draw:display-name="Linienspitzen 220" svg:viewBox="0 0 20 20" svg:d="M0 20l10-20 10 20z"/>
    <draw:marker draw:name="Linienspitzen_20_221" draw:display-name="Linienspitzen 221" svg:viewBox="0 0 20 20" svg:d="M0 20l10-20 10 20z"/>
    <draw:marker draw:name="Linienspitzen_20_222" draw:display-name="Linienspitzen 222" svg:viewBox="0 0 20 20" svg:d="M0 20l10-20 10 20z"/>
    <draw:marker draw:name="Linienspitzen_20_223" draw:display-name="Linienspitzen 223" svg:viewBox="0 0 20 20" svg:d="M0 20l10-20 10 20z"/>
    <draw:marker draw:name="Linienspitzen_20_224" draw:display-name="Linienspitzen 224" svg:viewBox="0 0 20 20" svg:d="M0 20l10-20 10 20z"/>
    <draw:marker draw:name="Linienspitzen_20_225" draw:display-name="Linienspitzen 225" svg:viewBox="0 0 20 20" svg:d="M0 20l10-20 10 20z"/>
    <draw:marker draw:name="Linienspitzen_20_227" draw:display-name="Linienspitzen 227" svg:viewBox="0 0 20 20" svg:d="M0 20l10-20 10 20z"/>
    <draw:marker draw:name="Linienspitzen_20_228" draw:display-name="Linienspitzen 228" svg:viewBox="0 0 20 20" svg:d="M0 20l10-20 10 20z"/>
    <draw:marker draw:name="Linienspitzen_20_229" draw:display-name="Linienspitzen 229" svg:viewBox="0 0 20 20" svg:d="M0 20l10-20 10 20z"/>
    <draw:marker draw:name="Linienspitzen_20_230" draw:display-name="Linienspitzen 230" svg:viewBox="0 0 20 20" svg:d="M0 20l10-20 10 20z"/>
    <draw:marker draw:name="Linienspitzen_20_231" draw:display-name="Linienspitzen 231" svg:viewBox="0 0 20 20" svg:d="M0 20l10-20 10 20z"/>
    <draw:marker draw:name="Linienspitzen_20_232" draw:display-name="Linienspitzen 232" svg:viewBox="0 0 20 20" svg:d="M0 20l10-20 10 20z"/>
    <draw:marker draw:name="Linienspitzen_20_233" draw:display-name="Linienspitzen 233" svg:viewBox="0 0 20 20" svg:d="M0 20l10-20 10 20z"/>
    <draw:marker draw:name="Linienspitzen_20_234" draw:display-name="Linienspitzen 234" svg:viewBox="0 0 20 20" svg:d="M0 20l10-20 10 20z"/>
    <draw:marker draw:name="Linienspitzen_20_235" draw:display-name="Linienspitzen 235" svg:viewBox="0 0 20 20" svg:d="M0 20l10-20 10 20z"/>
    <draw:marker draw:name="Linienspitzen_20_237" draw:display-name="Linienspitzen 237" svg:viewBox="0 0 20 20" svg:d="M0 20l10-20 10 20z"/>
    <draw:marker draw:name="Linienspitzen_20_238" draw:display-name="Linienspitzen 238" svg:viewBox="0 0 20 20" svg:d="M0 20l10-20 10 20z"/>
    <draw:marker draw:name="Linienspitzen_20_239" draw:display-name="Linienspitzen 239" svg:viewBox="0 0 20 20" svg:d="M0 20l10-20 10 20z"/>
    <draw:marker draw:name="Linienspitzen_20_24" draw:display-name="Linienspitzen 24" svg:viewBox="0 0 20 20" svg:d="M0 20l10-20 10 20z"/>
    <draw:marker draw:name="Linienspitzen_20_240" draw:display-name="Linienspitzen 240" svg:viewBox="0 0 20 20" svg:d="M0 20l10-20 10 20z"/>
    <draw:marker draw:name="Linienspitzen_20_242" draw:display-name="Linienspitzen 242" svg:viewBox="0 0 20 20" svg:d="M0 20l10-20 10 20z"/>
    <draw:marker draw:name="Linienspitzen_20_243" draw:display-name="Linienspitzen 243" svg:viewBox="0 0 20 20" svg:d="M0 20l10-20 10 20z"/>
    <draw:marker draw:name="Linienspitzen_20_245" draw:display-name="Linienspitzen 245" svg:viewBox="0 0 20 20" svg:d="M0 20l10-20 10 20z"/>
    <draw:marker draw:name="Linienspitzen_20_246" draw:display-name="Linienspitzen 246" svg:viewBox="0 0 20 20" svg:d="M0 20l10-20 10 20z"/>
    <draw:marker draw:name="Linienspitzen_20_247" draw:display-name="Linienspitzen 247" svg:viewBox="0 0 20 20" svg:d="M0 20l10-20 10 20z"/>
    <draw:marker draw:name="Linienspitzen_20_248" draw:display-name="Linienspitzen 248" svg:viewBox="0 0 20 20" svg:d="M0 20l10-20 10 20z"/>
    <draw:marker draw:name="Linienspitzen_20_249" draw:display-name="Linienspitzen 249" svg:viewBox="0 0 20 20" svg:d="M0 20l10-20 10 20z"/>
    <draw:marker draw:name="Linienspitzen_20_25" draw:display-name="Linienspitzen 25" svg:viewBox="0 0 20 20" svg:d="M0 20l10-20 10 20z"/>
    <draw:marker draw:name="Linienspitzen_20_250" draw:display-name="Linienspitzen 250" svg:viewBox="0 0 20 20" svg:d="M0 20l10-20 10 20z"/>
    <draw:marker draw:name="Linienspitzen_20_251" draw:display-name="Linienspitzen 251" svg:viewBox="0 0 20 20" svg:d="M0 20l10-20 10 20z"/>
    <draw:marker draw:name="Linienspitzen_20_252" draw:display-name="Linienspitzen 252" svg:viewBox="0 0 20 20" svg:d="M0 20l10-20 10 20z"/>
    <draw:marker draw:name="Linienspitzen_20_253" draw:display-name="Linienspitzen 253" svg:viewBox="0 0 20 20" svg:d="M0 20l10-20 10 20z"/>
    <draw:marker draw:name="Linienspitzen_20_254" draw:display-name="Linienspitzen 254" svg:viewBox="0 0 20 20" svg:d="M0 20l10-20 10 20z"/>
    <draw:marker draw:name="Linienspitzen_20_255" draw:display-name="Linienspitzen 255" svg:viewBox="0 0 20 20" svg:d="M0 20l10-20 10 20z"/>
    <draw:marker draw:name="Linienspitzen_20_256" draw:display-name="Linienspitzen 256" svg:viewBox="0 0 20 20" svg:d="M0 20l10-20 10 20z"/>
    <draw:marker draw:name="Linienspitzen_20_257" draw:display-name="Linienspitzen 257" svg:viewBox="0 0 20 20" svg:d="M0 20l10-20 10 20z"/>
    <draw:marker draw:name="Linienspitzen_20_258" draw:display-name="Linienspitzen 258" svg:viewBox="0 0 20 20" svg:d="M0 20l10-20 10 20z"/>
    <draw:marker draw:name="Linienspitzen_20_259" draw:display-name="Linienspitzen 259" svg:viewBox="0 0 20 20" svg:d="M0 20l10-20 10 20z"/>
    <draw:marker draw:name="Linienspitzen_20_26" draw:display-name="Linienspitzen 26" svg:viewBox="0 0 20 20" svg:d="M0 20l10-20 10 20z"/>
    <draw:marker draw:name="Linienspitzen_20_260" draw:display-name="Linienspitzen 260" svg:viewBox="0 0 20 20" svg:d="M0 20l10-20 10 20z"/>
    <draw:marker draw:name="Linienspitzen_20_261" draw:display-name="Linienspitzen 261" svg:viewBox="0 0 20 20" svg:d="M0 20l10-20 10 20z"/>
    <draw:marker draw:name="Linienspitzen_20_262" draw:display-name="Linienspitzen 262" svg:viewBox="0 0 20 20" svg:d="M0 20l10-20 10 20z"/>
    <draw:marker draw:name="Linienspitzen_20_263" draw:display-name="Linienspitzen 263" svg:viewBox="0 0 20 20" svg:d="M0 20l10-20 10 20z"/>
    <draw:marker draw:name="Linienspitzen_20_264" draw:display-name="Linienspitzen 264" svg:viewBox="0 0 20 20" svg:d="M0 20l10-20 10 20z"/>
    <draw:marker draw:name="Linienspitzen_20_265" draw:display-name="Linienspitzen 265" svg:viewBox="0 0 20 20" svg:d="M0 20l10-20 10 20z"/>
    <draw:marker draw:name="Linienspitzen_20_266" draw:display-name="Linienspitzen 266" svg:viewBox="0 0 20 20" svg:d="M0 20l10-20 10 20z"/>
    <draw:marker draw:name="Linienspitzen_20_27" draw:display-name="Linienspitzen 27" svg:viewBox="0 0 20 20" svg:d="M0 20l10-20 10 20z"/>
    <draw:marker draw:name="Linienspitzen_20_270" draw:display-name="Linienspitzen 270" svg:viewBox="0 0 20 20" svg:d="M0 20l10-20 10 20z"/>
    <draw:marker draw:name="Linienspitzen_20_271" draw:display-name="Linienspitzen 271" svg:viewBox="0 0 20 20" svg:d="M0 20l10-20 10 20z"/>
    <draw:marker draw:name="Linienspitzen_20_272" draw:display-name="Linienspitzen 272" svg:viewBox="0 0 20 20" svg:d="M0 20l10-20 10 20z"/>
    <draw:marker draw:name="Linienspitzen_20_273" draw:display-name="Linienspitzen 273" svg:viewBox="0 0 20 20" svg:d="M0 20l10-20 10 20z"/>
    <draw:marker draw:name="Linienspitzen_20_274" draw:display-name="Linienspitzen 274" svg:viewBox="0 0 20 20" svg:d="M0 20l10-20 10 20z"/>
    <draw:marker draw:name="Linienspitzen_20_275" draw:display-name="Linienspitzen 275" svg:viewBox="0 0 20 20" svg:d="M0 20l10-20 10 20z"/>
    <draw:marker draw:name="Linienspitzen_20_276" draw:display-name="Linienspitzen 276" svg:viewBox="0 0 20 20" svg:d="M0 20l10-20 10 20z"/>
    <draw:marker draw:name="Linienspitzen_20_277" draw:display-name="Linienspitzen 277" svg:viewBox="0 0 20 20" svg:d="M0 20l10-20 10 20z"/>
    <draw:marker draw:name="Linienspitzen_20_278" draw:display-name="Linienspitzen 278" svg:viewBox="0 0 20 20" svg:d="M0 20l10-20 10 20z"/>
    <draw:marker draw:name="Linienspitzen_20_279" draw:display-name="Linienspitzen 279" svg:viewBox="0 0 20 20" svg:d="M0 20l10-20 10 20z"/>
    <draw:marker draw:name="Linienspitzen_20_28" draw:display-name="Linienspitzen 28" svg:viewBox="0 0 20 20" svg:d="M0 20l10-20 10 20z"/>
    <draw:marker draw:name="Linienspitzen_20_280" draw:display-name="Linienspitzen 280" svg:viewBox="0 0 20 20" svg:d="M0 20l10-20 10 20z"/>
    <draw:marker draw:name="Linienspitzen_20_281" draw:display-name="Linienspitzen 281" svg:viewBox="0 0 20 20" svg:d="M0 20l10-20 10 20z"/>
    <draw:marker draw:name="Linienspitzen_20_282" draw:display-name="Linienspitzen 282" svg:viewBox="0 0 20 20" svg:d="M0 20l10-20 10 20z"/>
    <draw:marker draw:name="Linienspitzen_20_283" draw:display-name="Linienspitzen 283" svg:viewBox="0 0 20 20" svg:d="M0 20l10-20 10 20z"/>
    <draw:marker draw:name="Linienspitzen_20_284" draw:display-name="Linienspitzen 284" svg:viewBox="0 0 20 20" svg:d="M0 20l10-20 10 20z"/>
    <draw:marker draw:name="Linienspitzen_20_285" draw:display-name="Linienspitzen 285" svg:viewBox="0 0 20 20" svg:d="M0 20l10-20 10 20z"/>
    <draw:marker draw:name="Linienspitzen_20_286" draw:display-name="Linienspitzen 286" svg:viewBox="0 0 20 20" svg:d="M0 20l10-20 10 20z"/>
    <draw:marker draw:name="Linienspitzen_20_287" draw:display-name="Linienspitzen 287" svg:viewBox="0 0 20 20" svg:d="M0 20l10-20 10 20z"/>
    <draw:marker draw:name="Linienspitzen_20_288" draw:display-name="Linienspitzen 288" svg:viewBox="0 0 20 20" svg:d="M0 20l10-20 10 20z"/>
    <draw:marker draw:name="Linienspitzen_20_289" draw:display-name="Linienspitzen 289" svg:viewBox="0 0 20 20" svg:d="M0 20l10-20 10 20z"/>
    <draw:marker draw:name="Linienspitzen_20_29" draw:display-name="Linienspitzen 29" svg:viewBox="0 0 20 20" svg:d="M0 20l10-20 10 20z"/>
    <draw:marker draw:name="Linienspitzen_20_290" draw:display-name="Linienspitzen 290" svg:viewBox="0 0 20 20" svg:d="M0 20l10-20 10 20z"/>
    <draw:marker draw:name="Linienspitzen_20_291" draw:display-name="Linienspitzen 291" svg:viewBox="0 0 20 20" svg:d="M0 20l10-20 10 20z"/>
    <draw:marker draw:name="Linienspitzen_20_292" draw:display-name="Linienspitzen 292" svg:viewBox="0 0 20 20" svg:d="M0 20l10-20 10 20z"/>
    <draw:marker draw:name="Linienspitzen_20_293" draw:display-name="Linienspitzen 293" svg:viewBox="0 0 20 20" svg:d="M0 20l10-20 10 20z"/>
    <draw:marker draw:name="Linienspitzen_20_296" draw:display-name="Linienspitzen 296" svg:viewBox="0 0 20 20" svg:d="M0 20l10-20 10 20z"/>
    <draw:marker draw:name="Linienspitzen_20_298" draw:display-name="Linienspitzen 298" svg:viewBox="0 0 20 20" svg:d="M0 20l10-20 10 20z"/>
    <draw:marker draw:name="Linienspitzen_20_299" draw:display-name="Linienspitzen 299" svg:viewBox="0 0 20 20" svg:d="M0 20l10-20 10 20z"/>
    <draw:marker draw:name="Linienspitzen_20_30" draw:display-name="Linienspitzen 30" svg:viewBox="0 0 20 20" svg:d="M0 20l10-20 10 20z"/>
    <draw:marker draw:name="Linienspitzen_20_300" draw:display-name="Linienspitzen 300" svg:viewBox="0 0 20 20" svg:d="M0 20l10-20 10 20z"/>
    <draw:marker draw:name="Linienspitzen_20_301" draw:display-name="Linienspitzen 301" svg:viewBox="0 0 20 20" svg:d="M0 20l10-20 10 20z"/>
    <draw:marker draw:name="Linienspitzen_20_302" draw:display-name="Linienspitzen 302" svg:viewBox="0 0 20 20" svg:d="M0 20l10-20 10 20z"/>
    <draw:marker draw:name="Linienspitzen_20_303" draw:display-name="Linienspitzen 303" svg:viewBox="0 0 20 20" svg:d="M0 20l10-20 10 20z"/>
    <draw:marker draw:name="Linienspitzen_20_304" draw:display-name="Linienspitzen 304" svg:viewBox="0 0 20 20" svg:d="M0 20l10-20 10 20z"/>
    <draw:marker draw:name="Linienspitzen_20_305" draw:display-name="Linienspitzen 305" svg:viewBox="0 0 20 20" svg:d="M0 20l10-20 10 20z"/>
    <draw:marker draw:name="Linienspitzen_20_306" draw:display-name="Linienspitzen 306" svg:viewBox="0 0 20 20" svg:d="M0 20l10-20 10 20z"/>
    <draw:marker draw:name="Linienspitzen_20_307" draw:display-name="Linienspitzen 307" svg:viewBox="0 0 20 20" svg:d="M0 20l10-20 10 20z"/>
    <draw:marker draw:name="Linienspitzen_20_308" draw:display-name="Linienspitzen 308" svg:viewBox="0 0 20 20" svg:d="M0 20l10-20 10 20z"/>
    <draw:marker draw:name="Linienspitzen_20_309" draw:display-name="Linienspitzen 309" svg:viewBox="0 0 20 20" svg:d="M0 20l10-20 10 20z"/>
    <draw:marker draw:name="Linienspitzen_20_31" draw:display-name="Linienspitzen 31" svg:viewBox="0 0 20 20" svg:d="M0 20l10-20 10 20z"/>
    <draw:marker draw:name="Linienspitzen_20_310" draw:display-name="Linienspitzen 310" svg:viewBox="0 0 20 20" svg:d="M0 20l10-20 10 20z"/>
    <draw:marker draw:name="Linienspitzen_20_311" draw:display-name="Linienspitzen 311" svg:viewBox="0 0 20 20" svg:d="M0 20l10-20 10 20z"/>
    <draw:marker draw:name="Linienspitzen_20_312" draw:display-name="Linienspitzen 312" svg:viewBox="0 0 20 20" svg:d="M0 20l10-20 10 20z"/>
    <draw:marker draw:name="Linienspitzen_20_313" draw:display-name="Linienspitzen 313" svg:viewBox="0 0 20 20" svg:d="M0 20l10-20 10 20z"/>
    <draw:marker draw:name="Linienspitzen_20_315" draw:display-name="Linienspitzen 315" svg:viewBox="0 0 20 20" svg:d="M0 20l10-20 10 20z"/>
    <draw:marker draw:name="Linienspitzen_20_316" draw:display-name="Linienspitzen 316" svg:viewBox="0 0 20 20" svg:d="M0 20l10-20 10 20z"/>
    <draw:marker draw:name="Linienspitzen_20_317" draw:display-name="Linienspitzen 317" svg:viewBox="0 0 20 20" svg:d="M0 20l10-20 10 20z"/>
    <draw:marker draw:name="Linienspitzen_20_318" draw:display-name="Linienspitzen 318" svg:viewBox="0 0 20 20" svg:d="M0 20l10-20 10 20z"/>
    <draw:marker draw:name="Linienspitzen_20_319" draw:display-name="Linienspitzen 319" svg:viewBox="0 0 20 20" svg:d="M0 20l10-20 10 20z"/>
    <draw:marker draw:name="Linienspitzen_20_32" draw:display-name="Linienspitzen 32" svg:viewBox="0 0 20 20" svg:d="M0 20l10-20 10 20z"/>
    <draw:marker draw:name="Linienspitzen_20_320" draw:display-name="Linienspitzen 320" svg:viewBox="0 0 20 20" svg:d="M0 20l10-20 10 20z"/>
    <draw:marker draw:name="Linienspitzen_20_321" draw:display-name="Linienspitzen 321" svg:viewBox="0 0 20 20" svg:d="M0 20l10-20 10 20z"/>
    <draw:marker draw:name="Linienspitzen_20_322" draw:display-name="Linienspitzen 322" svg:viewBox="0 0 20 20" svg:d="M0 20l10-20 10 20z"/>
    <draw:marker draw:name="Linienspitzen_20_323" draw:display-name="Linienspitzen 323" svg:viewBox="0 0 20 20" svg:d="M0 20l10-20 10 20z"/>
    <draw:marker draw:name="Linienspitzen_20_324" draw:display-name="Linienspitzen 324" svg:viewBox="0 0 20 20" svg:d="M0 20l10-20 10 20z"/>
    <draw:marker draw:name="Linienspitzen_20_326" draw:display-name="Linienspitzen 326" svg:viewBox="0 0 20 20" svg:d="M0 20l10-20 10 20z"/>
    <draw:marker draw:name="Linienspitzen_20_327" draw:display-name="Linienspitzen 327" svg:viewBox="0 0 20 20" svg:d="M0 20l10-20 10 20z"/>
    <draw:marker draw:name="Linienspitzen_20_328" draw:display-name="Linienspitzen 328" svg:viewBox="0 0 20 20" svg:d="M0 20l10-20 10 20z"/>
    <draw:marker draw:name="Linienspitzen_20_329" draw:display-name="Linienspitzen 329" svg:viewBox="0 0 20 20" svg:d="M0 20l10-20 10 20z"/>
    <draw:marker draw:name="Linienspitzen_20_33" draw:display-name="Linienspitzen 33" svg:viewBox="0 0 20 20" svg:d="M0 20l10-20 10 20z"/>
    <draw:marker draw:name="Linienspitzen_20_330" draw:display-name="Linienspitzen 330" svg:viewBox="0 0 20 20" svg:d="M0 20l10-20 10 20z"/>
    <draw:marker draw:name="Linienspitzen_20_331" draw:display-name="Linienspitzen 331" svg:viewBox="0 0 20 20" svg:d="M0 20l10-20 10 20z"/>
    <draw:marker draw:name="Linienspitzen_20_332" draw:display-name="Linienspitzen 332" svg:viewBox="0 0 20 20" svg:d="M0 20l10-20 10 20z"/>
    <draw:marker draw:name="Linienspitzen_20_333" draw:display-name="Linienspitzen 333" svg:viewBox="0 0 20 20" svg:d="M0 20l10-20 10 20z"/>
    <draw:marker draw:name="Linienspitzen_20_334" draw:display-name="Linienspitzen 334" svg:viewBox="0 0 20 20" svg:d="M0 20l10-20 10 20z"/>
    <draw:marker draw:name="Linienspitzen_20_335" draw:display-name="Linienspitzen 335" svg:viewBox="0 0 20 20" svg:d="M0 20l10-20 10 20z"/>
    <draw:marker draw:name="Linienspitzen_20_337" draw:display-name="Linienspitzen 337" svg:viewBox="0 0 20 20" svg:d="M0 20l10-20 10 20z"/>
    <draw:marker draw:name="Linienspitzen_20_338" draw:display-name="Linienspitzen 338" svg:viewBox="0 0 20 20" svg:d="M0 20l10-20 10 20z"/>
    <draw:marker draw:name="Linienspitzen_20_339" draw:display-name="Linienspitzen 339" svg:viewBox="0 0 20 20" svg:d="M0 20l10-20 10 20z"/>
    <draw:marker draw:name="Linienspitzen_20_340" draw:display-name="Linienspitzen 340" svg:viewBox="0 0 20 20" svg:d="M0 20l10-20 10 20z"/>
    <draw:marker draw:name="Linienspitzen_20_341" draw:display-name="Linienspitzen 341" svg:viewBox="0 0 20 20" svg:d="M0 20l10-20 10 20z"/>
    <draw:marker draw:name="Linienspitzen_20_342" draw:display-name="Linienspitzen 342" svg:viewBox="0 0 20 20" svg:d="M0 20l10-20 10 20z"/>
    <draw:marker draw:name="Linienspitzen_20_343" draw:display-name="Linienspitzen 343" svg:viewBox="0 0 20 20" svg:d="M0 20l10-20 10 20z"/>
    <draw:marker draw:name="Linienspitzen_20_344" draw:display-name="Linienspitzen 344" svg:viewBox="0 0 20 20" svg:d="M0 20l10-20 10 20z"/>
    <draw:marker draw:name="Linienspitzen_20_345" draw:display-name="Linienspitzen 345" svg:viewBox="0 0 20 20" svg:d="M0 20l10-20 10 20z"/>
    <draw:marker draw:name="Linienspitzen_20_35" draw:display-name="Linienspitzen 35" svg:viewBox="0 0 20 20" svg:d="M0 20l10-20 10 20z"/>
    <draw:marker draw:name="Linienspitzen_20_36" draw:display-name="Linienspitzen 36" svg:viewBox="0 0 20 20" svg:d="M0 20l10-20 10 20z"/>
    <draw:marker draw:name="Linienspitzen_20_37" draw:display-name="Linienspitzen 37" svg:viewBox="0 0 20 20" svg:d="M0 20l10-20 10 20z"/>
    <draw:marker draw:name="Linienspitzen_20_38" draw:display-name="Linienspitzen 38" svg:viewBox="0 0 20 20" svg:d="M0 20l10-20 10 20z"/>
    <draw:marker draw:name="Linienspitzen_20_39" draw:display-name="Linienspitzen 39" svg:viewBox="0 0 20 20" svg:d="M0 20l10-20 10 20z"/>
    <draw:marker draw:name="Linienspitzen_20_40" draw:display-name="Linienspitzen 40" svg:viewBox="0 0 20 20" svg:d="M0 20l10-20 10 20z"/>
    <draw:marker draw:name="Linienspitzen_20_41" draw:display-name="Linienspitzen 41" svg:viewBox="0 0 20 20" svg:d="M0 20l10-20 10 20z"/>
    <draw:marker draw:name="Linienspitzen_20_42" draw:display-name="Linienspitzen 42" svg:viewBox="0 0 20 20" svg:d="M0 20l10-20 10 20z"/>
    <draw:marker draw:name="Linienspitzen_20_43" draw:display-name="Linienspitzen 43" svg:viewBox="0 0 20 20" svg:d="M0 20l10-20 10 20z"/>
    <draw:marker draw:name="Linienspitzen_20_44" draw:display-name="Linienspitzen 44" svg:viewBox="0 0 20 20" svg:d="M0 20l10-20 10 20z"/>
    <draw:marker draw:name="Linienspitzen_20_45" draw:display-name="Linienspitzen 45" svg:viewBox="0 0 20 20" svg:d="M0 20l10-20 10 20z"/>
    <draw:marker draw:name="Linienspitzen_20_46" draw:display-name="Linienspitzen 46" svg:viewBox="0 0 20 20" svg:d="M0 20l10-20 10 20z"/>
    <draw:marker draw:name="Linienspitzen_20_47" draw:display-name="Linienspitzen 47" svg:viewBox="0 0 20 20" svg:d="M0 20l10-20 10 20z"/>
    <draw:marker draw:name="Linienspitzen_20_48" draw:display-name="Linienspitzen 48" svg:viewBox="0 0 20 20" svg:d="M0 20l10-20 10 20z"/>
    <draw:marker draw:name="Linienspitzen_20_49" draw:display-name="Linienspitzen 49" svg:viewBox="0 0 20 20" svg:d="M0 20l10-20 10 20z"/>
    <draw:marker draw:name="Linienspitzen_20_50" draw:display-name="Linienspitzen 50" svg:viewBox="0 0 20 20" svg:d="M0 20l10-20 10 20z"/>
    <draw:marker draw:name="Linienspitzen_20_51" draw:display-name="Linienspitzen 51" svg:viewBox="0 0 20 20" svg:d="M0 20l10-20 10 20z"/>
    <draw:marker draw:name="Linienspitzen_20_52" draw:display-name="Linienspitzen 52" svg:viewBox="0 0 20 20" svg:d="M0 20l10-20 10 20z"/>
    <draw:marker draw:name="Linienspitzen_20_53" draw:display-name="Linienspitzen 53" svg:viewBox="0 0 20 20" svg:d="M0 20l10-20 10 20z"/>
    <draw:marker draw:name="Linienspitzen_20_54" draw:display-name="Linienspitzen 54" svg:viewBox="0 0 20 20" svg:d="M0 20l10-20 10 20z"/>
    <draw:marker draw:name="Linienspitzen_20_55" draw:display-name="Linienspitzen 55" svg:viewBox="0 0 20 20" svg:d="M0 20l10-20 10 20z"/>
    <draw:marker draw:name="Linienspitzen_20_56" draw:display-name="Linienspitzen 56" svg:viewBox="0 0 20 20" svg:d="M0 20l10-20 10 20z"/>
    <draw:marker draw:name="Linienspitzen_20_57" draw:display-name="Linienspitzen 57" svg:viewBox="0 0 20 20" svg:d="M0 20l10-20 10 20z"/>
    <draw:marker draw:name="Linienspitzen_20_58" draw:display-name="Linienspitzen 58" svg:viewBox="0 0 20 20" svg:d="M0 20l10-20 10 20z"/>
    <draw:marker draw:name="Linienspitzen_20_59" draw:display-name="Linienspitzen 59" svg:viewBox="0 0 20 20" svg:d="M0 20l10-20 10 20z"/>
    <draw:marker draw:name="Linienspitzen_20_60" draw:display-name="Linienspitzen 60" svg:viewBox="0 0 20 20" svg:d="M0 20l10-20 10 20z"/>
    <draw:marker draw:name="Linienspitzen_20_61" draw:display-name="Linienspitzen 61" svg:viewBox="0 0 20 20" svg:d="M0 20l10-20 10 20z"/>
    <draw:marker draw:name="Linienspitzen_20_62" draw:display-name="Linienspitzen 62" svg:viewBox="0 0 20 20" svg:d="M0 20l10-20 10 20z"/>
    <draw:marker draw:name="Linienspitzen_20_63" draw:display-name="Linienspitzen 63" svg:viewBox="0 0 20 20" svg:d="M0 20l10-20 10 20z"/>
    <draw:marker draw:name="Linienspitzen_20_64" draw:display-name="Linienspitzen 64" svg:viewBox="0 0 20 20" svg:d="M0 20l10-20 10 20z"/>
    <draw:marker draw:name="Linienspitzen_20_66" draw:display-name="Linienspitzen 66" svg:viewBox="0 0 20 20" svg:d="M0 20l10-20 10 20z"/>
    <draw:marker draw:name="Linienspitzen_20_67" draw:display-name="Linienspitzen 67" svg:viewBox="0 0 20 20" svg:d="M0 20l10-20 10 20z"/>
    <draw:marker draw:name="Linienspitzen_20_68" draw:display-name="Linienspitzen 68" svg:viewBox="0 0 20 20" svg:d="M0 20l10-20 10 20z"/>
    <draw:marker draw:name="Linienspitzen_20_69" draw:display-name="Linienspitzen 69" svg:viewBox="0 0 20 20" svg:d="M0 20l10-20 10 20z"/>
    <draw:marker draw:name="Linienspitzen_20_70" draw:display-name="Linienspitzen 70" svg:viewBox="0 0 20 20" svg:d="M0 20l10-20 10 20z"/>
    <draw:marker draw:name="Linienspitzen_20_71" draw:display-name="Linienspitzen 71" svg:viewBox="0 0 20 20" svg:d="M0 20l10-20 10 20z"/>
    <draw:marker draw:name="Linienspitzen_20_72" draw:display-name="Linienspitzen 72" svg:viewBox="0 0 20 20" svg:d="M0 20l10-20 10 20z"/>
    <draw:marker draw:name="Linienspitzen_20_73" draw:display-name="Linienspitzen 73" svg:viewBox="0 0 20 20" svg:d="M0 20l10-20 10 20z"/>
    <draw:marker draw:name="Linienspitzen_20_74" draw:display-name="Linienspitzen 74" svg:viewBox="0 0 20 20" svg:d="M0 20l10-20 10 20z"/>
    <draw:marker draw:name="Linienspitzen_20_75" draw:display-name="Linienspitzen 75" svg:viewBox="0 0 20 20" svg:d="M0 20l10-20 10 20z"/>
    <draw:marker draw:name="Linienspitzen_20_76" draw:display-name="Linienspitzen 76" svg:viewBox="0 0 20 20" svg:d="M0 20l10-20 10 20z"/>
    <draw:marker draw:name="Linienspitzen_20_77" draw:display-name="Linienspitzen 77" svg:viewBox="0 0 20 20" svg:d="M0 20l10-20 10 20z"/>
    <draw:marker draw:name="Linienspitzen_20_78" draw:display-name="Linienspitzen 78" svg:viewBox="0 0 20 20" svg:d="M0 20l10-20 10 20z"/>
    <draw:marker draw:name="Linienspitzen_20_79" draw:display-name="Linienspitzen 79" svg:viewBox="0 0 20 20" svg:d="M0 20l10-20 10 20z"/>
    <draw:marker draw:name="Linienspitzen_20_80" draw:display-name="Linienspitzen 80" svg:viewBox="0 0 20 20" svg:d="M0 20l10-20 10 20z"/>
    <draw:marker draw:name="Linienspitzen_20_81" draw:display-name="Linienspitzen 81" svg:viewBox="0 0 20 20" svg:d="M0 20l10-20 10 20z"/>
    <draw:marker draw:name="Linienspitzen_20_82" draw:display-name="Linienspitzen 82" svg:viewBox="0 0 20 20" svg:d="M0 20l10-20 10 20z"/>
    <draw:marker draw:name="Linienspitzen_20_83" draw:display-name="Linienspitzen 83" svg:viewBox="0 0 20 20" svg:d="M0 20l10-20 10 20z"/>
    <draw:marker draw:name="Linienspitzen_20_84" draw:display-name="Linienspitzen 84" svg:viewBox="0 0 20 20" svg:d="M0 20l10-20 10 20z"/>
    <draw:marker draw:name="Linienspitzen_20_85" draw:display-name="Linienspitzen 85" svg:viewBox="0 0 20 20" svg:d="M0 20l10-20 10 20z"/>
    <draw:marker draw:name="Linienspitzen_20_86" draw:display-name="Linienspitzen 86" svg:viewBox="0 0 20 20" svg:d="M0 20l10-20 10 20z"/>
    <draw:marker draw:name="Linienspitzen_20_87" draw:display-name="Linienspitzen 87" svg:viewBox="0 0 20 20" svg:d="M0 20l10-20 10 20z"/>
    <draw:marker draw:name="Linienspitzen_20_88" draw:display-name="Linienspitzen 88" svg:viewBox="0 0 20 20" svg:d="M0 20l10-20 10 20z"/>
    <draw:marker draw:name="Linienspitzen_20_89" draw:display-name="Linienspitzen 89" svg:viewBox="0 0 20 20" svg:d="M0 20l10-20 10 20z"/>
    <draw:marker draw:name="Linienspitzen_20_90" draw:display-name="Linienspitzen 90" svg:viewBox="0 0 20 20" svg:d="M0 20l10-20 10 20z"/>
    <draw:marker draw:name="Linienspitzen_20_91" draw:display-name="Linienspitzen 91" svg:viewBox="0 0 20 20" svg:d="M0 20l10-20 10 20z"/>
    <draw:marker draw:name="Linienspitzen_20_92" draw:display-name="Linienspitzen 92" svg:viewBox="0 0 20 20" svg:d="M0 20l10-20 10 20z"/>
    <draw:marker draw:name="Linienspitzen_20_93" draw:display-name="Linienspitzen 93" svg:viewBox="0 0 20 20" svg:d="M0 20l10-20 10 20z"/>
    <draw:marker draw:name="Linienspitzen_20_94" draw:display-name="Linienspitzen 94" svg:viewBox="0 0 20 20" svg:d="M0 20l10-20 10 20z"/>
    <draw:marker draw:name="Linienspitzen_20_95" draw:display-name="Linienspitzen 95" svg:viewBox="0 0 20 20" svg:d="M0 20l10-20 10 20z"/>
    <draw:marker draw:name="Linienspitzen_20_96" draw:display-name="Linienspitzen 96" svg:viewBox="0 0 20 20" svg:d="M0 20l10-20 10 20z"/>
    <draw:marker draw:name="Linienspitzen_20_97" draw:display-name="Linienspitzen 97" svg:viewBox="0 0 20 20" svg:d="M0 20l10-20 10 20z"/>
    <draw:marker draw:name="Linienspitzen_20_98" draw:display-name="Linienspitzen 98" svg:viewBox="0 0 20 20" svg:d="M0 20l10-20 10 20z"/>
    <draw:marker draw:name="Linienspitzen_20_99" draw:display-name="Linienspitzen 99"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left="0.3cm"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List_20_Contents" style:display-name="List Contents" style:family="paragraph" style:parent-style-name="Standard" style:class="html">
      <style:paragraph-properties fo:margin-left="1cm"/>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header-footer-properties fo:min-height="0.6cm" fo:margin-left="0cm" fo:margin-right="0cm" fo:margin-top="0.499cm" fo:border="none" fo:padding="0.04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itle>KC-Pascal</text:title><text:tab/><text:tab/><text:chapter text:display="name" text:outline-level="1">Beispiele</text:chapter></text:p>
      </style:header>
      <style:header-first>
        <text:p text:style-name="Header_20_left"/>
      </style:header-first>
      <style:footer>
        <text:p text:style-name="Footer"><text:tab/><text:tab/><text:page-number text:select-page="current">51</text:page-number></text:p>
      </style:footer>
      <style:footer-left>
        <text:p text:style-name="Footer"><text:page-number text:select-page="current">24</text:page-number><text:tab/><text:tab/></text:p>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1T20:57:18.734901650</meta:creation-date>
    <dc:date>2026-05-03T21:49:46.047639931</dc:date>
    <meta:editing-duration>PT13H43M3S</meta:editing-duration>
    <meta:editing-cycles>141</meta:editing-cycles>
    <meta:generator>LibreOffice/24.2.7.2$Linux_X86_64 LibreOffice_project/420$Build-2</meta:generator>
    <dc:title>KC-Pascal</dc:title>
    <meta:print-date>2025-03-27T11:29:59.186829082</meta:print-date>
    <meta:printed-by>PDF-Dateien</meta:printed-by>
    <meta:document-statistic meta:table-count="27" meta:image-count="1" meta:object-count="0" meta:page-count="52" meta:paragraph-count="1115" meta:word-count="10329" meta:character-count="70422" meta:non-whitespace-character-count="60955"/>
  </office:meta>
</office:document-meta>
</file>